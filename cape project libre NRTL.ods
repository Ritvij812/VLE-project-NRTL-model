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1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1.762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2.741cm"/>
    </style:style>
    <style:style style:name="co9" style:family="table-column">
      <style:table-column-properties fo:break-before="auto" style:column-width="1.656cm"/>
    </style:style>
    <style:style style:name="co10" style:family="table-column">
      <style:table-column-properties fo:break-before="auto" style:column-width="7.049cm"/>
    </style:style>
    <style:style style:name="co11" style:family="table-column">
      <style:table-column-properties fo:break-before="auto" style:column-width="1.1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492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47cm" fo:break-before="auto" style:use-optimal-row-height="false"/>
    </style:style>
    <style:style style:name="ta1" style:family="table" style:master-page-name="PageStyle_5f_Sys1_20_1MeO2PrOH_2b_Water">
      <style:table-properties table:display="true" style:writing-mode="lr-tb"/>
    </style:style>
    <style:style style:name="ta2" style:family="table" style:master-page-name="PageStyle_5f_Sys2_20_2MeO1PrOH_2b_Water">
      <style:table-properties table:display="true" style:writing-mode="lr-tb"/>
    </style:style>
    <style:style style:name="ta3" style:family="table" style:master-page-name="PageStyle_5f_Sys3_20_1MeO2PrOH_2b_2MeO1PrOH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e405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1a3a5c" style:cell-protect="protected" style:print-content="true" style:diagonal-bl-tr="none" style:diagonal-tl-br="none" style:text-align-source="fix" style:repeat-content="false" fo:wrap-option="wrap" fo:border="1.76pt solid #2e405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35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13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137">
      <style:table-cell-properties fo:background-color="#f7d1d5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b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3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138">
      <style:table-cell-properties fo:background-color="#edf2f7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135">
      <style:table-cell-properties fo:background-color="#f7d1d5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a3a5c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135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a3a5c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a3a5c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139">
      <style:table-cell-properties fo:background-color="#f7d1d5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3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1" style:family="table-cell" style:parent-style-name="Default" style:data-style-name="N135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1a3a5c"/>
      <style:text-properties fo:color="#ffffff">
        <loext:char-complex-color loext:theme-type="dark1" loext:color-type="theme"/>
      </style:text-properties>
    </style:style>
    <style:style style:name="ce7" style:family="table-cell" style:parent-style-name="Default" style:data-style-name="N136">
      <style:table-cell-properties fo:background-color="#edf2f7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fo:background-color="#1a3a5c" style:cell-protect="protected" style:print-content="true" style:diagonal-bl-tr="none" style:diagonal-tl-br="none" style:text-align-source="fix" style:repeat-content="false" fo:wrap-option="wrap" fo:border="1.76pt solid #2e405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135">
      <style:table-cell-properties fo:background-color="#f7d1d5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1a3a5c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135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1a3a5c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13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135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8c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1a3a5c" style:cell-protect="protected" style:print-content="true" style:diagonal-bl-tr="none" style:diagonal-tl-br="none" style:text-align-source="fix" style:repeat-content="false" fo:wrap-option="wrap" fo:border="1.76pt solid #2e405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81">
      <style:table-cell-properties fo:background-color="#1a3a5c"/>
      <style:text-properties fo:color="#ffffff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ackground-color="#1a3a5c" style:cell-protect="protected" style:print-content="true" style:diagonal-bl-tr="none" style:diagonal-tl-br="none" style:text-align-source="fix" style:repeat-content="false" fo:wrap-option="no-wrap" fo:border="1.76pt solid #cc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ys1 1MeO2PrOH+Water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4" table:number-columns-repeated="2" table:default-cell-style-name="ce5"/>
        <table:table-column table:style-name="co2" table:number-columns-repeated="2" table:default-cell-style-name="ce5"/>
        <table:table-column table:style-name="co4" table:number-columns-repeated="2" table:default-cell-style-name="ce5"/>
        <table:table-column table:style-name="co3" table:default-cell-style-name="ce5"/>
        <table:table-column table:style-name="co6" table:default-cell-style-name="ce5"/>
        <table:table-column table:style-name="co5" table:visibility="collapse" table:default-cell-style-name="ce5"/>
        <table:table-column table:style-name="co3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4" table:visibility="collapse" table:default-cell-style-name="ce5"/>
        <table:table-column table:style-name="co3" table:default-cell-style-name="ce5"/>
        <table:table-column table:style-name="co9" table:default-cell-style-name="Default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8" table:default-cell-style-name="ce5"/>
        <table:table-column table:style-name="co11" table:default-cell-style-name="ce5"/>
        <table:table-column table:style-name="co9" table:number-columns-repeated="16353"/>
        <table:table-row table:style-name="ro1">
          <table:table-cell table:style-name="ce1" office:value-type="string" calcext:value-type="string" table:number-columns-spanned="24" table:number-rows-spanned="1">
            <text:p>System 1: 1-methoxy-2-propanol (1) + Water (3) | P = 101.325 kPa | NRTL</text:p>
          </table:table-cell>
          <table:covered-table-cell table:number-columns-repeated="23" table:style-name="ce1"/>
          <table:table-cell/>
          <table:table-cell>
            <draw:frame draw:z-index="0" draw:name="Chart 1" draw:style-name="gr1" draw:text-style-name="P1" svg:width="13.357cm" svg:height="9.998cm" svg:x="0cm" svg:y="0cm">
              <draw:object draw:notify-on-update-of-ranges="'Sys1 1MeO2PrOH+Water'.A3:'Sys1 1MeO2PrOH+Water'.A16 'Sys1 1MeO2PrOH+Water'.D3:'Sys1 1MeO2PrOH+Water'.D16 'Sys1 1MeO2PrOH+Water'.B3:'Sys1 1MeO2PrOH+Water'.B16 'Sys1 1MeO2PrOH+Water'.D3:'Sys1 1MeO2PrOH+Water'.D16 'Sys1 1MeO2PrOH+Water'.T3:'Sys1 1MeO2PrOH+Water'.T16 'Sys1 1MeO2PrOH+Water'.D3:'Sys1 1MeO2PrOH+Water'.D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Default" table:number-columns-repeated="16353"/>
        </table:table-row>
        <table:table-row table:style-name="ro2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 (exp)</text:p>
          </table:table-cell>
          <table:table-cell table:style-name="ce2" office:value-type="string" calcext:value-type="string">
            <text:p>P(exp) [kPa]</text:p>
          </table:table-cell>
          <table:table-cell table:style-name="ce2" office:value-type="string" calcext:value-type="string">
            <text:p>T(exp) [K]</text:p>
          </table:table-cell>
          <table:table-cell table:style-name="ce2" office:value-type="string" calcext:value-type="string">
            <text:p>P1sat (1-MeO-2-PrOH)</text:p>
          </table:table-cell>
          <table:table-cell table:style-name="ce2" office:value-type="string" calcext:value-type="string">
            <text:p>P2sat (Water)</text:p>
          </table:table-cell>
          <table:table-cell table:style-name="ce2" office:value-type="string" calcext:value-type="string">
            <text:p>Tau12</text:p>
          </table:table-cell>
          <table:table-cell table:style-name="ce2" office:value-type="string" calcext:value-type="string">
            <text:p>Tau21</text:p>
          </table:table-cell>
          <table:table-cell table:style-name="ce2" office:value-type="string" calcext:value-type="string">
            <text:p>G12</text:p>
          </table:table-cell>
          <table:table-cell table:style-name="ce2" office:value-type="string" calcext:value-type="string">
            <text:p>G21</text:p>
          </table:table-cell>
          <table:table-cell table:style-name="ce2" office:value-type="string" calcext:value-type="string">
            <text:p>Gamma1</text:p>
          </table:table-cell>
          <table:table-cell table:style-name="ce2" office:value-type="string" calcext:value-type="string">
            <text:p>Gamma2</text:p>
          </table:table-cell>
          <table:table-cell table:style-name="ce2" office:value-type="string" calcext:value-type="string">
            <text:p>P(calc)</text:p>
          </table:table-cell>
          <table:table-cell table:style-name="ce2" office:value-type="string" calcext:value-type="string">
            <text:p>((Pexp-Pcalc)/Pexp)^2)</text:p>
          </table:table-cell>
          <table:table-cell table:style-name="ce2" office:value-type="string" calcext:value-type="string">
            <text:p>Gibbs Energy</text:p>
          </table:table-cell>
          <table:table-cell table:style-name="ce2" office:value-type="string" calcext:value-type="string">
            <text:p>Gamma1(exp)</text:p>
          </table:table-cell>
          <table:table-cell table:style-name="ce2" office:value-type="string" calcext:value-type="string">
            <text:p>Gamma2(exp)</text:p>
          </table:table-cell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y1(calc)</text:p>
          </table:table-cell>
          <table:table-cell table:style-name="ce2" office:value-type="string" calcext:value-type="string">
            <text:p>((yexp-ycalc)/yexp)^2)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AAD</text:p>
          </table:table-cell>
          <table:table-cell table:style-name="ce2" office:value-type="string" calcext:value-type="string">
            <text:p>(RMSDz)^2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989" calcext:value-type="float">
            <text:p>0.9890</text:p>
          </table:table-cell>
          <table:table-cell table:style-name="ce3" office:value-type="float" office:value="0.949" calcext:value-type="float">
            <text:p>0.9490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1.41" calcext:value-type="float">
            <text:p>391.41</text:p>
          </table:table-cell>
          <table:table-cell table:style-name="ce6" table:formula="of:=EXP([.$S$8]+[.$S$9]/[.D3]+[.$S$10]*LN([.D3])+[.$S$11]*[.D3]^[.$S$12])" office:value-type="float" office:value="94.2752462321544" calcext:value-type="float">
            <text:p>94.275</text:p>
          </table:table-cell>
          <table:table-cell table:style-name="ce6" table:formula="of:=EXP([.$S$13]+[.$S$14]/[.D3]+[.$S$15]*LN([.D3])+[.$S$16]*[.D3]^[.$S$17])" office:value-type="float" office:value="191.557681472058" calcext:value-type="float">
            <text:p>191.558</text:p>
          </table:table-cell>
          <table:table-cell table:style-name="ce3" table:formula="of:=[.$S$3]+[.$S$5]/[.D3]" office:value-type="float" office:value="-0.37402167583319" calcext:value-type="float">
            <text:p>-0.3740</text:p>
          </table:table-cell>
          <table:table-cell table:style-name="ce3" table:formula="of:=[.$S$4]+[.$S$6]/[.D3]" office:value-type="float" office:value="3.14016384699943" calcext:value-type="float">
            <text:p>3.1402</text:p>
          </table:table-cell>
          <table:table-cell table:style-name="ce3" table:formula="of:=EXP(-[.$S$7]*[.G3])" office:value-type="float" office:value="1.11874386047686" calcext:value-type="float">
            <text:p>1.1187</text:p>
          </table:table-cell>
          <table:table-cell table:style-name="ce3" table:formula="of:=EXP(-[.$S$7]*[.H3])" office:value-type="float" office:value="0.389828198297778" calcext:value-type="float">
            <text:p>0.3898</text:p>
          </table:table-cell>
          <table:table-cell table:style-name="ce3" table:formula="of:=EXP((1-[.A3])^2*([.H3]*([.J3]/([.A3]+(1-[.A3])*[.J3]))^2+[.G3]*([.I3]/((1-[.A3])+[.A3]*[.I3])^2)))" office:value-type="float" office:value="1.00001797642555" calcext:value-type="float">
            <text:p>1.0000</text:p>
          </table:table-cell>
          <table:table-cell table:style-name="ce3" table:formula="of:=EXP(([.A3])^2*([.G3]*([.I3]/((1-[.A3])+[.A3]*[.I3]))^2+[.H3]*([.J3]/([.A3]+(1-[.A3])*[.J3])^2)))" office:value-type="float" office:value="2.33236718147755" calcext:value-type="float">
            <text:p>2.3324</text:p>
          </table:table-cell>
          <table:table-cell table:style-name="ce6" table:formula="of:=[.A3]*[.K3]*[.E3]+(1-[.A3])*[.L3]*[.F3]" office:value-type="float" office:value="98.1545059593737" calcext:value-type="float">
            <text:p>98.155</text:p>
          </table:table-cell>
          <table:table-cell table:style-name="ce10" table:formula="of:=(([.C3]-[.M3])/[.C3])^2" office:value-type="float" office:value="0.000979085587385559" calcext:value-type="float">
            <text:p>9.79086E-04</text:p>
          </table:table-cell>
          <table:table-cell table:style-name="ce11" table:formula="of:=8.314*[.D3]*([.A3]*LN([.K3])+(1-[.A3])*LN([.L3]))" office:value-type="float" office:value="30.3729124241663" calcext:value-type="float">
            <text:p>30.4</text:p>
          </table:table-cell>
          <table:table-cell table:style-name="ce3" office:value-type="float" office:value="1.015" calcext:value-type="float">
            <text:p>1.0150</text:p>
          </table:table-cell>
          <table:table-cell table:style-name="ce3" office:value-type="float" office:value="2.596" calcext:value-type="float">
            <text:p>2.5960</text:p>
          </table:table-cell>
          <table:table-cell table:style-name="ce13" office:value-type="string" calcext:value-type="string">
            <text:p>a12 (Minimized)</text:p>
          </table:table-cell>
          <table:table-cell table:style-name="ce18" office:value-type="float" office:value="1.10302512272748" calcext:value-type="float">
            <text:p>1.103025</text:p>
          </table:table-cell>
          <table:table-cell table:style-name="ce3" table:formula="of:=[.P3]*[.A3]*[.E3]/[.M3]" office:value-type="float" office:value="0.96416146030652" calcext:value-type="float">
            <text:p>0.9642</text:p>
          </table:table-cell>
          <table:table-cell table:style-name="ce10" table:formula="of:=(([.B3]-[.T3])/[.B3])^2" office:value-type="float" office:value="0.000255240532295846" calcext:value-type="float">
            <text:p>2.55241E-04</text:p>
          </table:table-cell>
          <table:table-cell table:style-name="ce10" table:formula="of:=[.N3]+[.U3]" office:value-type="float" office:value="0.00123432611968141" calcext:value-type="float">
            <text:p>1.23433E-03</text:p>
          </table:table-cell>
          <table:table-cell table:style-name="ce6" table:formula="of:=ABS([.C3]-[.M3])" office:value-type="float" office:value="3.17049404062634" calcext:value-type="float">
            <text:p>3.170</text:p>
          </table:table-cell>
          <table:table-cell table:style-name="ce6" table:formula="of:=SUM([.U3:.U16])/14" office:value-type="float" office:value="0.000797784007546621" calcext:value-type="float">
            <text:p>0.001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8297" calcext:value-type="float">
            <text:p>0.8297</text:p>
          </table:table-cell>
          <table:table-cell table:style-name="ce3" office:value-type="float" office:value="0.5405" calcext:value-type="float">
            <text:p>0.5405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80.19" calcext:value-type="float">
            <text:p>380.19</text:p>
          </table:table-cell>
          <table:table-cell table:style-name="ce6" table:formula="of:=EXP([.$S$8]+[.$S$9]/[.D4]+[.$S$10]*LN([.D4])+[.$S$11]*[.D4]^[.$S$12])" office:value-type="float" office:value="65.1901278137497" calcext:value-type="float">
            <text:p>65.190</text:p>
          </table:table-cell>
          <table:table-cell table:style-name="ce6" table:formula="of:=EXP([.$S$13]+[.$S$14]/[.D4]+[.$S$15]*LN([.D4])+[.$S$16]*[.D4]^[.$S$17])" office:value-type="float" office:value="132.183469982699" calcext:value-type="float">
            <text:p>132.183</text:p>
          </table:table-cell>
          <table:table-cell table:style-name="ce3" table:formula="of:=[.$S$3]+[.$S$5]/[.D4]" office:value-type="float" office:value="-0.417611631065707" calcext:value-type="float">
            <text:p>-0.4176</text:p>
          </table:table-cell>
          <table:table-cell table:style-name="ce3" table:formula="of:=[.$S$4]+[.$S$6]/[.D4]" office:value-type="float" office:value="2.65313884041679" calcext:value-type="float">
            <text:p>2.6531</text:p>
          </table:table-cell>
          <table:table-cell table:style-name="ce3" table:formula="of:=EXP(-[.$S$7]*[.G4])" office:value-type="float" office:value="1.13346973408864" calcext:value-type="float">
            <text:p>1.1335</text:p>
          </table:table-cell>
          <table:table-cell table:style-name="ce3" table:formula="of:=EXP(-[.$S$7]*[.H4])" office:value-type="float" office:value="0.451156202640782" calcext:value-type="float">
            <text:p>0.4512</text:p>
          </table:table-cell>
          <table:table-cell table:style-name="ce3" table:formula="of:=EXP((1-[.A4])^2*([.H4]*([.J4]/([.A4]+(1-[.A4])*[.J4]))^2+[.G4]*([.I4]/((1-[.A4])+[.A4]*[.I4])^2)))" office:value-type="float" office:value="1.00796228437905" calcext:value-type="float">
            <text:p>1.0080</text:p>
          </table:table-cell>
          <table:table-cell table:style-name="ce3" table:formula="of:=EXP(([.A4])^2*([.G4]*([.I4]/((1-[.A4])+[.A4]*[.I4]))^2+[.H4]*([.J4]/([.A4]+(1-[.A4])*[.J4])^2)))" office:value-type="float" office:value="2.02042956434107" calcext:value-type="float">
            <text:p>2.0204</text:p>
          </table:table-cell>
          <table:table-cell table:style-name="ce6" table:formula="of:=[.A4]*[.K4]*[.E4]+(1-[.A4])*[.L4]*[.F4]" office:value-type="float" office:value="100.000491698687" calcext:value-type="float">
            <text:p>100.000</text:p>
          </table:table-cell>
          <table:table-cell table:style-name="ce10" table:formula="of:=(([.C4]-[.M4])/[.C4])^2" office:value-type="float" office:value="0.000170874062296343" calcext:value-type="float">
            <text:p>1.70874E-04</text:p>
          </table:table-cell>
          <table:table-cell table:style-name="ce12" table:formula="of:=8.314*[.D4]*([.A4]*LN([.K4])+(1-[.A4])*LN([.L4]))" office:value-type="float" office:value="399.39188283483" calcext:value-type="float">
            <text:p>399.4</text:p>
          </table:table-cell>
          <table:table-cell table:style-name="ce3" office:value-type="float" office:value="0.991" calcext:value-type="float">
            <text:p>0.9910</text:p>
          </table:table-cell>
          <table:table-cell table:style-name="ce3" office:value-type="float" office:value="2.141" calcext:value-type="float">
            <text:p>2.1410</text:p>
          </table:table-cell>
          <table:table-cell table:style-name="ce13" office:value-type="string" calcext:value-type="string">
            <text:p>a21 (Minimized)</text:p>
          </table:table-cell>
          <table:table-cell table:style-name="ce18" office:value-type="float" office:value="19.643019217111" calcext:value-type="float">
            <text:p>19.643019</text:p>
          </table:table-cell>
          <table:table-cell table:style-name="ce3" table:formula="of:=[.P4]*[.A4]*[.E4]/[.M4]" office:value-type="float" office:value="0.53601191249291" calcext:value-type="float">
            <text:p>0.5360</text:p>
          </table:table-cell>
          <table:table-cell table:style-name="ce10" table:formula="of:=(([.B4]-[.T4])/[.B4])^2" office:value-type="float" office:value="0.0000689495181553858" calcext:value-type="float">
            <text:p>6.89495E-05</text:p>
          </table:table-cell>
          <table:table-cell table:style-name="ce10" table:formula="of:=[.N4]+[.U4]" office:value-type="float" office:value="0.000239823580451729" calcext:value-type="float">
            <text:p>2.39824E-04</text:p>
          </table:table-cell>
          <table:table-cell table:style-name="ce7" table:formula="of:=ABS([.C4]-[.M4])" office:value-type="float" office:value="1.3245083013132" calcext:value-type="float">
            <text:p>1.325</text:p>
          </table:table-cell>
          <table:table-cell table:style-name="ce6" table:formula="of:=SUM([.U4:.U17])/14" office:value-type="float" office:value="0.000779552540954061" calcext:value-type="float">
            <text:p>0.001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7473" calcext:value-type="float">
            <text:p>0.7473</text:p>
          </table:table-cell>
          <table:table-cell table:style-name="ce3" office:value-type="float" office:value="0.4617" calcext:value-type="float">
            <text:p>0.4617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8.19" calcext:value-type="float">
            <text:p>378.19</text:p>
          </table:table-cell>
          <table:table-cell table:style-name="ce6" table:formula="of:=EXP([.$S$8]+[.$S$9]/[.D5]+[.$S$10]*LN([.D5])+[.$S$11]*[.D5]^[.$S$12])" office:value-type="float" office:value="60.8748124199069" calcext:value-type="float">
            <text:p>60.875</text:p>
          </table:table-cell>
          <table:table-cell table:style-name="ce6" table:formula="of:=EXP([.$S$13]+[.$S$14]/[.D5]+[.$S$15]*LN([.D5])+[.$S$16]*[.D5]^[.$S$17])" office:value-type="float" office:value="123.398209539477" calcext:value-type="float">
            <text:p>123.398</text:p>
          </table:table-cell>
          <table:table-cell table:style-name="ce3" table:formula="of:=[.$S$3]+[.$S$5]/[.D5]" office:value-type="float" office:value="-0.425653286074001" calcext:value-type="float">
            <text:p>-0.4257</text:p>
          </table:table-cell>
          <table:table-cell table:style-name="ce3" table:formula="of:=[.$S$4]+[.$S$6]/[.D5]" office:value-type="float" office:value="2.56329045533684" calcext:value-type="float">
            <text:p>2.5633</text:p>
          </table:table-cell>
          <table:table-cell table:style-name="ce3" table:formula="of:=EXP(-[.$S$7]*[.G5])" office:value-type="float" office:value="1.13620752698784" calcext:value-type="float">
            <text:p>1.1362</text:p>
          </table:table-cell>
          <table:table-cell table:style-name="ce3" table:formula="of:=EXP(-[.$S$7]*[.H5])" office:value-type="float" office:value="0.463482274882324" calcext:value-type="float">
            <text:p>0.4635</text:p>
          </table:table-cell>
          <table:table-cell table:style-name="ce3" table:formula="of:=EXP((1-[.A5])^2*([.H5]*([.J5]/([.A5]+(1-[.A5])*[.J5]))^2+[.G5]*([.I5]/((1-[.A5])+[.A5]*[.I5])^2)))" office:value-type="float" office:value="1.02185153883323" calcext:value-type="float">
            <text:p>1.0219</text:p>
          </table:table-cell>
          <table:table-cell table:style-name="ce3" table:formula="of:=EXP(([.A5])^2*([.G5]*([.I5]/((1-[.A5])+[.A5]*[.I5]))^2+[.H5]*([.J5]/([.A5]+(1-[.A5])*[.J5])^2)))" office:value-type="float" office:value="1.88724410499527" calcext:value-type="float">
            <text:p>1.8872</text:p>
          </table:table-cell>
          <table:table-cell table:style-name="ce6" table:formula="of:=[.A5]*[.K5]*[.E5]+(1-[.A5])*[.L5]*[.F5]" office:value-type="float" office:value="105.335230752174" calcext:value-type="float">
            <text:p>105.335</text:p>
          </table:table-cell>
          <table:table-cell table:style-name="ce10" table:formula="of:=(([.C5]-[.M5])/[.C5])^2" office:value-type="float" office:value="0.00156641019549724" calcext:value-type="float">
            <text:p>1.56641E-03</text:p>
          </table:table-cell>
          <table:table-cell table:style-name="ce11" table:formula="of:=8.314*[.D5]*([.A5]*LN([.K5])+(1-[.A5])*LN([.L5]))" office:value-type="float" office:value="555.429364885747" calcext:value-type="float">
            <text:p>555.4</text:p>
          </table:table-cell>
          <table:table-cell table:style-name="ce3" office:value-type="float" office:value="1.007" calcext:value-type="float">
            <text:p>1.0070</text:p>
          </table:table-cell>
          <table:table-cell table:style-name="ce3" office:value-type="float" office:value="1.804" calcext:value-type="float">
            <text:p>1.8040</text:p>
          </table:table-cell>
          <table:table-cell table:style-name="ce13" office:value-type="string" calcext:value-type="string">
            <text:p>b12 (Minimized)</text:p>
          </table:table-cell>
          <table:table-cell table:style-name="ce18" office:value-type="float" office:value="-578.130887424632" calcext:value-type="float">
            <text:p>-578.130887</text:p>
          </table:table-cell>
          <table:table-cell table:style-name="ce3" table:formula="of:=[.P5]*[.A5]*[.E5]/[.M5]" office:value-type="float" office:value="0.434899028800969" calcext:value-type="float">
            <text:p>0.4349</text:p>
          </table:table-cell>
          <table:table-cell table:style-name="ce10" table:formula="of:=(([.B5]-[.T5])/[.B5])^2" office:value-type="float" office:value="0.0033696230085794" calcext:value-type="float">
            <text:p>3.36962E-03</text:p>
          </table:table-cell>
          <table:table-cell table:style-name="ce10" table:formula="of:=[.N5]+[.U5]" office:value-type="float" office:value="0.00493603320407664" calcext:value-type="float">
            <text:p>4.93603E-03</text:p>
          </table:table-cell>
          <table:table-cell table:style-name="ce6" table:formula="of:=ABS([.C5]-[.M5])" office:value-type="float" office:value="4.01023075217357" calcext:value-type="float">
            <text:p>4.010</text:p>
          </table:table-cell>
          <table:table-cell table:style-name="ce6" table:formula="of:=SUM([.U5:.U18])/14" office:value-type="float" office:value="0.000774627575371533" calcext:value-type="float">
            <text:p>0.001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6701" calcext:value-type="float">
            <text:p>0.6701</text:p>
          </table:table-cell>
          <table:table-cell table:style-name="ce3" office:value-type="float" office:value="0.3982" calcext:value-type="float">
            <text:p>0.3982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5.49" calcext:value-type="float">
            <text:p>375.49</text:p>
          </table:table-cell>
          <table:table-cell table:style-name="ce6" table:formula="of:=EXP([.$S$8]+[.$S$9]/[.D6]+[.$S$10]*LN([.D6])+[.$S$11]*[.D6]^[.$S$12])" office:value-type="float" office:value="55.422774517373" calcext:value-type="float">
            <text:p>55.423</text:p>
          </table:table-cell>
          <table:table-cell table:style-name="ce6" table:formula="of:=EXP([.$S$13]+[.$S$14]/[.D6]+[.$S$15]*LN([.D6])+[.$S$16]*[.D6]^[.$S$17])" office:value-type="float" office:value="112.307699552147" calcext:value-type="float">
            <text:p>112.308</text:p>
          </table:table-cell>
          <table:table-cell table:style-name="ce3" table:formula="of:=[.$S$3]+[.$S$5]/[.D6]" office:value-type="float" office:value="-0.436645407578605" calcext:value-type="float">
            <text:p>-0.4366</text:p>
          </table:table-cell>
          <table:table-cell table:style-name="ce3" table:formula="of:=[.$S$4]+[.$S$6]/[.D6]" office:value-type="float" office:value="2.44047688465109" calcext:value-type="float">
            <text:p>2.4405</text:p>
          </table:table-cell>
          <table:table-cell table:style-name="ce3" table:formula="of:=EXP(-[.$S$7]*[.G6])" office:value-type="float" office:value="1.13996051093254" calcext:value-type="float">
            <text:p>1.1400</text:p>
          </table:table-cell>
          <table:table-cell table:style-name="ce3" table:formula="of:=EXP(-[.$S$7]*[.H6])" office:value-type="float" office:value="0.4808773334585" calcext:value-type="float">
            <text:p>0.4809</text:p>
          </table:table-cell>
          <table:table-cell table:style-name="ce3" table:formula="of:=EXP((1-[.A6])^2*([.H6]*([.J6]/([.A6]+(1-[.A6])*[.J6]))^2+[.G6]*([.I6]/((1-[.A6])+[.A6]*[.I6])^2)))" office:value-type="float" office:value="1.04513503621307" calcext:value-type="float">
            <text:p>1.0451</text:p>
          </table:table-cell>
          <table:table-cell table:style-name="ce3" table:formula="of:=EXP(([.A6])^2*([.G6]*([.I6]/((1-[.A6])+[.A6]*[.I6]))^2+[.H6]*([.J6]/([.A6]+(1-[.A6])*[.J6])^2)))" office:value-type="float" office:value="1.74072507755801" calcext:value-type="float">
            <text:p>1.7407</text:p>
          </table:table-cell>
          <table:table-cell table:style-name="ce6" table:formula="of:=[.A6]*[.K6]*[.E6]+(1-[.A6])*[.L6]*[.F6]" office:value-type="float" office:value="103.309466232827" calcext:value-type="float">
            <text:p>103.309</text:p>
          </table:table-cell>
          <table:table-cell table:style-name="ce10" table:formula="of:=(([.C6]-[.M6])/[.C6])^2" office:value-type="float" office:value="0.000383578451954206" calcext:value-type="float">
            <text:p>3.83578E-04</text:p>
          </table:table-cell>
          <table:table-cell table:style-name="ce12" table:formula="of:=8.314*[.D6]*([.A6]*LN([.K6])+(1-[.A6])*LN([.L6]))" office:value-type="float" office:value="663.220377051473" calcext:value-type="float">
            <text:p>663.2</text:p>
          </table:table-cell>
          <table:table-cell table:style-name="ce3" office:value-type="float" office:value="1.064" calcext:value-type="float">
            <text:p>1.0640</text:p>
          </table:table-cell>
          <table:table-cell table:style-name="ce3" office:value-type="float" office:value="1.692" calcext:value-type="float">
            <text:p>1.6920</text:p>
          </table:table-cell>
          <table:table-cell table:style-name="ce13" office:value-type="string" calcext:value-type="string">
            <text:p>b21 (Minimized)</text:p>
          </table:table-cell>
          <table:table-cell table:style-name="ce18" office:value-type="float" office:value="-6459.38262041537" calcext:value-type="float">
            <text:p>-6459.382620</text:p>
          </table:table-cell>
          <table:table-cell table:style-name="ce3" table:formula="of:=[.P6]*[.A6]*[.E6]/[.M6]" office:value-type="float" office:value="0.382498196168178" calcext:value-type="float">
            <text:p>0.3825</text:p>
          </table:table-cell>
          <table:table-cell table:style-name="ce10" table:formula="of:=(([.B6]-[.T6])/[.B6])^2" office:value-type="float" office:value="0.00155487894655171" calcext:value-type="float">
            <text:p>1.55488E-03</text:p>
          </table:table-cell>
          <table:table-cell table:style-name="ce10" table:formula="of:=[.N6]+[.U6]" office:value-type="float" office:value="0.00193845739850592" calcext:value-type="float">
            <text:p>1.93846E-03</text:p>
          </table:table-cell>
          <table:table-cell table:style-name="ce7" table:formula="of:=ABS([.C6]-[.M6])" office:value-type="float" office:value="1.98446623282676" calcext:value-type="float">
            <text:p>1.984</text:p>
          </table:table-cell>
          <table:table-cell table:style-name="ce6" table:formula="of:=SUM([.U6:.U19])/14" office:value-type="float" office:value="0.000533940217615862" calcext:value-type="float">
            <text:p>0.001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4656" calcext:value-type="float">
            <text:p>0.4656</text:p>
          </table:table-cell>
          <table:table-cell table:style-name="ce3" office:value-type="float" office:value="0.2943" calcext:value-type="float">
            <text:p>0.2943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1.93" calcext:value-type="float">
            <text:p>371.93</text:p>
          </table:table-cell>
          <table:table-cell table:style-name="ce6" table:formula="of:=EXP([.$S$8]+[.$S$9]/[.D7]+[.$S$10]*LN([.D7])+[.$S$11]*[.D7]^[.$S$12])" office:value-type="float" office:value="48.8528895986392" calcext:value-type="float">
            <text:p>48.853</text:p>
          </table:table-cell>
          <table:table-cell table:style-name="ce6" table:formula="of:=EXP([.$S$13]+[.$S$14]/[.D7]+[.$S$15]*LN([.D7])+[.$S$16]*[.D7]^[.$S$17])" office:value-type="float" office:value="98.9564765659562" calcext:value-type="float">
            <text:p>98.956</text:p>
          </table:table-cell>
          <table:table-cell table:style-name="ce3" table:formula="of:=[.$S$3]+[.$S$5]/[.D7]" office:value-type="float" office:value="-0.451382662136962" calcext:value-type="float">
            <text:p>-0.4514</text:p>
          </table:table-cell>
          <table:table-cell table:style-name="ce3" table:formula="of:=[.$S$4]+[.$S$6]/[.D7]" office:value-type="float" office:value="2.27581942033373" calcext:value-type="float">
            <text:p>2.2758</text:p>
          </table:table-cell>
          <table:table-cell table:style-name="ce3" table:formula="of:=EXP(-[.$S$7]*[.G7])" office:value-type="float" office:value="1.14501163513106" calcext:value-type="float">
            <text:p>1.1450</text:p>
          </table:table-cell>
          <table:table-cell table:style-name="ce3" table:formula="of:=EXP(-[.$S$7]*[.H7])" office:value-type="float" office:value="0.505227818293215" calcext:value-type="float">
            <text:p>0.5052</text:p>
          </table:table-cell>
          <table:table-cell table:style-name="ce3" table:formula="of:=EXP((1-[.A7])^2*([.H7]*([.J7]/([.A7]+(1-[.A7])*[.J7]))^2+[.G7]*([.I7]/((1-[.A7])+[.A7]*[.I7])^2)))" office:value-type="float" office:value="1.19372374085259" calcext:value-type="float">
            <text:p>1.1937</text:p>
          </table:table-cell>
          <table:table-cell table:style-name="ce3" table:formula="of:=EXP(([.A7])^2*([.G7]*([.I7]/((1-[.A7])+[.A7]*[.I7]))^2+[.H7]*([.J7]/([.A7]+(1-[.A7])*[.J7])^2)))" office:value-type="float" office:value="1.41634474759053" calcext:value-type="float">
            <text:p>1.4163</text:p>
          </table:table-cell>
          <table:table-cell table:style-name="ce6" table:formula="of:=[.A7]*[.K7]*[.E7]+(1-[.A7])*[.L7]*[.F7]" office:value-type="float" office:value="102.05195330422" calcext:value-type="float">
            <text:p>102.052</text:p>
          </table:table-cell>
          <table:table-cell table:style-name="ce10" table:formula="of:=(([.C7]-[.M7])/[.C7])^2" office:value-type="float" office:value="0.0000514730383988012" calcext:value-type="float">
            <text:p>5.14730E-05</text:p>
          </table:table-cell>
          <table:table-cell table:style-name="ce11" table:formula="of:=8.314*[.D7]*([.A7]*LN([.K7])+(1-[.A7])*LN([.L7]))" office:value-type="float" office:value="830.1420459179" calcext:value-type="float">
            <text:p>830.1</text:p>
          </table:table-cell>
          <table:table-cell table:style-name="ce3" office:value-type="float" office:value="1.286" calcext:value-type="float">
            <text:p>1.2860</text:p>
          </table:table-cell>
          <table:table-cell table:style-name="ce3" office:value-type="float" office:value="1.384" calcext:value-type="float">
            <text:p>1.3840</text:p>
          </table:table-cell>
          <table:table-cell table:style-name="ce46" office:value-type="string" calcext:value-type="string">
            <text:p>alpha (fixed)</text:p>
          </table:table-cell>
          <table:table-cell table:style-name="ce50" office:value-type="float" office:value="0.3" calcext:value-type="float">
            <text:p>0.300000</text:p>
          </table:table-cell>
          <table:table-cell table:style-name="ce3" table:formula="of:=[.P7]*[.A7]*[.E7]/[.M7]" office:value-type="float" office:value="0.286630812969407" calcext:value-type="float">
            <text:p>0.2866</text:p>
          </table:table-cell>
          <table:table-cell table:style-name="ce10" table:formula="of:=(([.B7]-[.T7])/[.B7])^2" office:value-type="float" office:value="0.000679075612653817" calcext:value-type="float">
            <text:p>6.79076E-04</text:p>
          </table:table-cell>
          <table:table-cell table:style-name="ce10" table:formula="of:=[.N7]+[.U7]" office:value-type="float" office:value="0.000730548651052618" calcext:value-type="float">
            <text:p>7.30549E-04</text:p>
          </table:table-cell>
          <table:table-cell table:style-name="ce6" table:formula="of:=ABS([.C7]-[.M7])" office:value-type="float" office:value="0.726953304220245" calcext:value-type="float">
            <text:p>0.727</text:p>
          </table:table-cell>
          <table:table-cell table:style-name="ce6" table:formula="of:=SUM([.U7:.U20])/14" office:value-type="float" office:value="0.000422877435719311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334" calcext:value-type="float">
            <text:p>0.3340</text:p>
          </table:table-cell>
          <table:table-cell table:style-name="ce3" office:value-type="float" office:value="0.2435" calcext:value-type="float">
            <text:p>0.2435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0.92" calcext:value-type="float">
            <text:p>370.92</text:p>
          </table:table-cell>
          <table:table-cell table:style-name="ce6" table:formula="of:=EXP([.$S$8]+[.$S$9]/[.D8]+[.$S$10]*LN([.D8])+[.$S$11]*[.D8]^[.$S$12])" office:value-type="float" office:value="47.1104818567848" calcext:value-type="float">
            <text:p>47.110</text:p>
          </table:table-cell>
          <table:table-cell table:style-name="ce6" table:formula="of:=EXP([.$S$13]+[.$S$14]/[.D8]+[.$S$15]*LN([.D8])+[.$S$16]*[.D8]^[.$S$17])" office:value-type="float" office:value="95.4179895361381" calcext:value-type="float">
            <text:p>95.418</text:p>
          </table:table-cell>
          <table:table-cell table:style-name="ce3" table:formula="of:=[.$S$3]+[.$S$5]/[.D8]" office:value-type="float" office:value="-0.455615251004408" calcext:value-type="float">
            <text:p>-0.4556</text:p>
          </table:table-cell>
          <table:table-cell table:style-name="ce3" table:formula="of:=[.$S$4]+[.$S$6]/[.D8]" office:value-type="float" office:value="2.22852924510795" calcext:value-type="float">
            <text:p>2.2285</text:p>
          </table:table-cell>
          <table:table-cell table:style-name="ce3" table:formula="of:=EXP(-[.$S$7]*[.G8])" office:value-type="float" office:value="1.14646646764176" calcext:value-type="float">
            <text:p>1.1465</text:p>
          </table:table-cell>
          <table:table-cell table:style-name="ce3" table:formula="of:=EXP(-[.$S$7]*[.H8])" office:value-type="float" office:value="0.512446597431529" calcext:value-type="float">
            <text:p>0.5124</text:p>
          </table:table-cell>
          <table:table-cell table:style-name="ce3" table:formula="of:=EXP((1-[.A8])^2*([.H8]*([.J8]/([.A8]+(1-[.A8])*[.J8]))^2+[.G8]*([.I8]/((1-[.A8])+[.A8]*[.I8])^2)))" office:value-type="float" office:value="1.43138442019839" calcext:value-type="float">
            <text:p>1.4314</text:p>
          </table:table-cell>
          <table:table-cell table:style-name="ce3" table:formula="of:=EXP(([.A8])^2*([.G8]*([.I8]/((1-[.A8])+[.A8]*[.I8]))^2+[.H8]*([.J8]/([.A8]+(1-[.A8])*[.J8])^2)))" office:value-type="float" office:value="1.24439625158525" calcext:value-type="float">
            <text:p>1.2444</text:p>
          </table:table-cell>
          <table:table-cell table:style-name="ce6" table:formula="of:=[.A8]*[.K8]*[.E8]+(1-[.A8])*[.L8]*[.F8]" office:value-type="float" office:value="101.602059208491" calcext:value-type="float">
            <text:p>101.602</text:p>
          </table:table-cell>
          <table:table-cell table:style-name="ce10" table:formula="of:=(([.C8]-[.M8])/[.C8])^2" office:value-type="float" office:value="0.00000747673440503878" calcext:value-type="float">
            <text:p>7.47673E-06</text:p>
          </table:table-cell>
          <table:table-cell table:style-name="ce12" table:formula="of:=8.314*[.D8]*([.A8]*LN([.K8])+(1-[.A8])*LN([.L8]))" office:value-type="float" office:value="818.47186118712" calcext:value-type="float">
            <text:p>818.5</text:p>
          </table:table-cell>
          <table:table-cell table:style-name="ce3" office:value-type="float" office:value="1.541" calcext:value-type="float">
            <text:p>1.5410</text:p>
          </table:table-cell>
          <table:table-cell table:style-name="ce3" office:value-type="float" office:value="1.232" calcext:value-type="float">
            <text:p>1.2320</text:p>
          </table:table-cell>
          <table:table-cell table:style-name="ce46" office:value-type="string" calcext:value-type="string">
            <text:p>A <text:s/>(1-MeO-2-PrOH)</text:p>
          </table:table-cell>
          <table:table-cell table:style-name="ce50" office:value-type="float" office:value="51.91" calcext:value-type="float">
            <text:p>51.910000</text:p>
          </table:table-cell>
          <table:table-cell table:style-name="ce3" table:formula="of:=[.P8]*[.A8]*[.E8]/[.M8]" office:value-type="float" office:value="0.238651485390068" calcext:value-type="float">
            <text:p>0.2387</text:p>
          </table:table-cell>
          <table:table-cell table:style-name="ce10" table:formula="of:=(([.B8]-[.T8])/[.B8])^2" office:value-type="float" office:value="0.000396478358010057" calcext:value-type="float">
            <text:p>3.96478E-04</text:p>
          </table:table-cell>
          <table:table-cell table:style-name="ce10" table:formula="of:=[.N8]+[.U8]" office:value-type="float" office:value="0.000403955092415096" calcext:value-type="float">
            <text:p>4.03955E-04</text:p>
          </table:table-cell>
          <table:table-cell table:style-name="ce7" table:formula="of:=ABS([.C8]-[.M8])" office:value-type="float" office:value="0.277059208490826" calcext:value-type="float">
            <text:p>0.277</text:p>
          </table:table-cell>
          <table:table-cell table:style-name="ce6" table:formula="of:=SUM([.U8:.U21])/14" office:value-type="float" office:value="0.000374372034815467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2404" calcext:value-type="float">
            <text:p>0.2404</text:p>
          </table:table-cell>
          <table:table-cell table:style-name="ce3" office:value-type="float" office:value="0.2136" calcext:value-type="float">
            <text:p>0.2136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0.69" calcext:value-type="float">
            <text:p>370.69</text:p>
          </table:table-cell>
          <table:table-cell table:style-name="ce6" table:formula="of:=EXP([.$S$8]+[.$S$9]/[.D9]+[.$S$10]*LN([.D9])+[.$S$11]*[.D9]^[.$S$12])" office:value-type="float" office:value="46.7209406853043" calcext:value-type="float">
            <text:p>46.721</text:p>
          </table:table-cell>
          <table:table-cell table:style-name="ce6" table:formula="of:=EXP([.$S$13]+[.$S$14]/[.D9]+[.$S$15]*LN([.D9])+[.$S$16]*[.D9]^[.$S$17])" office:value-type="float" office:value="94.6270454203615" calcext:value-type="float">
            <text:p>94.627</text:p>
          </table:table-cell>
          <table:table-cell table:style-name="ce3" table:formula="of:=[.$S$3]+[.$S$5]/[.D9]" office:value-type="float" office:value="-0.456582332085523" calcext:value-type="float">
            <text:p>-0.4566</text:p>
          </table:table-cell>
          <table:table-cell table:style-name="ce3" table:formula="of:=[.$S$4]+[.$S$6]/[.D9]" office:value-type="float" office:value="2.21772417161376" calcext:value-type="float">
            <text:p>2.2177</text:p>
          </table:table-cell>
          <table:table-cell table:style-name="ce3" table:formula="of:=EXP(-[.$S$7]*[.G9])" office:value-type="float" office:value="1.14679913370598" calcext:value-type="float">
            <text:p>1.1468</text:p>
          </table:table-cell>
          <table:table-cell table:style-name="ce3" table:formula="of:=EXP(-[.$S$7]*[.H9])" office:value-type="float" office:value="0.514110399544413" calcext:value-type="float">
            <text:p>0.5141</text:p>
          </table:table-cell>
          <table:table-cell table:style-name="ce3" table:formula="of:=EXP((1-[.A9])^2*([.H9]*([.J9]/([.A9]+(1-[.A9])*[.J9]))^2+[.G9]*([.I9]/((1-[.A9])+[.A9]*[.I9])^2)))" office:value-type="float" office:value="1.7643560501555" calcext:value-type="float">
            <text:p>1.7644</text:p>
          </table:table-cell>
          <table:table-cell table:style-name="ce3" table:formula="of:=EXP(([.A9])^2*([.G9]*([.I9]/((1-[.A9])+[.A9]*[.I9]))^2+[.H9]*([.J9]/([.A9]+(1-[.A9])*[.J9])^2)))" office:value-type="float" office:value="1.14242896100489" calcext:value-type="float">
            <text:p>1.1424</text:p>
          </table:table-cell>
          <table:table-cell table:style-name="ce6" table:formula="of:=[.A9]*[.K9]*[.E9]+(1-[.A9])*[.L9]*[.F9]" office:value-type="float" office:value="101.933055585706" calcext:value-type="float">
            <text:p>101.933</text:p>
          </table:table-cell>
          <table:table-cell table:style-name="ce10" table:formula="of:=(([.C9]-[.M9])/[.C9])^2" office:value-type="float" office:value="0.0000360125056846824" calcext:value-type="float">
            <text:p>3.60125E-05</text:p>
          </table:table-cell>
          <table:table-cell table:style-name="ce11" table:formula="of:=8.314*[.D9]*([.A9]*LN([.K9])+(1-[.A9])*LN([.L9]))" office:value-type="float" office:value="732.391306851409" calcext:value-type="float">
            <text:p>732.4</text:p>
          </table:table-cell>
          <table:table-cell table:style-name="ce3" office:value-type="float" office:value="1.897" calcext:value-type="float">
            <text:p>1.8970</text:p>
          </table:table-cell>
          <table:table-cell table:style-name="ce3" office:value-type="float" office:value="1.132" calcext:value-type="float">
            <text:p>1.1320</text:p>
          </table:table-cell>
          <table:table-cell table:style-name="ce46" office:value-type="string" calcext:value-type="string">
            <text:p>B <text:s/>(1-MeO-2-PrOH)</text:p>
          </table:table-cell>
          <table:table-cell table:style-name="ce50" office:value-type="float" office:value="-6812" calcext:value-type="float">
            <text:p>-6812.000000</text:p>
          </table:table-cell>
          <table:table-cell table:style-name="ce3" table:formula="of:=[.P9]*[.A9]*[.E9]/[.M9]" office:value-type="float" office:value="0.209025046905247" calcext:value-type="float">
            <text:p>0.2090</text:p>
          </table:table-cell>
          <table:table-cell table:style-name="ce10" table:formula="of:=(([.B9]-[.T9])/[.B9])^2" office:value-type="float" office:value="0.000458744420141829" calcext:value-type="float">
            <text:p>4.58744E-04</text:p>
          </table:table-cell>
          <table:table-cell table:style-name="ce10" table:formula="of:=[.N9]+[.U9]" office:value-type="float" office:value="0.000494756925826511" calcext:value-type="float">
            <text:p>4.94757E-04</text:p>
          </table:table-cell>
          <table:table-cell table:style-name="ce6" table:formula="of:=ABS([.C9]-[.M9])" office:value-type="float" office:value="0.608055585706239" calcext:value-type="float">
            <text:p>0.608</text:p>
          </table:table-cell>
          <table:table-cell table:style-name="ce6" table:formula="of:=SUM([.U9:.U22])/14" office:value-type="float" office:value="0.000346052152100463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2089" calcext:value-type="float">
            <text:p>0.2089</text:p>
          </table:table-cell>
          <table:table-cell table:style-name="ce3" office:value-type="float" office:value="0.1984" calcext:value-type="float">
            <text:p>0.1984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0.57" calcext:value-type="float">
            <text:p>370.57</text:p>
          </table:table-cell>
          <table:table-cell table:style-name="ce6" table:formula="of:=EXP([.$S$8]+[.$S$9]/[.D10]+[.$S$10]*LN([.D10])+[.$S$11]*[.D10]^[.$S$12])" office:value-type="float" office:value="46.5187578804635" calcext:value-type="float">
            <text:p>46.519</text:p>
          </table:table-cell>
          <table:table-cell table:style-name="ce6" table:formula="of:=EXP([.$S$13]+[.$S$14]/[.D10]+[.$S$15]*LN([.D10])+[.$S$16]*[.D10]^[.$S$17])" office:value-type="float" office:value="94.2165429570026" calcext:value-type="float">
            <text:p>94.217</text:p>
          </table:table-cell>
          <table:table-cell table:style-name="ce3" table:formula="of:=[.$S$3]+[.$S$5]/[.D10]" office:value-type="float" office:value="-0.457087372683999" calcext:value-type="float">
            <text:p>-0.4571</text:p>
          </table:table-cell>
          <table:table-cell table:style-name="ce3" table:formula="of:=[.$S$4]+[.$S$6]/[.D10]" office:value-type="float" office:value="2.21208141746351" calcext:value-type="float">
            <text:p>2.2121</text:p>
          </table:table-cell>
          <table:table-cell table:style-name="ce3" table:formula="of:=EXP(-[.$S$7]*[.G10])" office:value-type="float" office:value="1.14697290090581" calcext:value-type="float">
            <text:p>1.1470</text:p>
          </table:table-cell>
          <table:table-cell table:style-name="ce3" table:formula="of:=EXP(-[.$S$7]*[.H10])" office:value-type="float" office:value="0.514981436170451" calcext:value-type="float">
            <text:p>0.5150</text:p>
          </table:table-cell>
          <table:table-cell table:style-name="ce3" table:formula="of:=EXP((1-[.A10])^2*([.H10]*([.J10]/([.A10]+(1-[.A10])*[.J10]))^2+[.G10]*([.I10]/((1-[.A10])+[.A10]*[.I10])^2)))" office:value-type="float" office:value="1.93050021518716" calcext:value-type="float">
            <text:p>1.9305</text:p>
          </table:table-cell>
          <table:table-cell table:style-name="ce3" table:formula="of:=EXP(([.A10])^2*([.G10]*([.I10]/((1-[.A10])+[.A10]*[.I10]))^2+[.H10]*([.J10]/([.A10]+(1-[.A10])*[.J10])^2)))" office:value-type="float" office:value="1.11202398492238" calcext:value-type="float">
            <text:p>1.1120</text:p>
          </table:table-cell>
          <table:table-cell table:style-name="ce6" table:formula="of:=[.A10]*[.K10]*[.E10]+(1-[.A10])*[.L10]*[.F10]" office:value-type="float" office:value="101.644536262749" calcext:value-type="float">
            <text:p>101.645</text:p>
          </table:table-cell>
          <table:table-cell table:style-name="ce10" table:formula="of:=(([.C10]-[.M10])/[.C10])^2" office:value-type="float" office:value="0.00000994505245287446" calcext:value-type="float">
            <text:p>9.94505E-06</text:p>
          </table:table-cell>
          <table:table-cell table:style-name="ce12" table:formula="of:=8.314*[.D10]*([.A10]*LN([.K10])+(1-[.A10])*LN([.L10]))" office:value-type="float" office:value="682.147682936373" calcext:value-type="float">
            <text:p>682.1</text:p>
          </table:table-cell>
          <table:table-cell table:style-name="ce3" office:value-type="float" office:value="2.038" calcext:value-type="float">
            <text:p>2.0380</text:p>
          </table:table-cell>
          <table:table-cell table:style-name="ce3" office:value-type="float" office:value="1.112" calcext:value-type="float">
            <text:p>1.1120</text:p>
          </table:table-cell>
          <table:table-cell table:style-name="ce46" office:value-type="string" calcext:value-type="string">
            <text:p>E <text:s/>(1-MeO-2-PrOH)</text:p>
          </table:table-cell>
          <table:table-cell table:style-name="ce50" office:value-type="float" office:value="-5.02" calcext:value-type="float">
            <text:p>-5.020000</text:p>
          </table:table-cell>
          <table:table-cell table:style-name="ce3" table:formula="of:=[.P10]*[.A10]*[.E10]/[.M10]" office:value-type="float" office:value="0.19484384477951" calcext:value-type="float">
            <text:p>0.1948</text:p>
          </table:table-cell>
          <table:table-cell table:style-name="ce10" table:formula="of:=(([.B10]-[.T10])/[.B10])^2" office:value-type="float" office:value="0.000321275850763153" calcext:value-type="float">
            <text:p>3.21276E-04</text:p>
          </table:table-cell>
          <table:table-cell table:style-name="ce10" table:formula="of:=[.N10]+[.U10]" office:value-type="float" office:value="0.000331220903216028" calcext:value-type="float">
            <text:p>3.31221E-04</text:p>
          </table:table-cell>
          <table:table-cell table:style-name="ce7" table:formula="of:=ABS([.C10]-[.M10])" office:value-type="float" office:value="0.319536262748798" calcext:value-type="float">
            <text:p>0.320</text:p>
          </table:table-cell>
          <table:table-cell table:style-name="ce6" table:formula="of:=SUM([.U10:.U23])/14" office:value-type="float" office:value="0.000313284693518904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1692" calcext:value-type="float">
            <text:p>0.1692</text:p>
          </table:table-cell>
          <table:table-cell table:style-name="ce3" office:value-type="float" office:value="0.1741" calcext:value-type="float">
            <text:p>0.1741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0.61" calcext:value-type="float">
            <text:p>370.61</text:p>
          </table:table-cell>
          <table:table-cell table:style-name="ce6" table:formula="of:=EXP([.$S$8]+[.$S$9]/[.D11]+[.$S$10]*LN([.D11])+[.$S$11]*[.D11]^[.$S$12])" office:value-type="float" office:value="46.5860718737517" calcext:value-type="float">
            <text:p>46.586</text:p>
          </table:table-cell>
          <table:table-cell table:style-name="ce6" table:formula="of:=EXP([.$S$13]+[.$S$14]/[.D11]+[.$S$15]*LN([.D11])+[.$S$16]*[.D11]^[.$S$17])" office:value-type="float" office:value="94.3532126276837" calcext:value-type="float">
            <text:p>94.353</text:p>
          </table:table-cell>
          <table:table-cell table:style-name="ce3" table:formula="of:=[.$S$3]+[.$S$5]/[.D11]" office:value-type="float" office:value="-0.456918989478429" calcext:value-type="float">
            <text:p>-0.4569</text:p>
          </table:table-cell>
          <table:table-cell table:style-name="ce3" table:formula="of:=[.$S$4]+[.$S$6]/[.D11]" office:value-type="float" office:value="2.2139627415292" calcext:value-type="float">
            <text:p>2.2140</text:p>
          </table:table-cell>
          <table:table-cell table:style-name="ce3" table:formula="of:=EXP(-[.$S$7]*[.G11])" office:value-type="float" office:value="1.14691496307706" calcext:value-type="float">
            <text:p>1.1469</text:p>
          </table:table-cell>
          <table:table-cell table:style-name="ce3" table:formula="of:=EXP(-[.$S$7]*[.H11])" office:value-type="float" office:value="0.514690864086427" calcext:value-type="float">
            <text:p>0.5147</text:p>
          </table:table-cell>
          <table:table-cell table:style-name="ce3" table:formula="of:=EXP((1-[.A11])^2*([.H11]*([.J11]/([.A11]+(1-[.A11])*[.J11]))^2+[.G11]*([.I11]/((1-[.A11])+[.A11]*[.I11])^2)))" office:value-type="float" office:value="2.20820081604224" calcext:value-type="float">
            <text:p>2.2082</text:p>
          </table:table-cell>
          <table:table-cell table:style-name="ce3" table:formula="of:=EXP(([.A11])^2*([.G11]*([.I11]/((1-[.A11])+[.A11]*[.I11]))^2+[.H11]*([.J11]/([.A11]+(1-[.A11])*[.J11])^2)))" office:value-type="float" office:value="1.07810901858872" calcext:value-type="float">
            <text:p>1.0781</text:p>
          </table:table-cell>
          <table:table-cell table:style-name="ce6" table:formula="of:=[.A11]*[.K11]*[.E11]+(1-[.A11])*[.L11]*[.F11]" office:value-type="float" office:value="101.917350703142" calcext:value-type="float">
            <text:p>101.917</text:p>
          </table:table-cell>
          <table:table-cell table:style-name="ce10" table:formula="of:=(([.C11]-[.M11])/[.C11])^2" office:value-type="float" office:value="0.0000341762644723835" calcext:value-type="float">
            <text:p>3.41763E-05</text:p>
          </table:table-cell>
          <table:table-cell table:style-name="ce11" table:formula="of:=8.314*[.D11]*([.A11]*LN([.K11])+(1-[.A11])*LN([.L11]))" office:value-type="float" office:value="605.527038356417" calcext:value-type="float">
            <text:p>605.5</text:p>
          </table:table-cell>
          <table:table-cell table:style-name="ce3" office:value-type="float" office:value="2.208" calcext:value-type="float">
            <text:p>2.2080</text:p>
          </table:table-cell>
          <table:table-cell table:style-name="ce3" office:value-type="float" office:value="1.089" calcext:value-type="float">
            <text:p>1.0890</text:p>
          </table:table-cell>
          <table:table-cell table:style-name="ce46" office:value-type="string" calcext:value-type="string">
            <text:p>F <text:s/>(1-MeO-2-PrOH)</text:p>
          </table:table-cell>
          <table:table-cell table:style-name="ce50" office:value-type="float" office:value="2.263E-018" calcext:value-type="float">
            <text:p>0.000000</text:p>
          </table:table-cell>
          <table:table-cell table:style-name="ce3" table:formula="of:=[.P11]*[.A11]*[.E11]/[.M11]" office:value-type="float" office:value="0.170768354760982" calcext:value-type="float">
            <text:p>0.1708</text:p>
          </table:table-cell>
          <table:table-cell table:style-name="ce10" table:formula="of:=(([.B11]-[.T11])/[.B11])^2" office:value-type="float" office:value="0.000366201365079701" calcext:value-type="float">
            <text:p>3.66201E-04</text:p>
          </table:table-cell>
          <table:table-cell table:style-name="ce10" table:formula="of:=[.N11]+[.U11]" office:value-type="float" office:value="0.000400377629552084" calcext:value-type="float">
            <text:p>4.00378E-04</text:p>
          </table:table-cell>
          <table:table-cell table:style-name="ce6" table:formula="of:=ABS([.C11]-[.M11])" office:value-type="float" office:value="0.592350703142429" calcext:value-type="float">
            <text:p>0.592</text:p>
          </table:table-cell>
          <table:table-cell table:style-name="ce6" table:formula="of:=SUM([.U11:.U24])/14" office:value-type="float" office:value="0.000290336418464393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1439" calcext:value-type="float">
            <text:p>0.1439</text:p>
          </table:table-cell>
          <table:table-cell table:style-name="ce3" office:value-type="float" office:value="0.164" calcext:value-type="float">
            <text:p>0.1640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0.7" calcext:value-type="float">
            <text:p>370.70</text:p>
          </table:table-cell>
          <table:table-cell table:style-name="ce6" table:formula="of:=EXP([.$S$8]+[.$S$9]/[.D12]+[.$S$10]*LN([.D12])+[.$S$11]*[.D12]^[.$S$12])" office:value-type="float" office:value="46.7378218861616" calcext:value-type="float">
            <text:p>46.738</text:p>
          </table:table-cell>
          <table:table-cell table:style-name="ce6" table:formula="of:=EXP([.$S$13]+[.$S$14]/[.D12]+[.$S$15]*LN([.D12])+[.$S$16]*[.D12]^[.$S$17])" office:value-type="float" office:value="94.6613208270386" calcext:value-type="float">
            <text:p>94.661</text:p>
          </table:table-cell>
          <table:table-cell table:style-name="ce3" table:formula="of:=[.$S$3]+[.$S$5]/[.D12]" office:value-type="float" office:value="-0.456540260128285" calcext:value-type="float">
            <text:p>-0.4565</text:p>
          </table:table-cell>
          <table:table-cell table:style-name="ce3" table:formula="of:=[.$S$4]+[.$S$6]/[.D12]" office:value-type="float" office:value="2.21819423622249" calcext:value-type="float">
            <text:p>2.2182</text:p>
          </table:table-cell>
          <table:table-cell table:style-name="ce3" table:formula="of:=EXP(-[.$S$7]*[.G12])" office:value-type="float" office:value="1.14678465937209" calcext:value-type="float">
            <text:p>1.1468</text:p>
          </table:table-cell>
          <table:table-cell table:style-name="ce3" table:formula="of:=EXP(-[.$S$7]*[.H12])" office:value-type="float" office:value="0.514037905124951" calcext:value-type="float">
            <text:p>0.5140</text:p>
          </table:table-cell>
          <table:table-cell table:style-name="ce3" table:formula="of:=EXP((1-[.A12])^2*([.H12]*([.J12]/([.A12]+(1-[.A12])*[.J12]))^2+[.G12]*([.I12]/((1-[.A12])+[.A12]*[.I12])^2)))" office:value-type="float" office:value="2.43921574240085" calcext:value-type="float">
            <text:p>2.4392</text:p>
          </table:table-cell>
          <table:table-cell table:style-name="ce3" table:formula="of:=EXP(([.A12])^2*([.G12]*([.I12]/((1-[.A12])+[.A12]*[.I12]))^2+[.H12]*([.J12]/([.A12]+(1-[.A12])*[.J12])^2)))" office:value-type="float" office:value="1.0589876333642" calcext:value-type="float">
            <text:p>1.0590</text:p>
          </table:table-cell>
          <table:table-cell table:style-name="ce6" table:formula="of:=[.A12]*[.K12]*[.E12]+(1-[.A12])*[.L12]*[.F12]" office:value-type="float" office:value="102.225010910171" calcext:value-type="float">
            <text:p>102.225</text:p>
          </table:table-cell>
          <table:table-cell table:style-name="ce10" table:formula="of:=(([.C12]-[.M12])/[.C12])^2" office:value-type="float" office:value="0.0000788973331023423" calcext:value-type="float">
            <text:p>7.88973E-05</text:p>
          </table:table-cell>
          <table:table-cell table:style-name="ce12" table:formula="of:=8.314*[.D12]*([.A12]*LN([.K12])+(1-[.A12])*LN([.L12]))" office:value-type="float" office:value="546.679733313126" calcext:value-type="float">
            <text:p>546.7</text:p>
          </table:table-cell>
          <table:table-cell table:style-name="ce3" office:value-type="float" office:value="2.44" calcext:value-type="float">
            <text:p>2.4400</text:p>
          </table:table-cell>
          <table:table-cell table:style-name="ce3" office:value-type="float" office:value="1.067" calcext:value-type="float">
            <text:p>1.0670</text:p>
          </table:table-cell>
          <table:table-cell table:style-name="ce46" office:value-type="string" calcext:value-type="string">
            <text:p>G <text:s/>(1-MeO-2-PrOH)</text:p>
          </table:table-cell>
          <table:table-cell table:style-name="ce51" office:value-type="float" office:value="6" calcext:value-type="float">
            <text:p>6.0000</text:p>
          </table:table-cell>
          <table:table-cell table:style-name="ce3" table:formula="of:=[.P12]*[.A12]*[.E12]/[.M12]" office:value-type="float" office:value="0.160532113650758" calcext:value-type="float">
            <text:p>0.1605</text:p>
          </table:table-cell>
          <table:table-cell table:style-name="ce10" table:formula="of:=(([.B12]-[.T12])/[.B12])^2" office:value-type="float" office:value="0.000447138449258481" calcext:value-type="float">
            <text:p>4.47138E-04</text:p>
          </table:table-cell>
          <table:table-cell table:style-name="ce10" table:formula="of:=[.N12]+[.U12]" office:value-type="float" office:value="0.000526035782360824" calcext:value-type="float">
            <text:p>5.26036E-04</text:p>
          </table:table-cell>
          <table:table-cell table:style-name="ce7" table:formula="of:=ABS([.C12]-[.M12])" office:value-type="float" office:value="0.900010910170522" calcext:value-type="float">
            <text:p>0.900</text:p>
          </table:table-cell>
          <table:table-cell table:style-name="ce6" table:formula="of:=SUM([.U12:.U25])/14" office:value-type="float" office:value="0.000264179178101557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1193" calcext:value-type="float">
            <text:p>0.1193</text:p>
          </table:table-cell>
          <table:table-cell table:style-name="ce3" office:value-type="float" office:value="0.1605" calcext:value-type="float">
            <text:p>0.1605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0.82" calcext:value-type="float">
            <text:p>370.82</text:p>
          </table:table-cell>
          <table:table-cell table:style-name="ce6" table:formula="of:=EXP([.$S$8]+[.$S$9]/[.D13]+[.$S$10]*LN([.D13])+[.$S$11]*[.D13]^[.$S$12])" office:value-type="float" office:value="46.9407886381181" calcext:value-type="float">
            <text:p>46.941</text:p>
          </table:table-cell>
          <table:table-cell table:style-name="ce6" table:formula="of:=EXP([.$S$13]+[.$S$14]/[.D13]+[.$S$15]*LN([.D13])+[.$S$16]*[.D13]^[.$S$17])" office:value-type="float" office:value="95.0734296761591" calcext:value-type="float">
            <text:p>95.073</text:p>
          </table:table-cell>
          <table:table-cell table:style-name="ce3" table:formula="of:=[.$S$3]+[.$S$5]/[.D13]" office:value-type="float" office:value="-0.456035573633644" calcext:value-type="float">
            <text:p>-0.4560</text:p>
          </table:table-cell>
          <table:table-cell table:style-name="ce3" table:formula="of:=[.$S$4]+[.$S$6]/[.D13]" office:value-type="float" office:value="2.22383303401578" calcext:value-type="float">
            <text:p>2.2238</text:p>
          </table:table-cell>
          <table:table-cell table:style-name="ce3" table:formula="of:=EXP(-[.$S$7]*[.G13])" office:value-type="float" office:value="1.14661104249678" calcext:value-type="float">
            <text:p>1.1466</text:p>
          </table:table-cell>
          <table:table-cell table:style-name="ce3" table:formula="of:=EXP(-[.$S$7]*[.H13])" office:value-type="float" office:value="0.513169073465522" calcext:value-type="float">
            <text:p>0.5132</text:p>
          </table:table-cell>
          <table:table-cell table:style-name="ce3" table:formula="of:=EXP((1-[.A13])^2*([.H13]*([.J13]/([.A13]+(1-[.A13])*[.J13]))^2+[.G13]*([.I13]/((1-[.A13])+[.A13]*[.I13])^2)))" office:value-type="float" office:value="2.71887636559602" calcext:value-type="float">
            <text:p>2.7189</text:p>
          </table:table-cell>
          <table:table-cell table:style-name="ce3" table:formula="of:=EXP(([.A13])^2*([.G13]*([.I13]/((1-[.A13])+[.A13]*[.I13]))^2+[.H13]*([.J13]/([.A13]+(1-[.A13])*[.J13])^2)))" office:value-type="float" office:value="1.04240515270021" calcext:value-type="float">
            <text:p>1.0424</text:p>
          </table:table-cell>
          <table:table-cell table:style-name="ce6" table:formula="of:=[.A13]*[.K13]*[.E13]+(1-[.A13])*[.L13]*[.F13]" office:value-type="float" office:value="102.507608301584" calcext:value-type="float">
            <text:p>102.508</text:p>
          </table:table-cell>
          <table:table-cell table:style-name="ce10" table:formula="of:=(([.C13]-[.M13])/[.C13])^2" office:value-type="float" office:value="0.000136222429563886" calcext:value-type="float">
            <text:p>1.36222E-04</text:p>
          </table:table-cell>
          <table:table-cell table:style-name="ce11" table:formula="of:=8.314*[.D13]*([.A13]*LN([.K13])+(1-[.A13])*LN([.L13]))" office:value-type="float" office:value="480.645993608261" calcext:value-type="float">
            <text:p>480.6</text:p>
          </table:table-cell>
          <table:table-cell table:style-name="ce3" office:value-type="float" office:value="2.868" calcext:value-type="float">
            <text:p>2.8680</text:p>
          </table:table-cell>
          <table:table-cell table:style-name="ce3" office:value-type="float" office:value="1.037" calcext:value-type="float">
            <text:p>1.0370</text:p>
          </table:table-cell>
          <table:table-cell table:style-name="ce46" office:value-type="string" calcext:value-type="string">
            <text:p>A <text:s/>(Water)</text:p>
          </table:table-cell>
          <table:table-cell table:style-name="ce50" office:value-type="float" office:value="66.74" calcext:value-type="float">
            <text:p>66.740000</text:p>
          </table:table-cell>
          <table:table-cell table:style-name="ce3" table:formula="of:=[.P13]*[.A13]*[.E13]/[.M13]" office:value-type="float" office:value="0.156680111423267" calcext:value-type="float">
            <text:p>0.1567</text:p>
          </table:table-cell>
          <table:table-cell table:style-name="ce10" table:formula="of:=(([.B13]-[.T13])/[.B13])^2" office:value-type="float" office:value="0.000566436612170139" calcext:value-type="float">
            <text:p>5.66437E-04</text:p>
          </table:table-cell>
          <table:table-cell table:style-name="ce10" table:formula="of:=[.N13]+[.U13]" office:value-type="float" office:value="0.000702659041734024" calcext:value-type="float">
            <text:p>7.02659E-04</text:p>
          </table:table-cell>
          <table:table-cell table:style-name="ce6" table:formula="of:=ABS([.C13]-[.M13])" office:value-type="float" office:value="1.18260830158434" calcext:value-type="float">
            <text:p>1.183</text:p>
          </table:table-cell>
          <table:table-cell table:style-name="ce6" table:formula="of:=SUM([.U13:.U26])/14" office:value-type="float" office:value="0.000232240717440237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075" calcext:value-type="float">
            <text:p>0.0750</text:p>
          </table:table-cell>
          <table:table-cell table:style-name="ce3" office:value-type="float" office:value="0.1134" calcext:value-type="float">
            <text:p>0.1134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1.18" calcext:value-type="float">
            <text:p>371.18</text:p>
          </table:table-cell>
          <table:table-cell table:style-name="ce6" table:formula="of:=EXP([.$S$8]+[.$S$9]/[.D14]+[.$S$10]*LN([.D14])+[.$S$11]*[.D14]^[.$S$12])" office:value-type="float" office:value="47.5540508496242" calcext:value-type="float">
            <text:p>47.554</text:p>
          </table:table-cell>
          <table:table-cell table:style-name="ce6" table:formula="of:=EXP([.$S$13]+[.$S$14]/[.D14]+[.$S$15]*LN([.D14])+[.$S$16]*[.D14]^[.$S$17])" office:value-type="float" office:value="96.3186955044659" calcext:value-type="float">
            <text:p>96.319</text:p>
          </table:table-cell>
          <table:table-cell table:style-name="ce3" table:formula="of:=[.$S$3]+[.$S$5]/[.D14]" office:value-type="float" office:value="-0.454523472090754" calcext:value-type="float">
            <text:p>-0.4545</text:p>
          </table:table-cell>
          <table:table-cell table:style-name="ce3" table:formula="of:=[.$S$4]+[.$S$6]/[.D14]" office:value-type="float" office:value="2.24072755157037" calcext:value-type="float">
            <text:p>2.2407</text:p>
          </table:table-cell>
          <table:table-cell table:style-name="ce3" table:formula="of:=EXP(-[.$S$7]*[.G14])" office:value-type="float" office:value="1.14609102275616" calcext:value-type="float">
            <text:p>1.1461</text:p>
          </table:table-cell>
          <table:table-cell table:style-name="ce3" table:formula="of:=EXP(-[.$S$7]*[.H14])" office:value-type="float" office:value="0.510574730369398" calcext:value-type="float">
            <text:p>0.5106</text:p>
          </table:table-cell>
          <table:table-cell table:style-name="ce3" table:formula="of:=EXP((1-[.A14])^2*([.H14]*([.J14]/([.A14]+(1-[.A14])*[.J14]))^2+[.G14]*([.I14]/((1-[.A14])+[.A14]*[.I14])^2)))" office:value-type="float" office:value="3.42999356914523" calcext:value-type="float">
            <text:p>3.4300</text:p>
          </table:table-cell>
          <table:table-cell table:style-name="ce3" table:formula="of:=EXP(([.A14])^2*([.G14]*([.I14]/((1-[.A14])+[.A14]*[.I14]))^2+[.H14]*([.J14]/([.A14]+(1-[.A14])*[.J14])^2)))" office:value-type="float" office:value="1.01836642755305" calcext:value-type="float">
            <text:p>1.0184</text:p>
          </table:table-cell>
          <table:table-cell table:style-name="ce6" table:formula="of:=[.A14]*[.K14]*[.E14]+(1-[.A14])*[.L14]*[.F14]" office:value-type="float" office:value="102.96440305397" calcext:value-type="float">
            <text:p>102.964</text:p>
          </table:table-cell>
          <table:table-cell table:style-name="ce10" table:formula="of:=(([.C14]-[.M14])/[.C14])^2" office:value-type="float" office:value="0.000261781079781553" calcext:value-type="float">
            <text:p>2.61781E-04</text:p>
          </table:table-cell>
          <table:table-cell table:style-name="ce12" table:formula="of:=8.314*[.D14]*([.A14]*LN([.K14])+(1-[.A14])*LN([.L14]))" office:value-type="float" office:value="337.226846914465" calcext:value-type="float">
            <text:p>337.2</text:p>
          </table:table-cell>
          <table:table-cell table:style-name="ce3" office:value-type="float" office:value="3.192" calcext:value-type="float">
            <text:p>3.1920</text:p>
          </table:table-cell>
          <table:table-cell table:style-name="ce3" office:value-type="float" office:value="1.029" calcext:value-type="float">
            <text:p>1.0290</text:p>
          </table:table-cell>
          <table:table-cell table:style-name="ce46" office:value-type="string" calcext:value-type="string">
            <text:p>B <text:s/>(Water)</text:p>
          </table:table-cell>
          <table:table-cell table:style-name="ce50" office:value-type="float" office:value="-7258.2" calcext:value-type="float">
            <text:p>-7258.200000</text:p>
          </table:table-cell>
          <table:table-cell table:style-name="ce3" table:formula="of:=[.P14]*[.A14]*[.E14]/[.M14]" office:value-type="float" office:value="0.110566753516094" calcext:value-type="float">
            <text:p>0.1106</text:p>
          </table:table-cell>
          <table:table-cell table:style-name="ce10" table:formula="of:=(([.B14]-[.T14])/[.B14])^2" office:value-type="float" office:value="0.000624227083863404" calcext:value-type="float">
            <text:p>6.24227E-04</text:p>
          </table:table-cell>
          <table:table-cell table:style-name="ce10" table:formula="of:=[.N14]+[.U14]" office:value-type="float" office:value="0.000886008163644957" calcext:value-type="float">
            <text:p>8.86008E-04</text:p>
          </table:table-cell>
          <table:table-cell table:style-name="ce7" table:formula="of:=ABS([.C14]-[.M14])" office:value-type="float" office:value="1.6394030539699" calcext:value-type="float">
            <text:p>1.639</text:p>
          </table:table-cell>
          <table:table-cell table:style-name="ce6" table:formula="of:=SUM([.U14:.U27])/14" office:value-type="float" office:value="0.000191780959428084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0441" calcext:value-type="float">
            <text:p>0.0441</text:p>
          </table:table-cell>
          <table:table-cell table:style-name="ce3" office:value-type="float" office:value="0.1018" calcext:value-type="float">
            <text:p>0.1018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1.68" calcext:value-type="float">
            <text:p>371.68</text:p>
          </table:table-cell>
          <table:table-cell table:style-name="ce6" table:formula="of:=EXP([.$S$8]+[.$S$9]/[.D15]+[.$S$10]*LN([.D15])+[.$S$11]*[.D15]^[.$S$12])" office:value-type="float" office:value="48.4167383055406" calcext:value-type="float">
            <text:p>48.417</text:p>
          </table:table-cell>
          <table:table-cell table:style-name="ce6" table:formula="of:=EXP([.$S$13]+[.$S$14]/[.D15]+[.$S$15]*LN([.D15])+[.$S$16]*[.D15]^[.$S$17])" office:value-type="float" office:value="98.070644852" calcext:value-type="float">
            <text:p>98.071</text:p>
          </table:table-cell>
          <table:table-cell table:style-name="ce3" table:formula="of:=[.$S$3]+[.$S$5]/[.D15]" office:value-type="float" office:value="-0.452428190403794" calcext:value-type="float">
            <text:p>-0.4524</text:p>
          </table:table-cell>
          <table:table-cell table:style-name="ce3" table:formula="of:=[.$S$4]+[.$S$6]/[.D15]" office:value-type="float" office:value="2.26413786644546" calcext:value-type="float">
            <text:p>2.2641</text:p>
          </table:table-cell>
          <table:table-cell table:style-name="ce3" table:formula="of:=EXP(-[.$S$7]*[.G15])" office:value-type="float" office:value="1.14537083407013" calcext:value-type="float">
            <text:p>1.1454</text:p>
          </table:table-cell>
          <table:table-cell table:style-name="ce3" table:formula="of:=EXP(-[.$S$7]*[.H15])" office:value-type="float" office:value="0.507001478139015" calcext:value-type="float">
            <text:p>0.5070</text:p>
          </table:table-cell>
          <table:table-cell table:style-name="ce3" table:formula="of:=EXP((1-[.A15])^2*([.H15]*([.J15]/([.A15]+(1-[.A15])*[.J15]))^2+[.G15]*([.I15]/((1-[.A15])+[.A15]*[.I15])^2)))" office:value-type="float" office:value="4.19846089308245" calcext:value-type="float">
            <text:p>4.1985</text:p>
          </table:table-cell>
          <table:table-cell table:style-name="ce3" table:formula="of:=EXP(([.A15])^2*([.G15]*([.I15]/((1-[.A15])+[.A15]*[.I15]))^2+[.H15]*([.J15]/([.A15]+(1-[.A15])*[.J15])^2)))" office:value-type="float" office:value="1.00686931422665" calcext:value-type="float">
            <text:p>1.0069</text:p>
          </table:table-cell>
          <table:table-cell table:style-name="ce6" table:formula="of:=[.A15]*[.K15]*[.E15]+(1-[.A15])*[.L15]*[.F15]" office:value-type="float" office:value="103.354160288255" calcext:value-type="float">
            <text:p>103.354</text:p>
          </table:table-cell>
          <table:table-cell table:style-name="ce10" table:formula="of:=(([.C15]-[.M15])/[.C15])^2" office:value-type="float" office:value="0.00040105088947524" calcext:value-type="float">
            <text:p>4.01051E-04</text:p>
          </table:table-cell>
          <table:table-cell table:style-name="ce11" table:formula="of:=8.314*[.D15]*([.A15]*LN([.K15])+(1-[.A15])*LN([.L15]))" office:value-type="float" office:value="215.738621141098" calcext:value-type="float">
            <text:p>215.7</text:p>
          </table:table-cell>
          <table:table-cell table:style-name="ce3" office:value-type="float" office:value="4.792" calcext:value-type="float">
            <text:p>4.7920</text:p>
          </table:table-cell>
          <table:table-cell table:style-name="ce3" office:value-type="float" office:value="0.991" calcext:value-type="float">
            <text:p>0.9910</text:p>
          </table:table-cell>
          <table:table-cell table:style-name="ce46" office:value-type="string" calcext:value-type="string">
            <text:p>E <text:s/>(Water)</text:p>
          </table:table-cell>
          <table:table-cell table:style-name="ce50" office:value-type="float" office:value="-7.3" calcext:value-type="float">
            <text:p>-7.300000</text:p>
          </table:table-cell>
          <table:table-cell table:style-name="ce3" table:formula="of:=[.P15]*[.A15]*[.E15]/[.M15]" office:value-type="float" office:value="0.0989972122138692" calcext:value-type="float">
            <text:p>0.0990</text:p>
          </table:table-cell>
          <table:table-cell table:style-name="ce10" table:formula="of:=(([.B15]-[.T15])/[.B15])^2" office:value-type="float" office:value="0.000758027351878733" calcext:value-type="float">
            <text:p>7.58027E-04</text:p>
          </table:table-cell>
          <table:table-cell table:style-name="ce10" table:formula="of:=[.N15]+[.U15]" office:value-type="float" office:value="0.00115907824135397" calcext:value-type="float">
            <text:p>1.15908E-03</text:p>
          </table:table-cell>
          <table:table-cell table:style-name="ce6" table:formula="of:=ABS([.C15]-[.M15])" office:value-type="float" office:value="2.02916028825501" calcext:value-type="float">
            <text:p>2.029</text:p>
          </table:table-cell>
          <table:table-cell table:style-name="ce6" table:formula="of:=SUM([.U15:.U28])/14" office:value-type="float" office:value="0.000147193310580698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0198" calcext:value-type="float">
            <text:p>0.0198</text:p>
          </table:table-cell>
          <table:table-cell table:style-name="ce3" office:value-type="float" office:value="0.0548" calcext:value-type="float">
            <text:p>0.0548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2.61" calcext:value-type="float">
            <text:p>372.61</text:p>
          </table:table-cell>
          <table:table-cell table:style-name="ce6" table:formula="of:=EXP([.$S$8]+[.$S$9]/[.D16]+[.$S$10]*LN([.D16])+[.$S$11]*[.D16]^[.$S$12])" office:value-type="float" office:value="50.0556094530882" calcext:value-type="float">
            <text:p>50.056</text:p>
          </table:table-cell>
          <table:table-cell table:style-name="ce6" table:formula="of:=EXP([.$S$13]+[.$S$14]/[.D16]+[.$S$15]*LN([.D16])+[.$S$16]*[.D16]^[.$S$17])" office:value-type="float" office:value="101.399550880838" calcext:value-type="float">
            <text:p>101.400</text:p>
          </table:table-cell>
          <table:table-cell table:style-name="ce3" table:formula="of:=[.$S$3]+[.$S$5]/[.D16]" office:value-type="float" office:value="-0.448545923204277" calcext:value-type="float">
            <text:p>-0.4485</text:p>
          </table:table-cell>
          <table:table-cell table:style-name="ce3" table:formula="of:=[.$S$4]+[.$S$6]/[.D16]" office:value-type="float" office:value="2.30751394238576" calcext:value-type="float">
            <text:p>2.3075</text:p>
          </table:table-cell>
          <table:table-cell table:style-name="ce3" table:formula="of:=EXP(-[.$S$7]*[.G16])" office:value-type="float" office:value="1.14403761991875" calcext:value-type="float">
            <text:p>1.1440</text:p>
          </table:table-cell>
          <table:table-cell table:style-name="ce3" table:formula="of:=EXP(-[.$S$7]*[.H16])" office:value-type="float" office:value="0.500446698342752" calcext:value-type="float">
            <text:p>0.5004</text:p>
          </table:table-cell>
          <table:table-cell table:style-name="ce3" table:formula="of:=EXP((1-[.A16])^2*([.H16]*([.J16]/([.A16]+(1-[.A16])*[.J16]))^2+[.G16]*([.I16]/((1-[.A16])+[.A16]*[.I16])^2)))" office:value-type="float" office:value="5.1639450637941" calcext:value-type="float">
            <text:p>5.1639</text:p>
          </table:table-cell>
          <table:table-cell table:style-name="ce3" table:formula="of:=EXP(([.A16])^2*([.G16]*([.I16]/((1-[.A16])+[.A16]*[.I16]))^2+[.H16]*([.J16]/([.A16]+(1-[.A16])*[.J16])^2)))" office:value-type="float" office:value="1.00151056222504" calcext:value-type="float">
            <text:p>1.0015</text:p>
          </table:table-cell>
          <table:table-cell table:style-name="ce6" table:formula="of:=[.A16]*[.K16]*[.E16]+(1-[.A16])*[.L16]*[.F16]" office:value-type="float" office:value="104.659968795576" calcext:value-type="float">
            <text:p>104.660</text:p>
          </table:table-cell>
          <table:table-cell table:style-name="ce10" table:formula="of:=(([.C16]-[.M16])/[.C16])^2" office:value-type="float" office:value="0.00108330394466435" calcext:value-type="float">
            <text:p>1.08330E-03</text:p>
          </table:table-cell>
          <table:table-cell table:style-name="ce12" table:formula="of:=8.314*[.D16]*([.A16]*LN([.K16])+(1-[.A16])*LN([.L16]))" office:value-type="float" office:value="105.282094262209" calcext:value-type="float">
            <text:p>105.3</text:p>
          </table:table-cell>
          <table:table-cell table:style-name="ce3" office:value-type="float" office:value="5.578" calcext:value-type="float">
            <text:p>5.5780</text:p>
          </table:table-cell>
          <table:table-cell table:style-name="ce3" office:value-type="float" office:value="0.983" calcext:value-type="float">
            <text:p>0.9830</text:p>
          </table:table-cell>
          <table:table-cell table:style-name="ce46" office:value-type="string" calcext:value-type="string">
            <text:p>F <text:s/>(Water)</text:p>
          </table:table-cell>
          <table:table-cell table:style-name="ce50" office:value-type="float" office:value="0.0000041653" calcext:value-type="float">
            <text:p>0.000004</text:p>
          </table:table-cell>
          <table:table-cell table:style-name="ce3" table:formula="of:=[.P16]*[.A16]*[.E16]/[.M16]" office:value-type="float" office:value="0.0528221230743796" calcext:value-type="float">
            <text:p>0.0528</text:p>
          </table:table-cell>
          <table:table-cell table:style-name="ce10" table:formula="of:=(([.B16]-[.T16])/[.B16])^2" office:value-type="float" office:value="0.00130267899625104" calcext:value-type="float">
            <text:p>1.30268E-03</text:p>
          </table:table-cell>
          <table:table-cell table:style-name="ce10" table:formula="of:=[.N16]+[.U16]" office:value-type="float" office:value="0.00238598294091539" calcext:value-type="float">
            <text:p>2.38598E-03</text:p>
          </table:table-cell>
          <table:table-cell table:style-name="ce7" table:formula="of:=ABS([.C16]-[.M16])" office:value-type="float" office:value="3.33496879557626" calcext:value-type="float">
            <text:p>3.335</text:p>
          </table:table-cell>
          <table:table-cell table:style-name="ce6" table:formula="of:=SUM([.U16:.U29])/14" office:value-type="float" office:value="0.0000930484997322172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Default"/>
          <table:table-cell table:number-columns-repeated="16"/>
          <table:table-cell table:style-name="ce47" office:value-type="string" calcext:value-type="string">
            <text:p>G <text:s/>(Water)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/>
          <table:table-cell table:style-name="ce23" table:formula="of:=SUM([.V3:.V16])" office:value-type="float" office:value="0.0163692636747872" calcext:value-type="float">
            <text:p>0.0163692636747872</text:p>
          </table:table-cell>
          <table:table-cell table:style-name="ce23" table:formula="of:=SUM([.W3:.W16])/14" office:value-type="float" office:value="1.5785575529146" calcext:value-type="float">
            <text:p>1.5785575529146</text:p>
          </table:table-cell>
          <table:table-cell table:style-name="ce23" table:formula="of:=(SUM([.X3:.X16])/14)^0.5" office:value-type="float" office:value="0.019930718826886" calcext:value-type="float">
            <text:p>0.019930718826886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number-columns-repeated="17"/>
          <table:table-cell table:style-name="ce47"/>
          <table:table-cell table:style-name="ce53"/>
          <table:table-cell table:number-columns-repeated="12"/>
          <table:table-cell table:style-name="Default" table:number-columns-repeated="16353"/>
        </table:table-row>
        <table:table-row table:style-name="ro3">
          <table:table-cell table:number-columns-repeated="17"/>
          <table:table-cell table:style-name="ce47" office:value-type="string" calcext:value-type="string">
            <text:p>a12 (Theoretical)</text:p>
          </table:table-cell>
          <table:table-cell table:style-name="ce50" office:value-type="float" office:value="1.12" calcext:value-type="float">
            <text:p>1.120000</text:p>
          </table:table-cell>
          <table:table-cell table:number-columns-repeated="12"/>
          <table:table-cell table:style-name="Default" table:number-columns-repeated="16353"/>
        </table:table-row>
        <table:table-row table:style-name="ro1">
          <table:table-cell table:number-columns-repeated="17"/>
          <table:table-cell table:style-name="ce47" office:value-type="string" calcext:value-type="string">
            <text:p>a21 (Theoretical)</text:p>
          </table:table-cell>
          <table:table-cell table:style-name="ce50" office:value-type="float" office:value="19.65" calcext:value-type="float">
            <text:p>19.650000</text:p>
          </table:table-cell>
          <table:table-cell table:number-columns-repeated="6"/>
          <table:table-cell table:style-name="ce24" office:value-type="string" calcext:value-type="string">
            <text:p>Extended Antoine Constants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G</text:p>
          </table:table-cell>
          <table:table-cell table:style-name="Default" table:number-columns-repeated="16353"/>
        </table:table-row>
        <table:table-row table:style-name="ro1">
          <table:table-cell table:number-columns-repeated="17"/>
          <table:table-cell table:style-name="ce47" office:value-type="string" calcext:value-type="string">
            <text:p>b12 (Theoretical)</text:p>
          </table:table-cell>
          <table:table-cell table:style-name="ce50" office:value-type="float" office:value="-572.56" calcext:value-type="float">
            <text:p>-572.560000</text:p>
          </table:table-cell>
          <table:table-cell table:number-columns-repeated="6"/>
          <table:table-cell table:style-name="ce25" office:value-type="string" calcext:value-type="string">
            <text:p>1-MeO-2-PrOH</text:p>
          </table:table-cell>
          <table:table-cell table:style-name="ce8" office:value-type="float" office:value="51.91" calcext:value-type="float">
            <text:p>51.91</text:p>
          </table:table-cell>
          <table:table-cell table:style-name="ce11" office:value-type="float" office:value="-6812" calcext:value-type="float">
            <text:p>-6812.0</text:p>
          </table:table-cell>
          <table:table-cell table:style-name="ce6" office:value-type="float" office:value="-5.02" calcext:value-type="float">
            <text:p>-5.020</text:p>
          </table:table-cell>
          <table:table-cell table:style-name="ce27" office:value-type="float" office:value="2.263E-018" calcext:value-type="float">
            <text:p>2.26E-18</text:p>
          </table:table-cell>
          <table:table-cell table:style-name="ce29" office:value-type="float" office:value="6" calcext:value-type="float">
            <text:p>6</text:p>
          </table:table-cell>
          <table:table-cell table:style-name="Default" table:number-columns-repeated="16353"/>
        </table:table-row>
        <table:table-row table:style-name="ro1">
          <table:table-cell table:number-columns-repeated="17"/>
          <table:table-cell table:style-name="ce47" office:value-type="string" calcext:value-type="string">
            <text:p>b21 (Theoretical)</text:p>
          </table:table-cell>
          <table:table-cell table:style-name="ce50" office:value-type="float" office:value="-6457.09" calcext:value-type="float">
            <text:p>-6457.090000</text:p>
          </table:table-cell>
          <table:table-cell table:number-columns-repeated="6"/>
          <table:table-cell table:style-name="ce25" office:value-type="string" calcext:value-type="string">
            <text:p>Water</text:p>
          </table:table-cell>
          <table:table-cell table:style-name="ce8" office:value-type="float" office:value="66.74" calcext:value-type="float">
            <text:p>66.74</text:p>
          </table:table-cell>
          <table:table-cell table:style-name="ce11" office:value-type="float" office:value="-7258.2" calcext:value-type="float">
            <text:p>-7258.2</text:p>
          </table:table-cell>
          <table:table-cell table:style-name="ce6" office:value-type="float" office:value="-7.3" calcext:value-type="float">
            <text:p>-7.300</text:p>
          </table:table-cell>
          <table:table-cell table:style-name="ce27" office:value-type="float" office:value="0.0000041653" calcext:value-type="float">
            <text:p>4.17E-06</text:p>
          </table:table-cell>
          <table:table-cell table:style-name="ce29" office:value-type="float" office:value="2" calcext:value-type="float">
            <text:p>2</text:p>
          </table:table-cell>
          <table:table-cell table:style-name="Default" table:number-columns-repeated="16353"/>
        </table:table-row>
        <table:table-row table:style-name="ro1">
          <table:table-cell table:number-columns-repeated="31"/>
          <table:table-cell table:style-name="Default" table:number-columns-repeated="16353"/>
        </table:table-row>
        <table:table-row table:style-name="ro1" table:number-rows-repeated="2">
          <table:table-cell table:number-columns-repeated="17"/>
          <table:table-cell table:style-name="ce17"/>
          <table:table-cell table:number-columns-repeated="13"/>
          <table:table-cell table:style-name="Default" table:number-columns-repeated="16353"/>
        </table:table-row>
        <table:table-row table:style-name="ro1">
          <table:table-cell table:number-columns-repeated="17"/>
          <table:table-cell table:style-name="ce17"/>
          <table:table-cell table:number-columns-repeated="3"/>
          <table:table-cell table:style-name="Default"/>
          <table:table-cell table:number-columns-repeated="9"/>
          <table:table-cell table:style-name="Default" table:number-columns-repeated="16353"/>
        </table:table-row>
        <table:table-row table:style-name="ro1">
          <table:table-cell table:number-columns-repeated="17"/>
          <table:table-cell table:style-name="ce17"/>
          <table:table-cell table:number-columns-repeated="13"/>
          <table:table-cell table:style-name="Default" table:number-columns-repeated="16353"/>
        </table:table-row>
        <table:table-row table:style-name="ro4" table:number-rows-repeated="1048548">
          <table:table-cell table:number-columns-repeated="31"/>
          <table:table-cell table:style-name="Default" table:number-columns-repeated="16353"/>
        </table:table-row>
        <table:table-row table:style-name="ro4">
          <table:table-cell table:number-columns-repeated="31"/>
          <table:table-cell table:style-name="Default" table:number-columns-repeated="16353"/>
        </table:table-row>
      </table:table>
      <table:table table:name="Sys2 2MeO1PrOH+Water" table:style-name="ta2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4" table:number-columns-repeated="2" table:default-cell-style-name="ce5"/>
        <table:table-column table:style-name="co2" table:number-columns-repeated="2" table:default-cell-style-name="ce5"/>
        <table:table-column table:style-name="co4" table:number-columns-repeated="2" table:default-cell-style-name="ce5"/>
        <table:table-column table:style-name="co3" table:default-cell-style-name="ce5"/>
        <table:table-column table:style-name="co6" table:default-cell-style-name="ce5"/>
        <table:table-column table:style-name="co5" table:visibility="collapse" table:default-cell-style-name="ce5"/>
        <table:table-column table:style-name="co3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4" table:visibility="collapse" table:default-cell-style-name="ce5"/>
        <table:table-column table:style-name="co3" table:default-cell-style-name="ce5"/>
        <table:table-column table:style-name="co9" table:default-cell-style-name="Default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8" table:default-cell-style-name="ce5"/>
        <table:table-column table:style-name="co11" table:default-cell-style-name="ce5"/>
        <table:table-column table:style-name="co9" table:number-columns-repeated="16353"/>
        <table:table-row table:style-name="ro1">
          <table:table-cell table:style-name="ce1" office:value-type="string" calcext:value-type="string" table:number-columns-spanned="24" table:number-rows-spanned="1">
            <text:p>System 2: 2-methoxy-1-propanol (2) + Water (3) | P = 101.325 kPa | NRTL MODEL</text:p>
          </table:table-cell>
          <table:covered-table-cell table:number-columns-repeated="23" table:style-name="ce1"/>
          <table:table-cell/>
          <table:table-cell>
            <draw:frame draw:z-index="0" draw:name="Chart 1" draw:style-name="gr1" draw:text-style-name="P1" svg:width="13.357cm" svg:height="9.998cm" svg:x="0.027cm" svg:y="0cm">
              <draw:object draw:notify-on-update-of-ranges="'Sys2 2MeO1PrOH+Water'.A3:'Sys2 2MeO1PrOH+Water'.A20 'Sys2 2MeO1PrOH+Water'.D3:'Sys2 2MeO1PrOH+Water'.D20 'Sys2 2MeO1PrOH+Water'.B3:'Sys2 2MeO1PrOH+Water'.B20 'Sys2 2MeO1PrOH+Water'.D3:'Sys2 2MeO1PrOH+Water'.D20 'Sys2 2MeO1PrOH+Water'.T3:'Sys2 2MeO1PrOH+Water'.T20 'Sys2 2MeO1PrOH+Water'.D3:'Sys2 2MeO1PrOH+Water'.D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table:style-name="Default" table:number-columns-repeated="16353"/>
        </table:table-row>
        <table:table-row table:style-name="ro5">
          <table:table-cell table:style-name="ce24" office:value-type="string" calcext:value-type="string">
            <text:p>x1</text:p>
          </table:table-cell>
          <table:table-cell table:style-name="ce24" office:value-type="string" calcext:value-type="string">
            <text:p>y1 (exp)</text:p>
          </table:table-cell>
          <table:table-cell table:style-name="ce24" office:value-type="string" calcext:value-type="string">
            <text:p>P(exp) [kPa]</text:p>
          </table:table-cell>
          <table:table-cell table:style-name="ce24" office:value-type="string" calcext:value-type="string">
            <text:p>T(exp) [K]</text:p>
          </table:table-cell>
          <table:table-cell table:style-name="ce24" office:value-type="string" calcext:value-type="string">
            <text:p>P1sat (2-MeO-1-PrOH)</text:p>
          </table:table-cell>
          <table:table-cell table:style-name="ce24" office:value-type="string" calcext:value-type="string">
            <text:p>P2sat (Water)</text:p>
          </table:table-cell>
          <table:table-cell table:style-name="ce24" office:value-type="string" calcext:value-type="string">
            <text:p>Tau12</text:p>
          </table:table-cell>
          <table:table-cell table:style-name="ce24" office:value-type="string" calcext:value-type="string">
            <text:p>Tau21</text:p>
          </table:table-cell>
          <table:table-cell table:style-name="ce24" office:value-type="string" calcext:value-type="string">
            <text:p>G12</text:p>
          </table:table-cell>
          <table:table-cell table:style-name="ce24" office:value-type="string" calcext:value-type="string">
            <text:p>G21</text:p>
          </table:table-cell>
          <table:table-cell table:style-name="ce24" office:value-type="string" calcext:value-type="string">
            <text:p>Gamma1</text:p>
          </table:table-cell>
          <table:table-cell table:style-name="ce24" office:value-type="string" calcext:value-type="string">
            <text:p>Gamma2</text:p>
          </table:table-cell>
          <table:table-cell table:style-name="ce24" office:value-type="string" calcext:value-type="string">
            <text:p>P(calc)</text:p>
          </table:table-cell>
          <table:table-cell table:style-name="ce24" office:value-type="string" calcext:value-type="string">
            <text:p>((Pexp-Pcalc)/Pexp)^2)</text:p>
          </table:table-cell>
          <table:table-cell table:style-name="ce24" office:value-type="string" calcext:value-type="string">
            <text:p>Gibbs Energy</text:p>
          </table:table-cell>
          <table:table-cell table:style-name="ce24" office:value-type="string" calcext:value-type="string">
            <text:p>Gamma1(exp)</text:p>
          </table:table-cell>
          <table:table-cell table:style-name="ce24" office:value-type="string" calcext:value-type="string">
            <text:p>Gamma2(exp)</text:p>
          </table:table-cell>
          <table:table-cell table:style-name="ce24" office:value-type="string" calcext:value-type="string">
            <text:p>Parameter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y1(calc)</text:p>
          </table:table-cell>
          <table:table-cell table:style-name="ce34" office:value-type="string" calcext:value-type="string">
            <text:p>((yexp-ycalc)/yexp)^2)</text:p>
          </table:table-cell>
          <table:table-cell table:style-name="ce24" office:value-type="string" calcext:value-type="string">
            <text:p>ERROR</text:p>
          </table:table-cell>
          <table:table-cell table:style-name="ce24" office:value-type="string" calcext:value-type="string">
            <text:p>CAD</text:p>
          </table:table-cell>
          <table:table-cell table:style-name="ce24" office:value-type="string" calcext:value-type="string">
            <text:p>(RMSDz)^2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9612" calcext:value-type="float">
            <text:p>0.9612</text:p>
          </table:table-cell>
          <table:table-cell table:style-name="ce3" office:value-type="float" office:value="0.8345" calcext:value-type="float">
            <text:p>0.8345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8.27" calcext:value-type="float">
            <text:p>398.27</text:p>
          </table:table-cell>
          <table:table-cell table:style-name="ce6" table:formula="of:=EXP([.$S$8]+[.$S$9]/[.D3]+[.$S$10]*LN([.D3])+[.$S$11]*[.D3]^[.$S$12])" office:value-type="float" office:value="88.0568634252159" calcext:value-type="float">
            <text:p>88.057</text:p>
          </table:table-cell>
          <table:table-cell table:style-name="ce6" table:formula="of:=EXP([.$S$13]+[.$S$14]/[.D3]+[.$S$15]*LN([.D3])+[.$S$16]*[.D3]^[.$S$17])" office:value-type="float" office:value="237.537447676318" calcext:value-type="float">
            <text:p>237.537</text:p>
          </table:table-cell>
          <table:table-cell table:style-name="ce3" table:formula="of:=[.$S$3]+[.$S$5]/[.D3]" office:value-type="float" office:value="-0.401544986283367" calcext:value-type="float">
            <text:p>-0.4015</text:p>
          </table:table-cell>
          <table:table-cell table:style-name="ce3" table:formula="of:=[.$S$4]+[.$S$6]/[.D3]" office:value-type="float" office:value="3.1085283287833" calcext:value-type="float">
            <text:p>3.1085</text:p>
          </table:table-cell>
          <table:table-cell table:style-name="ce3" table:formula="of:=EXP(-[.$S$7]*[.G3])" office:value-type="float" office:value="1.12801956285835" calcext:value-type="float">
            <text:p>1.1280</text:p>
          </table:table-cell>
          <table:table-cell table:style-name="ce3" table:formula="of:=EXP(-[.$S$7]*[.H3])" office:value-type="float" office:value="0.393545535499155" calcext:value-type="float">
            <text:p>0.3935</text:p>
          </table:table-cell>
          <table:table-cell table:style-name="ce3" table:formula="of:=EXP((1-[.A3])^2*([.H3]*([.J3]/([.A3]+(1-[.A3])*[.J3]))^2+[.G3]*([.I3]/((1-[.A3])+[.A3]*[.I3])^2)))" office:value-type="float" office:value="1.00021951171557" calcext:value-type="float">
            <text:p>1.0002</text:p>
          </table:table-cell>
          <table:table-cell table:style-name="ce3" table:formula="of:=EXP(([.A3])^2*([.G3]*([.I3]/((1-[.A3])+[.A3]*[.I3]))^2+[.H3]*([.J3]/([.A3]+(1-[.A3])*[.J3])^2)))" office:value-type="float" office:value="2.25039955605608" calcext:value-type="float">
            <text:p>2.2504</text:p>
          </table:table-cell>
          <table:table-cell table:style-name="ce6" table:formula="of:=[.A3]*[.K3]*[.E3]+(1-[.A3])*[.L3]*[.F3]" office:value-type="float" office:value="105.399538324108" calcext:value-type="float">
            <text:p>105.400</text:p>
          </table:table-cell>
          <table:table-cell table:style-name="ce10" table:formula="of:=(([.C3]-[.M3])/[.C3])^2" office:value-type="float" office:value="0.00161705052316577" calcext:value-type="float">
            <text:p>1.61705E-03</text:p>
          </table:table-cell>
          <table:table-cell table:style-name="ce11" table:formula="of:=8.314*[.D3]*([.A3]*LN([.K3])+(1-[.A3])*LN([.L3]))" office:value-type="float" office:value="104.905815741782" calcext:value-type="float">
            <text:p>104.9</text:p>
          </table:table-cell>
          <table:table-cell table:style-name="ce3" office:value-type="float" office:value="0.991" calcext:value-type="float">
            <text:p>0.9910</text:p>
          </table:table-cell>
          <table:table-cell table:style-name="ce3" office:value-type="float" office:value="1.916" calcext:value-type="float">
            <text:p>1.9160</text:p>
          </table:table-cell>
          <table:table-cell table:style-name="ce31" office:value-type="string" calcext:value-type="string">
            <text:p>a12 (Minimized)</text:p>
          </table:table-cell>
          <table:table-cell table:style-name="ce18" office:value-type="float" office:value="3.67944277079307" calcext:value-type="float">
            <text:p>3.679443</text:p>
          </table:table-cell>
          <table:table-cell table:style-name="ce3" table:formula="of:=[.P3]*[.A3]*[.E3]/[.M3]" office:value-type="float" office:value="0.795814632055305" calcext:value-type="float">
            <text:p>0.7958</text:p>
          </table:table-cell>
          <table:table-cell table:style-name="ce10" table:formula="of:=(([.B3]-[.T3])/[.B3])^2" office:value-type="float" office:value="0.00214902160536635" calcext:value-type="float">
            <text:p>2.14902E-03</text:p>
          </table:table-cell>
          <table:table-cell table:style-name="ce10" table:formula="of:=[.N3]+[.U3]" office:value-type="float" office:value="0.00376607212853212" calcext:value-type="float">
            <text:p>3.76607E-03</text:p>
          </table:table-cell>
          <table:table-cell table:style-name="ce6" table:formula="of:=ABS([.C3]-[.M3])" office:value-type="float" office:value="4.07453832410799" calcext:value-type="float">
            <text:p>4.075</text:p>
          </table:table-cell>
          <table:table-cell table:style-name="ce6" table:formula="of:=SUM([.U3:.U20])/18" office:value-type="float" office:value="0.00123375442960834" calcext:value-type="float">
            <text:p>0.001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8625" calcext:value-type="float">
            <text:p>0.8625</text:p>
          </table:table-cell>
          <table:table-cell table:style-name="ce3" office:value-type="float" office:value="0.5646" calcext:value-type="float">
            <text:p>0.5646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89" calcext:value-type="float">
            <text:p>389.00</text:p>
          </table:table-cell>
          <table:table-cell table:style-name="ce6" table:formula="of:=EXP([.$S$8]+[.$S$9]/[.D4]+[.$S$10]*LN([.D4])+[.$S$11]*[.D4]^[.$S$12])" office:value-type="float" office:value="65.2230009098328" calcext:value-type="float">
            <text:p>65.223</text:p>
          </table:table-cell>
          <table:table-cell table:style-name="ce6" table:formula="of:=EXP([.$S$13]+[.$S$14]/[.D4]+[.$S$15]*LN([.D4])+[.$S$16]*[.D4]^[.$S$17])" office:value-type="float" office:value="177.249142516258" calcext:value-type="float">
            <text:p>177.249</text:p>
          </table:table-cell>
          <table:table-cell table:style-name="ce3" table:formula="of:=[.$S$3]+[.$S$5]/[.D4]" office:value-type="float" office:value="-0.498796288360741" calcext:value-type="float">
            <text:p>-0.4988</text:p>
          </table:table-cell>
          <table:table-cell table:style-name="ce3" table:formula="of:=[.$S$4]+[.$S$6]/[.D4]" office:value-type="float" office:value="2.90123239427141" calcext:value-type="float">
            <text:p>2.9012</text:p>
          </table:table-cell>
          <table:table-cell table:style-name="ce3" table:formula="of:=EXP(-[.$S$7]*[.G4])" office:value-type="float" office:value="1.16141476445222" calcext:value-type="float">
            <text:p>1.1614</text:p>
          </table:table-cell>
          <table:table-cell table:style-name="ce3" table:formula="of:=EXP(-[.$S$7]*[.H4])" office:value-type="float" office:value="0.418796683830904" calcext:value-type="float">
            <text:p>0.4188</text:p>
          </table:table-cell>
          <table:table-cell table:style-name="ce3" table:formula="of:=EXP((1-[.A4])^2*([.H4]*([.J4]/([.A4]+(1-[.A4])*[.J4]))^2+[.G4]*([.I4]/((1-[.A4])+[.A4]*[.I4])^2)))" office:value-type="float" office:value="1.00292929691918" calcext:value-type="float">
            <text:p>1.0029</text:p>
          </table:table-cell>
          <table:table-cell table:style-name="ce3" table:formula="of:=EXP(([.A4])^2*([.G4]*([.I4]/((1-[.A4])+[.A4]*[.I4]))^2+[.H4]*([.J4]/([.A4]+(1-[.A4])*[.J4])^2)))" office:value-type="float" office:value="1.97791168724035" calcext:value-type="float">
            <text:p>1.9779</text:p>
          </table:table-cell>
          <table:table-cell table:style-name="ce6" table:formula="of:=[.A4]*[.K4]*[.E4]+(1-[.A4])*[.L4]*[.F4]" office:value-type="float" office:value="104.624808607939" calcext:value-type="float">
            <text:p>104.625</text:p>
          </table:table-cell>
          <table:table-cell table:style-name="ce10" table:formula="of:=(([.C4]-[.M4])/[.C4])^2" office:value-type="float" office:value="0.00106058206182648" calcext:value-type="float">
            <text:p>1.06058E-03</text:p>
          </table:table-cell>
          <table:table-cell table:style-name="ce12" table:formula="of:=8.314*[.D4]*([.A4]*LN([.K4])+(1-[.A4])*LN([.L4]))" office:value-type="float" office:value="311.459719150079" calcext:value-type="float">
            <text:p>311.5</text:p>
          </table:table-cell>
          <table:table-cell table:style-name="ce3" office:value-type="float" office:value="1.005" calcext:value-type="float">
            <text:p>1.0050</text:p>
          </table:table-cell>
          <table:table-cell table:style-name="ce3" office:value-type="float" office:value="1.881" calcext:value-type="float">
            <text:p>1.8810</text:p>
          </table:table-cell>
          <table:table-cell table:style-name="ce31" office:value-type="string" calcext:value-type="string">
            <text:p>a21 (Minimized)</text:p>
          </table:table-cell>
          <table:table-cell table:style-name="ce18" office:value-type="float" office:value="11.8073544911484" calcext:value-type="float">
            <text:p>11.807354</text:p>
          </table:table-cell>
          <table:table-cell table:style-name="ce3" table:formula="of:=[.P4]*[.A4]*[.E4]/[.M4]" office:value-type="float" office:value="0.54037004443193" calcext:value-type="float">
            <text:p>0.5404</text:p>
          </table:table-cell>
          <table:table-cell table:style-name="ce10" table:formula="of:=(([.B4]-[.T4])/[.B4])^2" office:value-type="float" office:value="0.00184171950621766" calcext:value-type="float">
            <text:p>1.84172E-03</text:p>
          </table:table-cell>
          <table:table-cell table:style-name="ce10" table:formula="of:=[.N4]+[.U4]" office:value-type="float" office:value="0.00290230156804414" calcext:value-type="float">
            <text:p>2.90230E-03</text:p>
          </table:table-cell>
          <table:table-cell table:style-name="ce7" table:formula="of:=ABS([.C4]-[.M4])" office:value-type="float" office:value="3.299808607939" calcext:value-type="float">
            <text:p>3.300</text:p>
          </table:table-cell>
          <table:table-cell table:style-name="ce6" table:formula="of:=SUM([.U4:.U21])/18" office:value-type="float" office:value="0.00111436434042132" calcext:value-type="float">
            <text:p>0.001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7936" calcext:value-type="float">
            <text:p>0.7936</text:p>
          </table:table-cell>
          <table:table-cell table:style-name="ce3" office:value-type="float" office:value="0.4398" calcext:value-type="float">
            <text:p>0.4398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84.2" calcext:value-type="float">
            <text:p>384.20</text:p>
          </table:table-cell>
          <table:table-cell table:style-name="ce6" table:formula="of:=EXP([.$S$8]+[.$S$9]/[.D5]+[.$S$10]*LN([.D5])+[.$S$11]*[.D5]^[.$S$12])" office:value-type="float" office:value="55.4845159740152" calcext:value-type="float">
            <text:p>55.485</text:p>
          </table:table-cell>
          <table:table-cell table:style-name="ce6" table:formula="of:=EXP([.$S$13]+[.$S$14]/[.D5]+[.$S$15]*LN([.D5])+[.$S$16]*[.D5]^[.$S$17])" office:value-type="float" office:value="151.354330136549" calcext:value-type="float">
            <text:p>151.354</text:p>
          </table:table-cell>
          <table:table-cell table:style-name="ce3" table:formula="of:=[.$S$3]+[.$S$5]/[.D5]" office:value-type="float" office:value="-0.55099708868333" calcext:value-type="float">
            <text:p>-0.5510</text:p>
          </table:table-cell>
          <table:table-cell table:style-name="ce3" table:formula="of:=[.$S$4]+[.$S$6]/[.D5]" office:value-type="float" office:value="2.78996382044265" calcext:value-type="float">
            <text:p>2.7900</text:p>
          </table:table-cell>
          <table:table-cell table:style-name="ce3" table:formula="of:=EXP(-[.$S$7]*[.G5])" office:value-type="float" office:value="1.17974595934033" calcext:value-type="float">
            <text:p>1.1797</text:p>
          </table:table-cell>
          <table:table-cell table:style-name="ce3" table:formula="of:=EXP(-[.$S$7]*[.H5])" office:value-type="float" office:value="0.433012299473369" calcext:value-type="float">
            <text:p>0.4330</text:p>
          </table:table-cell>
          <table:table-cell table:style-name="ce3" table:formula="of:=EXP((1-[.A5])^2*([.H5]*([.J5]/([.A5]+(1-[.A5])*[.J5]))^2+[.G5]*([.I5]/((1-[.A5])+[.A5]*[.I5])^2)))" office:value-type="float" office:value="1.00740159816978" calcext:value-type="float">
            <text:p>1.0074</text:p>
          </table:table-cell>
          <table:table-cell table:style-name="ce3" table:formula="of:=EXP(([.A5])^2*([.G5]*([.I5]/((1-[.A5])+[.A5]*[.I5]))^2+[.H5]*([.J5]/([.A5]+(1-[.A5])*[.J5])^2)))" office:value-type="float" office:value="1.8330557482615" calcext:value-type="float">
            <text:p>1.8331</text:p>
          </table:table-cell>
          <table:table-cell table:style-name="ce6" table:formula="of:=[.A5]*[.K5]*[.E5]+(1-[.A5])*[.L5]*[.F5]" office:value-type="float" office:value="101.622229731751" calcext:value-type="float">
            <text:p>101.622</text:p>
          </table:table-cell>
          <table:table-cell table:style-name="ce10" table:formula="of:=(([.C5]-[.M5])/[.C5])^2" office:value-type="float" office:value="0.00000860500791716326" calcext:value-type="float">
            <text:p>8.60501E-06</text:p>
          </table:table-cell>
          <table:table-cell table:style-name="ce11" table:formula="of:=8.314*[.D5]*([.A5]*LN([.K5])+(1-[.A5])*LN([.L5]))" office:value-type="float" office:value="418.213551266705" calcext:value-type="float">
            <text:p>418.2</text:p>
          </table:table-cell>
          <table:table-cell table:style-name="ce3" office:value-type="float" office:value="1" calcext:value-type="float">
            <text:p>1.0000</text:p>
          </table:table-cell>
          <table:table-cell table:style-name="ce3" office:value-type="float" office:value="1.877" calcext:value-type="float">
            <text:p>1.8770</text:p>
          </table:table-cell>
          <table:table-cell table:style-name="ce31" office:value-type="string" calcext:value-type="string">
            <text:p>b12 (Minimized)</text:p>
          </table:table-cell>
          <table:table-cell table:style-name="ce18" office:value-type="float" office:value="-1625.33499401083" calcext:value-type="float">
            <text:p>-1625.334994</text:p>
          </table:table-cell>
          <table:table-cell table:style-name="ce3" table:formula="of:=[.P5]*[.A5]*[.E5]/[.M5]" office:value-type="float" office:value="0.433296061237878" calcext:value-type="float">
            <text:p>0.4333</text:p>
          </table:table-cell>
          <table:table-cell table:style-name="ce10" table:formula="of:=(([.B5]-[.T5])/[.B5])^2" office:value-type="float" office:value="0.000218696804292954" calcext:value-type="float">
            <text:p>2.18697E-04</text:p>
          </table:table-cell>
          <table:table-cell table:style-name="ce10" table:formula="of:=[.N5]+[.U5]" office:value-type="float" office:value="0.000227301812210118" calcext:value-type="float">
            <text:p>2.27302E-04</text:p>
          </table:table-cell>
          <table:table-cell table:style-name="ce6" table:formula="of:=ABS([.C5]-[.M5])" office:value-type="float" office:value="0.297229731751003" calcext:value-type="float">
            <text:p>0.297</text:p>
          </table:table-cell>
          <table:table-cell table:style-name="ce6" table:formula="of:=SUM([.U5:.U22])/18" office:value-type="float" office:value="0.00101204659007589" calcext:value-type="float">
            <text:p>0.001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7219" calcext:value-type="float">
            <text:p>0.7219</text:p>
          </table:table-cell>
          <table:table-cell table:style-name="ce3" office:value-type="float" office:value="0.3528" calcext:value-type="float">
            <text:p>0.3528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9.96" calcext:value-type="float">
            <text:p>379.96</text:p>
          </table:table-cell>
          <table:table-cell table:style-name="ce6" table:formula="of:=EXP([.$S$8]+[.$S$9]/[.D6]+[.$S$10]*LN([.D6])+[.$S$11]*[.D6]^[.$S$12])" office:value-type="float" office:value="47.9174626435187" calcext:value-type="float">
            <text:p>47.917</text:p>
          </table:table-cell>
          <table:table-cell table:style-name="ce6" table:formula="of:=EXP([.$S$13]+[.$S$14]/[.D6]+[.$S$15]*LN([.D6])+[.$S$16]*[.D6]^[.$S$17])" office:value-type="float" office:value="131.147665905103" calcext:value-type="float">
            <text:p>131.148</text:p>
          </table:table-cell>
          <table:table-cell table:style-name="ce3" table:formula="of:=[.$S$3]+[.$S$5]/[.D6]" office:value-type="float" office:value="-0.598204860565054" calcext:value-type="float">
            <text:p>-0.5982</text:p>
          </table:table-cell>
          <table:table-cell table:style-name="ce3" table:formula="of:=[.$S$4]+[.$S$6]/[.D6]" office:value-type="float" office:value="2.68933813236024" calcext:value-type="float">
            <text:p>2.6893</text:p>
          </table:table-cell>
          <table:table-cell table:style-name="ce3" table:formula="of:=EXP(-[.$S$7]*[.G6])" office:value-type="float" office:value="1.19657278507329" calcext:value-type="float">
            <text:p>1.1966</text:p>
          </table:table-cell>
          <table:table-cell table:style-name="ce3" table:formula="of:=EXP(-[.$S$7]*[.H6])" office:value-type="float" office:value="0.446283249621558" calcext:value-type="float">
            <text:p>0.4463</text:p>
          </table:table-cell>
          <table:table-cell table:style-name="ce3" table:formula="of:=EXP((1-[.A6])^2*([.H6]*([.J6]/([.A6]+(1-[.A6])*[.J6]))^2+[.G6]*([.I6]/((1-[.A6])+[.A6]*[.I6])^2)))" office:value-type="float" office:value="1.01554275105722" calcext:value-type="float">
            <text:p>1.0155</text:p>
          </table:table-cell>
          <table:table-cell table:style-name="ce3" table:formula="of:=EXP(([.A6])^2*([.G6]*([.I6]/((1-[.A6])+[.A6]*[.I6]))^2+[.H6]*([.J6]/([.A6]+(1-[.A6])*[.J6])^2)))" office:value-type="float" office:value="1.7016191097301" calcext:value-type="float">
            <text:p>1.7016</text:p>
          </table:table-cell>
          <table:table-cell table:style-name="ce6" table:formula="of:=[.A6]*[.K6]*[.E6]+(1-[.A6])*[.L6]*[.F6]" office:value-type="float" office:value="97.1909996115227" calcext:value-type="float">
            <text:p>97.191</text:p>
          </table:table-cell>
          <table:table-cell table:style-name="ce10" table:formula="of:=(([.C6]-[.M6])/[.C6])^2" office:value-type="float" office:value="0.00166459199343515" calcext:value-type="float">
            <text:p>1.66459E-03</text:p>
          </table:table-cell>
          <table:table-cell table:style-name="ce12" table:formula="of:=8.314*[.D6]*([.A6]*LN([.K6])+(1-[.A6])*LN([.L6]))" office:value-type="float" office:value="502.173068598117" calcext:value-type="float">
            <text:p>502.2</text:p>
          </table:table-cell>
          <table:table-cell table:style-name="ce3" office:value-type="float" office:value="1.022" calcext:value-type="float">
            <text:p>1.0220</text:p>
          </table:table-cell>
          <table:table-cell table:style-name="ce3" office:value-type="float" office:value="1.849" calcext:value-type="float">
            <text:p>1.8490</text:p>
          </table:table-cell>
          <table:table-cell table:style-name="ce31" office:value-type="string" calcext:value-type="string">
            <text:p>b21 (Minimized)</text:p>
          </table:table-cell>
          <table:table-cell table:style-name="ce18" office:value-type="float" office:value="-3464.48149568516" calcext:value-type="float">
            <text:p>-3464.481496</text:p>
          </table:table-cell>
          <table:table-cell table:style-name="ce3" table:formula="of:=[.P6]*[.A6]*[.E6]/[.M6]" office:value-type="float" office:value="0.363743885564242" calcext:value-type="float">
            <text:p>0.3637</text:p>
          </table:table-cell>
          <table:table-cell table:style-name="ce10" table:formula="of:=(([.B6]-[.T6])/[.B6])^2" office:value-type="float" office:value="0.000962245598888961" calcext:value-type="float">
            <text:p>9.62246E-04</text:p>
          </table:table-cell>
          <table:table-cell table:style-name="ce10" table:formula="of:=[.N6]+[.U6]" office:value-type="float" office:value="0.00262683759232411" calcext:value-type="float">
            <text:p>2.62684E-03</text:p>
          </table:table-cell>
          <table:table-cell table:style-name="ce7" table:formula="of:=ABS([.C6]-[.M6])" office:value-type="float" office:value="4.1340003884773" calcext:value-type="float">
            <text:p>4.134</text:p>
          </table:table-cell>
          <table:table-cell table:style-name="ce6" table:formula="of:=SUM([.U6:.U23])/18" office:value-type="float" office:value="0.000999896767615171" calcext:value-type="float">
            <text:p>0.001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6694" calcext:value-type="float">
            <text:p>0.6694</text:p>
          </table:table-cell>
          <table:table-cell table:style-name="ce3" office:value-type="float" office:value="0.3146" calcext:value-type="float">
            <text:p>0.3146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7.61" calcext:value-type="float">
            <text:p>377.61</text:p>
          </table:table-cell>
          <table:table-cell table:style-name="ce6" table:formula="of:=EXP([.$S$8]+[.$S$9]/[.D7]+[.$S$10]*LN([.D7])+[.$S$11]*[.D7]^[.$S$12])" office:value-type="float" office:value="44.1074665443157" calcext:value-type="float">
            <text:p>44.107</text:p>
          </table:table-cell>
          <table:table-cell table:style-name="ce6" table:formula="of:=EXP([.$S$13]+[.$S$14]/[.D7]+[.$S$15]*LN([.D7])+[.$S$16]*[.D7]^[.$S$17])" office:value-type="float" office:value="120.942635149971" calcext:value-type="float">
            <text:p>120.943</text:p>
          </table:table-cell>
          <table:table-cell table:style-name="ce3" table:formula="of:=[.$S$3]+[.$S$5]/[.D7]" office:value-type="float" office:value="-0.624826168087872" calcext:value-type="float">
            <text:p>-0.6248</text:p>
          </table:table-cell>
          <table:table-cell table:style-name="ce3" table:formula="of:=[.$S$4]+[.$S$6]/[.D7]" office:value-type="float" office:value="2.6325935057795" calcext:value-type="float">
            <text:p>2.6326</text:p>
          </table:table-cell>
          <table:table-cell table:style-name="ce3" table:formula="of:=EXP(-[.$S$7]*[.G7])" office:value-type="float" office:value="1.20616734666795" calcext:value-type="float">
            <text:p>1.2062</text:p>
          </table:table-cell>
          <table:table-cell table:style-name="ce3" table:formula="of:=EXP(-[.$S$7]*[.H7])" office:value-type="float" office:value="0.453945536527029" calcext:value-type="float">
            <text:p>0.4539</text:p>
          </table:table-cell>
          <table:table-cell table:style-name="ce3" table:formula="of:=EXP((1-[.A7])^2*([.H7]*([.J7]/([.A7]+(1-[.A7])*[.J7]))^2+[.G7]*([.I7]/((1-[.A7])+[.A7]*[.I7])^2)))" office:value-type="float" office:value="1.02499672394038" calcext:value-type="float">
            <text:p>1.0250</text:p>
          </table:table-cell>
          <table:table-cell table:style-name="ce3" table:formula="of:=EXP(([.A7])^2*([.G7]*([.I7]/((1-[.A7])+[.A7]*[.I7]))^2+[.H7]*([.J7]/([.A7]+(1-[.A7])*[.J7])^2)))" office:value-type="float" office:value="1.62076333269874" calcext:value-type="float">
            <text:p>1.6208</text:p>
          </table:table-cell>
          <table:table-cell table:style-name="ce6" table:formula="of:=[.A7]*[.K7]*[.E7]+(1-[.A7])*[.L7]*[.F7]" office:value-type="float" office:value="95.0675896386492" calcext:value-type="float">
            <text:p>95.068</text:p>
          </table:table-cell>
          <table:table-cell table:style-name="ce10" table:formula="of:=(([.C7]-[.M7])/[.C7])^2" office:value-type="float" office:value="0.00381378361972457" calcext:value-type="float">
            <text:p>3.81378E-03</text:p>
          </table:table-cell>
          <table:table-cell table:style-name="ce11" table:formula="of:=8.314*[.D7]*([.A7]*LN([.K7])+(1-[.A7])*LN([.L7]))" office:value-type="float" office:value="553.085992726493" calcext:value-type="float">
            <text:p>553.1</text:p>
          </table:table-cell>
          <table:table-cell table:style-name="ce3" office:value-type="float" office:value="1.067" calcext:value-type="float">
            <text:p>1.0670</text:p>
          </table:table-cell>
          <table:table-cell table:style-name="ce3" office:value-type="float" office:value="1.783" calcext:value-type="float">
            <text:p>1.7830</text:p>
          </table:table-cell>
          <table:table-cell table:style-name="ce61" office:value-type="string" calcext:value-type="string">
            <text:p>alpha (fixed)</text:p>
          </table:table-cell>
          <table:table-cell table:style-name="ce62" office:value-type="float" office:value="0.3" calcext:value-type="float">
            <text:p>0.300000</text:p>
          </table:table-cell>
          <table:table-cell table:style-name="ce3" table:formula="of:=[.P7]*[.A7]*[.E7]/[.M7]" office:value-type="float" office:value="0.331382643417483" calcext:value-type="float">
            <text:p>0.3314</text:p>
          </table:table-cell>
          <table:table-cell table:style-name="ce10" table:formula="of:=(([.B7]-[.T7])/[.B7])^2" office:value-type="float" office:value="0.00284579294101958" calcext:value-type="float">
            <text:p>2.84579E-03</text:p>
          </table:table-cell>
          <table:table-cell table:style-name="ce10" table:formula="of:=[.N7]+[.U7]" office:value-type="float" office:value="0.00665957656074415" calcext:value-type="float">
            <text:p>6.65958E-03</text:p>
          </table:table-cell>
          <table:table-cell table:style-name="ce6" table:formula="of:=ABS([.C7]-[.M7])" office:value-type="float" office:value="6.25741036135081" calcext:value-type="float">
            <text:p>6.257</text:p>
          </table:table-cell>
          <table:table-cell table:style-name="ce6" table:formula="of:=SUM([.U7:.U24])/18" office:value-type="float" office:value="0.000946438678788007" calcext:value-type="float">
            <text:p>0.001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6275" calcext:value-type="float">
            <text:p>0.6275</text:p>
          </table:table-cell>
          <table:table-cell table:style-name="ce3" office:value-type="float" office:value="0.2822" calcext:value-type="float">
            <text:p>0.2822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6.26" calcext:value-type="float">
            <text:p>376.26</text:p>
          </table:table-cell>
          <table:table-cell table:style-name="ce6" table:formula="of:=EXP([.$S$8]+[.$S$9]/[.D8]+[.$S$10]*LN([.D8])+[.$S$11]*[.D8]^[.$S$12])" office:value-type="float" office:value="42.035280544095" calcext:value-type="float">
            <text:p>42.035</text:p>
          </table:table-cell>
          <table:table-cell table:style-name="ce6" table:formula="of:=EXP([.$S$13]+[.$S$14]/[.D8]+[.$S$15]*LN([.D8])+[.$S$16]*[.D8]^[.$S$17])" office:value-type="float" office:value="115.382990880247" calcext:value-type="float">
            <text:p>115.383</text:p>
          </table:table-cell>
          <table:table-cell table:style-name="ce3" table:formula="of:=[.$S$3]+[.$S$5]/[.D8]" office:value-type="float" office:value="-0.64026964618145" calcext:value-type="float">
            <text:p>-0.6403</text:p>
          </table:table-cell>
          <table:table-cell table:style-name="ce3" table:formula="of:=[.$S$4]+[.$S$6]/[.D8]" office:value-type="float" office:value="2.59967497250398" calcext:value-type="float">
            <text:p>2.5997</text:p>
          </table:table-cell>
          <table:table-cell table:style-name="ce3" table:formula="of:=EXP(-[.$S$7]*[.G8])" office:value-type="float" office:value="1.2117685376279" calcext:value-type="float">
            <text:p>1.2118</text:p>
          </table:table-cell>
          <table:table-cell table:style-name="ce3" table:formula="of:=EXP(-[.$S$7]*[.H8])" office:value-type="float" office:value="0.458450711851929" calcext:value-type="float">
            <text:p>0.4585</text:p>
          </table:table-cell>
          <table:table-cell table:style-name="ce3" table:formula="of:=EXP((1-[.A8])^2*([.H8]*([.J8]/([.A8]+(1-[.A8])*[.J8]))^2+[.G8]*([.I8]/((1-[.A8])+[.A8]*[.I8])^2)))" office:value-type="float" office:value="1.03571660303191" calcext:value-type="float">
            <text:p>1.0357</text:p>
          </table:table-cell>
          <table:table-cell table:style-name="ce3" table:formula="of:=EXP(([.A8])^2*([.G8]*([.I8]/((1-[.A8])+[.A8]*[.I8]))^2+[.H8]*([.J8]/([.A8]+(1-[.A8])*[.J8])^2)))" office:value-type="float" office:value="1.56517325915109" calcext:value-type="float">
            <text:p>1.5652</text:p>
          </table:table-cell>
          <table:table-cell table:style-name="ce6" table:formula="of:=[.A8]*[.K8]*[.E8]+(1-[.A8])*[.L8]*[.F8]" office:value-type="float" office:value="94.5906438555934" calcext:value-type="float">
            <text:p>94.591</text:p>
          </table:table-cell>
          <table:table-cell table:style-name="ce10" table:formula="of:=(([.C8]-[.M8])/[.C8])^2" office:value-type="float" office:value="0.00441732075216386" calcext:value-type="float">
            <text:p>4.41732E-03</text:p>
          </table:table-cell>
          <table:table-cell table:style-name="ce12" table:formula="of:=8.314*[.D8]*([.A8]*LN([.K8])+(1-[.A8])*LN([.L8]))" office:value-type="float" office:value="590.921552205576" calcext:value-type="float">
            <text:p>590.9</text:p>
          </table:table-cell>
          <table:table-cell table:style-name="ce3" office:value-type="float" office:value="1.072" calcext:value-type="float">
            <text:p>1.0720</text:p>
          </table:table-cell>
          <table:table-cell table:style-name="ce3" office:value-type="float" office:value="1.735" calcext:value-type="float">
            <text:p>1.7350</text:p>
          </table:table-cell>
          <table:table-cell table:style-name="ce61" office:value-type="string" calcext:value-type="string">
            <text:p>A <text:s/>(2-MeO-1-PrOH)</text:p>
          </table:table-cell>
          <table:table-cell table:style-name="ce62" office:value-type="float" office:value="58.47" calcext:value-type="float">
            <text:p>58.470000</text:p>
          </table:table-cell>
          <table:table-cell table:style-name="ce3" table:formula="of:=[.P8]*[.A8]*[.E8]/[.M8]" office:value-type="float" office:value="0.298933291537478" calcext:value-type="float">
            <text:p>0.2989</text:p>
          </table:table-cell>
          <table:table-cell table:style-name="ce10" table:formula="of:=(([.B8]-[.T8])/[.B8])^2" office:value-type="float" office:value="0.00351599894820328" calcext:value-type="float">
            <text:p>3.51600E-03</text:p>
          </table:table-cell>
          <table:table-cell table:style-name="ce10" table:formula="of:=[.N8]+[.U8]" office:value-type="float" office:value="0.00793331970036714" calcext:value-type="float">
            <text:p>7.93332E-03</text:p>
          </table:table-cell>
          <table:table-cell table:style-name="ce7" table:formula="of:=ABS([.C8]-[.M8])" office:value-type="float" office:value="6.7343561444066" calcext:value-type="float">
            <text:p>6.734</text:p>
          </table:table-cell>
          <table:table-cell table:style-name="ce6" table:formula="of:=SUM([.U8:.U25])/18" office:value-type="float" office:value="0.000788339070953586" calcext:value-type="float">
            <text:p>0.001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5659" calcext:value-type="float">
            <text:p>0.5659</text:p>
          </table:table-cell>
          <table:table-cell table:style-name="ce3" office:value-type="float" office:value="0.2588" calcext:value-type="float">
            <text:p>0.2588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5.6" calcext:value-type="float">
            <text:p>375.60</text:p>
          </table:table-cell>
          <table:table-cell table:style-name="ce6" table:formula="of:=EXP([.$S$8]+[.$S$9]/[.D9]+[.$S$10]*LN([.D9])+[.$S$11]*[.D9]^[.$S$12])" office:value-type="float" office:value="41.0521309322853" calcext:value-type="float">
            <text:p>41.052</text:p>
          </table:table-cell>
          <table:table-cell table:style-name="ce6" table:formula="of:=EXP([.$S$13]+[.$S$14]/[.D9]+[.$S$15]*LN([.D9])+[.$S$16]*[.D9]^[.$S$17])" office:value-type="float" office:value="112.742830785398" calcext:value-type="float">
            <text:p>112.743</text:p>
          </table:table-cell>
          <table:table-cell table:style-name="ce3" table:formula="of:=[.$S$3]+[.$S$5]/[.D9]" office:value-type="float" office:value="-0.647860195156963" calcext:value-type="float">
            <text:p>-0.6479</text:p>
          </table:table-cell>
          <table:table-cell table:style-name="ce3" table:formula="of:=[.$S$4]+[.$S$6]/[.D9]" office:value-type="float" office:value="2.58349534395684" calcext:value-type="float">
            <text:p>2.5835</text:p>
          </table:table-cell>
          <table:table-cell table:style-name="ce3" table:formula="of:=EXP(-[.$S$7]*[.G9])" office:value-type="float" office:value="1.21453107834379" calcext:value-type="float">
            <text:p>1.2145</text:p>
          </table:table-cell>
          <table:table-cell table:style-name="ce3" table:formula="of:=EXP(-[.$S$7]*[.H9])" office:value-type="float" office:value="0.460681389871067" calcext:value-type="float">
            <text:p>0.4607</text:p>
          </table:table-cell>
          <table:table-cell table:style-name="ce3" table:formula="of:=EXP((1-[.A9])^2*([.H9]*([.J9]/([.A9]+(1-[.A9])*[.J9]))^2+[.G9]*([.I9]/((1-[.A9])+[.A9]*[.I9])^2)))" office:value-type="float" office:value="1.05996315946789" calcext:value-type="float">
            <text:p>1.0600</text:p>
          </table:table-cell>
          <table:table-cell table:style-name="ce3" table:formula="of:=EXP(([.A9])^2*([.G9]*([.I9]/((1-[.A9])+[.A9]*[.I9]))^2+[.H9]*([.J9]/([.A9]+(1-[.A9])*[.J9])^2)))" office:value-type="float" office:value="1.50142393731192" calcext:value-type="float">
            <text:p>1.5014</text:p>
          </table:table-cell>
          <table:table-cell table:style-name="ce6" table:formula="of:=[.A9]*[.K9]*[.E9]+(1-[.A9])*[.L9]*[.F9]" office:value-type="float" office:value="98.1066132168271" calcext:value-type="float">
            <text:p>98.107</text:p>
          </table:table-cell>
          <table:table-cell table:style-name="ce10" table:formula="of:=(([.C9]-[.M9])/[.C9])^2" office:value-type="float" office:value="0.00100888867568639" calcext:value-type="float">
            <text:p>1.00889E-03</text:p>
          </table:table-cell>
          <table:table-cell table:style-name="ce11" table:formula="of:=8.314*[.D9]*([.A9]*LN([.K9])+(1-[.A9])*LN([.L9]))" office:value-type="float" office:value="653.835850333309" calcext:value-type="float">
            <text:p>653.8</text:p>
          </table:table-cell>
          <table:table-cell table:style-name="ce3" office:value-type="float" office:value="1.117" calcext:value-type="float">
            <text:p>1.1170</text:p>
          </table:table-cell>
          <table:table-cell table:style-name="ce3" office:value-type="float" office:value="1.572" calcext:value-type="float">
            <text:p>1.5720</text:p>
          </table:table-cell>
          <table:table-cell table:style-name="ce61" office:value-type="string" calcext:value-type="string">
            <text:p>B <text:s/>(2-MeO-1-PrOH)</text:p>
          </table:table-cell>
          <table:table-cell table:style-name="ce62" office:value-type="float" office:value="-7185.1" calcext:value-type="float">
            <text:p>-7185.100000</text:p>
          </table:table-cell>
          <table:table-cell table:style-name="ce3" table:formula="of:=[.P9]*[.A9]*[.E9]/[.M9]" office:value-type="float" office:value="0.264502809223419" calcext:value-type="float">
            <text:p>0.2645</text:p>
          </table:table-cell>
          <table:table-cell table:style-name="ce10" table:formula="of:=(([.B9]-[.T9])/[.B9])^2" office:value-type="float" office:value="0.000485566976562706" calcext:value-type="float">
            <text:p>4.85567E-04</text:p>
          </table:table-cell>
          <table:table-cell table:style-name="ce10" table:formula="of:=[.N9]+[.U9]" office:value-type="float" office:value="0.00149445565224909" calcext:value-type="float">
            <text:p>1.49446E-03</text:p>
          </table:table-cell>
          <table:table-cell table:style-name="ce6" table:formula="of:=ABS([.C9]-[.M9])" office:value-type="float" office:value="3.2183867831729" calcext:value-type="float">
            <text:p>3.218</text:p>
          </table:table-cell>
          <table:table-cell table:style-name="ce6" table:formula="of:=SUM([.U9:.U26])/18" office:value-type="float" office:value="0.000593005796053404" calcext:value-type="float">
            <text:p>0.001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5117" calcext:value-type="float">
            <text:p>0.5117</text:p>
          </table:table-cell>
          <table:table-cell table:style-name="ce3" office:value-type="float" office:value="0.2399" calcext:value-type="float">
            <text:p>0.2399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5.18" calcext:value-type="float">
            <text:p>375.18</text:p>
          </table:table-cell>
          <table:table-cell table:style-name="ce6" table:formula="of:=EXP([.$S$8]+[.$S$9]/[.D10]+[.$S$10]*LN([.D10])+[.$S$11]*[.D10]^[.$S$12])" office:value-type="float" office:value="40.4365277779999" calcext:value-type="float">
            <text:p>40.437</text:p>
          </table:table-cell>
          <table:table-cell table:style-name="ce6" table:formula="of:=EXP([.$S$13]+[.$S$14]/[.D10]+[.$S$15]*LN([.D10])+[.$S$16]*[.D10]^[.$S$17])" office:value-type="float" office:value="111.088885680739" calcext:value-type="float">
            <text:p>111.089</text:p>
          </table:table-cell>
          <table:table-cell table:style-name="ce3" table:formula="of:=[.$S$3]+[.$S$5]/[.D10]" office:value-type="float" office:value="-0.652704449236869" calcext:value-type="float">
            <text:p>-0.6527</text:p>
          </table:table-cell>
          <table:table-cell table:style-name="ce3" table:formula="of:=[.$S$4]+[.$S$6]/[.D10]" office:value-type="float" office:value="2.57316957807961" calcext:value-type="float">
            <text:p>2.5732</text:p>
          </table:table-cell>
          <table:table-cell table:style-name="ce3" table:formula="of:=EXP(-[.$S$7]*[.G10])" office:value-type="float" office:value="1.21629741065672" calcext:value-type="float">
            <text:p>1.2163</text:p>
          </table:table-cell>
          <table:table-cell table:style-name="ce3" table:formula="of:=EXP(-[.$S$7]*[.H10])" office:value-type="float" office:value="0.462110668941028" calcext:value-type="float">
            <text:p>0.4621</text:p>
          </table:table-cell>
          <table:table-cell table:style-name="ce3" table:formula="of:=EXP((1-[.A10])^2*([.H10]*([.J10]/([.A10]+(1-[.A10])*[.J10]))^2+[.G10]*([.I10]/((1-[.A10])+[.A10]*[.I10])^2)))" office:value-type="float" office:value="1.09148489282878" calcext:value-type="float">
            <text:p>1.0915</text:p>
          </table:table-cell>
          <table:table-cell table:style-name="ce3" table:formula="of:=EXP(([.A10])^2*([.G10]*([.I10]/((1-[.A10])+[.A10]*[.I10]))^2+[.H10]*([.J10]/([.A10]+(1-[.A10])*[.J10])^2)))" office:value-type="float" office:value="1.4444269805678" calcext:value-type="float">
            <text:p>1.4444</text:p>
          </table:table-cell>
          <table:table-cell table:style-name="ce6" table:formula="of:=[.A10]*[.K10]*[.E10]+(1-[.A10])*[.L10]*[.F10]" office:value-type="float" office:value="100.9368315363" calcext:value-type="float">
            <text:p>100.937</text:p>
          </table:table-cell>
          <table:table-cell table:style-name="ce10" table:formula="of:=(([.C10]-[.M10])/[.C10])^2" office:value-type="float" office:value="0.0000146759854538724" calcext:value-type="float">
            <text:p>1.46760E-05</text:p>
          </table:table-cell>
          <table:table-cell table:style-name="ce12" table:formula="of:=8.314*[.D10]*([.A10]*LN([.K10])+(1-[.A10])*LN([.L10]))" office:value-type="float" office:value="699.796223589037" calcext:value-type="float">
            <text:p>699.8</text:p>
          </table:table-cell>
          <table:table-cell table:style-name="ce3" office:value-type="float" office:value="1.164" calcext:value-type="float">
            <text:p>1.1640</text:p>
          </table:table-cell>
          <table:table-cell table:style-name="ce3" office:value-type="float" office:value="1.453" calcext:value-type="float">
            <text:p>1.4530</text:p>
          </table:table-cell>
          <table:table-cell table:style-name="ce61" office:value-type="string" calcext:value-type="string">
            <text:p>E <text:s/>(2-MeO-1-PrOH)</text:p>
          </table:table-cell>
          <table:table-cell table:style-name="ce62" office:value-type="float" office:value="-6.02" calcext:value-type="float">
            <text:p>-6.020000</text:p>
          </table:table-cell>
          <table:table-cell table:style-name="ce3" table:formula="of:=[.P10]*[.A10]*[.E10]/[.M10]" office:value-type="float" office:value="0.2386121674786" calcext:value-type="float">
            <text:p>0.2386</text:p>
          </table:table-cell>
          <table:table-cell table:style-name="ce10" table:formula="of:=(([.B10]-[.T10])/[.B10])^2" office:value-type="float" office:value="0.00002881763127256" calcext:value-type="float">
            <text:p>2.88176E-05</text:p>
          </table:table-cell>
          <table:table-cell table:style-name="ce10" table:formula="of:=[.N10]+[.U10]" office:value-type="float" office:value="0.0000434936167264324" calcext:value-type="float">
            <text:p>4.34936E-05</text:p>
          </table:table-cell>
          <table:table-cell table:style-name="ce7" table:formula="of:=ABS([.C10]-[.M10])" office:value-type="float" office:value="0.388168463699998" calcext:value-type="float">
            <text:p>0.388</text:p>
          </table:table-cell>
          <table:table-cell table:style-name="ce6" table:formula="of:=SUM([.U10:.U27])/18" office:value-type="float" office:value="0.000566029852911031" calcext:value-type="float">
            <text:p>0.001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4237" calcext:value-type="float">
            <text:p>0.4237</text:p>
          </table:table-cell>
          <table:table-cell table:style-name="ce3" office:value-type="float" office:value="0.1901" calcext:value-type="float">
            <text:p>0.1901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4.1" calcext:value-type="float">
            <text:p>374.10</text:p>
          </table:table-cell>
          <table:table-cell table:style-name="ce6" table:formula="of:=EXP([.$S$8]+[.$S$9]/[.D11]+[.$S$10]*LN([.D11])+[.$S$11]*[.D11]^[.$S$12])" office:value-type="float" office:value="38.8887937903883" calcext:value-type="float">
            <text:p>38.889</text:p>
          </table:table-cell>
          <table:table-cell table:style-name="ce6" table:formula="of:=EXP([.$S$13]+[.$S$14]/[.D11]+[.$S$15]*LN([.D11])+[.$S$16]*[.D11]^[.$S$17])" office:value-type="float" office:value="106.927810959735" calcext:value-type="float">
            <text:p>106.928</text:p>
          </table:table-cell>
          <table:table-cell table:style-name="ce3" table:formula="of:=[.$S$3]+[.$S$5]/[.D11]" office:value-type="float" office:value="-0.665211049070155" calcext:value-type="float">
            <text:p>-0.6652</text:p>
          </table:table-cell>
          <table:table-cell table:style-name="ce3" table:formula="of:=[.$S$4]+[.$S$6]/[.D11]" office:value-type="float" office:value="2.54651114529127" calcext:value-type="float">
            <text:p>2.5465</text:p>
          </table:table-cell>
          <table:table-cell table:style-name="ce3" table:formula="of:=EXP(-[.$S$7]*[.G11])" office:value-type="float" office:value="1.22086950599617" calcext:value-type="float">
            <text:p>1.2209</text:p>
          </table:table-cell>
          <table:table-cell table:style-name="ce3" table:formula="of:=EXP(-[.$S$7]*[.H11])" office:value-type="float" office:value="0.465821230690377" calcext:value-type="float">
            <text:p>0.4658</text:p>
          </table:table-cell>
          <table:table-cell table:style-name="ce3" table:formula="of:=EXP((1-[.A11])^2*([.H11]*([.J11]/([.A11]+(1-[.A11])*[.J11]))^2+[.G11]*([.I11]/((1-[.A11])+[.A11]*[.I11])^2)))" office:value-type="float" office:value="1.17061556616621" calcext:value-type="float">
            <text:p>1.1706</text:p>
          </table:table-cell>
          <table:table-cell table:style-name="ce3" table:formula="of:=EXP(([.A11])^2*([.G11]*([.I11]/((1-[.A11])+[.A11]*[.I11]))^2+[.H11]*([.J11]/([.A11]+(1-[.A11])*[.J11])^2)))" office:value-type="float" office:value="1.34402509791321" calcext:value-type="float">
            <text:p>1.3440</text:p>
          </table:table-cell>
          <table:table-cell table:style-name="ce6" table:formula="of:=[.A11]*[.K11]*[.E11]+(1-[.A11])*[.L11]*[.F11]" office:value-type="float" office:value="102.11062882971" calcext:value-type="float">
            <text:p>102.111</text:p>
          </table:table-cell>
          <table:table-cell table:style-name="ce10" table:formula="of:=(([.C11]-[.M11])/[.C11])^2" office:value-type="float" office:value="0.0000601175951406801" calcext:value-type="float">
            <text:p>6.01176E-05</text:p>
          </table:table-cell>
          <table:table-cell table:style-name="ce11" table:formula="of:=8.314*[.D11]*([.A11]*LN([.K11])+(1-[.A11])*LN([.L11]))" office:value-type="float" office:value="737.566774492159" calcext:value-type="float">
            <text:p>737.6</text:p>
          </table:table-cell>
          <table:table-cell table:style-name="ce3" office:value-type="float" office:value="1.16" calcext:value-type="float">
            <text:p>1.1600</text:p>
          </table:table-cell>
          <table:table-cell table:style-name="ce3" office:value-type="float" office:value="1.362" calcext:value-type="float">
            <text:p>1.3620</text:p>
          </table:table-cell>
          <table:table-cell table:style-name="ce61" office:value-type="string" calcext:value-type="string">
            <text:p>F <text:s/>(2-MeO-1-PrOH)</text:p>
          </table:table-cell>
          <table:table-cell table:style-name="ce62" office:value-type="float" office:value="2.2873E-017" calcext:value-type="float">
            <text:p>0.000000</text:p>
          </table:table-cell>
          <table:table-cell table:style-name="ce3" table:formula="of:=[.P11]*[.A11]*[.E11]/[.M11]" office:value-type="float" office:value="0.187184539520377" calcext:value-type="float">
            <text:p>0.1872</text:p>
          </table:table-cell>
          <table:table-cell table:style-name="ce10" table:formula="of:=(([.B11]-[.T11])/[.B11])^2" office:value-type="float" office:value="0.000235206913945762" calcext:value-type="float">
            <text:p>2.35207E-04</text:p>
          </table:table-cell>
          <table:table-cell table:style-name="ce10" table:formula="of:=[.N11]+[.U11]" office:value-type="float" office:value="0.000295324509086442" calcext:value-type="float">
            <text:p>2.95325E-04</text:p>
          </table:table-cell>
          <table:table-cell table:style-name="ce6" table:formula="of:=ABS([.C11]-[.M11])" office:value-type="float" office:value="0.785628829709992" calcext:value-type="float">
            <text:p>0.786</text:p>
          </table:table-cell>
          <table:table-cell table:style-name="ce6" table:formula="of:=SUM([.U11:.U28])/18" office:value-type="float" office:value="0.000564428873395889" calcext:value-type="float">
            <text:p>0.001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3887" calcext:value-type="float">
            <text:p>0.3887</text:p>
          </table:table-cell>
          <table:table-cell table:style-name="ce3" office:value-type="float" office:value="0.1699" calcext:value-type="float">
            <text:p>0.1699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3.99" calcext:value-type="float">
            <text:p>373.99</text:p>
          </table:table-cell>
          <table:table-cell table:style-name="ce6" table:formula="of:=EXP([.$S$8]+[.$S$9]/[.D12]+[.$S$10]*LN([.D12])+[.$S$11]*[.D12]^[.$S$12])" office:value-type="float" office:value="38.7339661883692" calcext:value-type="float">
            <text:p>38.734</text:p>
          </table:table-cell>
          <table:table-cell table:style-name="ce6" table:formula="of:=EXP([.$S$13]+[.$S$14]/[.D12]+[.$S$15]*LN([.D12])+[.$S$16]*[.D12]^[.$S$17])" office:value-type="float" office:value="106.511336706508" calcext:value-type="float">
            <text:p>106.511</text:p>
          </table:table-cell>
          <table:table-cell table:style-name="ce3" table:formula="of:=[.$S$3]+[.$S$5]/[.D12]" office:value-type="float" office:value="-0.66648892259668" calcext:value-type="float">
            <text:p>-0.6665</text:p>
          </table:table-cell>
          <table:table-cell table:style-name="ce3" table:formula="of:=[.$S$4]+[.$S$6]/[.D12]" office:value-type="float" office:value="2.54378729500639" calcext:value-type="float">
            <text:p>2.5438</text:p>
          </table:table-cell>
          <table:table-cell table:style-name="ce3" table:formula="of:=EXP(-[.$S$7]*[.G12])" office:value-type="float" office:value="1.22133763076739" calcext:value-type="float">
            <text:p>1.2213</text:p>
          </table:table-cell>
          <table:table-cell table:style-name="ce3" table:formula="of:=EXP(-[.$S$7]*[.H12])" office:value-type="float" office:value="0.466202034444625" calcext:value-type="float">
            <text:p>0.4662</text:p>
          </table:table-cell>
          <table:table-cell table:style-name="ce3" table:formula="of:=EXP((1-[.A12])^2*([.H12]*([.J12]/([.A12]+(1-[.A12])*[.J12]))^2+[.G12]*([.I12]/((1-[.A12])+[.A12]*[.I12])^2)))" office:value-type="float" office:value="1.21813078730928" calcext:value-type="float">
            <text:p>1.2181</text:p>
          </table:table-cell>
          <table:table-cell table:style-name="ce3" table:formula="of:=EXP(([.A12])^2*([.G12]*([.I12]/((1-[.A12])+[.A12]*[.I12]))^2+[.H12]*([.J12]/([.A12]+(1-[.A12])*[.J12])^2)))" office:value-type="float" office:value="1.30661058843053" calcext:value-type="float">
            <text:p>1.3066</text:p>
          </table:table-cell>
          <table:table-cell table:style-name="ce6" table:formula="of:=[.A12]*[.K12]*[.E12]+(1-[.A12])*[.L12]*[.F12]" office:value-type="float" office:value="103.413958469307" calcext:value-type="float">
            <text:p>103.414</text:p>
          </table:table-cell>
          <table:table-cell table:style-name="ce10" table:formula="of:=(([.C12]-[.M12])/[.C12])^2" office:value-type="float" office:value="0.000425036656747271" calcext:value-type="float">
            <text:p>4.25037E-04</text:p>
          </table:table-cell>
          <table:table-cell table:style-name="ce12" table:formula="of:=8.314*[.D12]*([.A12]*LN([.K12])+(1-[.A12])*LN([.L12]))" office:value-type="float" office:value="746.808190842205" calcext:value-type="float">
            <text:p>746.8</text:p>
          </table:table-cell>
          <table:table-cell table:style-name="ce3" office:value-type="float" office:value="1.136" calcext:value-type="float">
            <text:p>1.1360</text:p>
          </table:table-cell>
          <table:table-cell table:style-name="ce3" office:value-type="float" office:value="1.32" calcext:value-type="float">
            <text:p>1.3200</text:p>
          </table:table-cell>
          <table:table-cell table:style-name="ce61" office:value-type="string" calcext:value-type="string">
            <text:p>G <text:s/>(2-MeO-1-PrOH)</text:p>
          </table:table-cell>
          <table:table-cell table:style-name="ce63" office:value-type="float" office:value="6" calcext:value-type="float">
            <text:p>6.0000</text:p>
          </table:table-cell>
          <table:table-cell table:style-name="ce3" table:formula="of:=[.P12]*[.A12]*[.E12]/[.M12]" office:value-type="float" office:value="0.165388641069226" calcext:value-type="float">
            <text:p>0.1654</text:p>
          </table:table-cell>
          <table:table-cell table:style-name="ce10" table:formula="of:=(([.B12]-[.T12])/[.B12])^2" office:value-type="float" office:value="0.000705063131422619" calcext:value-type="float">
            <text:p>7.05063E-04</text:p>
          </table:table-cell>
          <table:table-cell table:style-name="ce10" table:formula="of:=[.N12]+[.U12]" office:value-type="float" office:value="0.00113009978816989" calcext:value-type="float">
            <text:p>1.13010E-03</text:p>
          </table:table-cell>
          <table:table-cell table:style-name="ce7" table:formula="of:=ABS([.C12]-[.M12])" office:value-type="float" office:value="2.088958469307" calcext:value-type="float">
            <text:p>2.089</text:p>
          </table:table-cell>
          <table:table-cell table:style-name="ce6" table:formula="of:=SUM([.U12:.U29])/18" office:value-type="float" office:value="0.000551361822621124" calcext:value-type="float">
            <text:p>0.001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3062" calcext:value-type="float">
            <text:p>0.3062</text:p>
          </table:table-cell>
          <table:table-cell table:style-name="ce3" office:value-type="float" office:value="0.1464" calcext:value-type="float">
            <text:p>0.1464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3.63" calcext:value-type="float">
            <text:p>373.63</text:p>
          </table:table-cell>
          <table:table-cell table:style-name="ce6" table:formula="of:=EXP([.$S$8]+[.$S$9]/[.D13]+[.$S$10]*LN([.D13])+[.$S$11]*[.D13]^[.$S$12])" office:value-type="float" office:value="38.2308480192178" calcext:value-type="float">
            <text:p>38.231</text:p>
          </table:table-cell>
          <table:table-cell table:style-name="ce6" table:formula="of:=EXP([.$S$13]+[.$S$14]/[.D13]+[.$S$15]*LN([.D13])+[.$S$16]*[.D13]^[.$S$17])" office:value-type="float" office:value="105.157706279494" calcext:value-type="float">
            <text:p>105.158</text:p>
          </table:table-cell>
          <table:table-cell table:style-name="ce3" table:formula="of:=[.$S$3]+[.$S$5]/[.D13]" office:value-type="float" office:value="-0.670676314962444" calcext:value-type="float">
            <text:p>-0.6707</text:p>
          </table:table-cell>
          <table:table-cell table:style-name="ce3" table:formula="of:=[.$S$4]+[.$S$6]/[.D13]" office:value-type="float" office:value="2.53486166218619" calcext:value-type="float">
            <text:p>2.5349</text:p>
          </table:table-cell>
          <table:table-cell table:style-name="ce3" table:formula="of:=EXP(-[.$S$7]*[.G13])" office:value-type="float" office:value="1.22287286081841" calcext:value-type="float">
            <text:p>1.2229</text:p>
          </table:table-cell>
          <table:table-cell table:style-name="ce3" table:formula="of:=EXP(-[.$S$7]*[.H13])" office:value-type="float" office:value="0.46745205173088" calcext:value-type="float">
            <text:p>0.4675</text:p>
          </table:table-cell>
          <table:table-cell table:style-name="ce3" table:formula="of:=EXP((1-[.A13])^2*([.H13]*([.J13]/([.A13]+(1-[.A13])*[.J13]))^2+[.G13]*([.I13]/((1-[.A13])+[.A13]*[.I13])^2)))" office:value-type="float" office:value="1.38361803474441" calcext:value-type="float">
            <text:p>1.3836</text:p>
          </table:table-cell>
          <table:table-cell table:style-name="ce3" table:formula="of:=EXP(([.A13])^2*([.G13]*([.I13]/((1-[.A13])+[.A13]*[.I13]))^2+[.H13]*([.J13]/([.A13]+(1-[.A13])*[.J13])^2)))" office:value-type="float" office:value="1.21780254591856" calcext:value-type="float">
            <text:p>1.2178</text:p>
          </table:table-cell>
          <table:table-cell table:style-name="ce6" table:formula="of:=[.A13]*[.K13]*[.E13]+(1-[.A13])*[.L13]*[.F13]" office:value-type="float" office:value="105.045973465888" calcext:value-type="float">
            <text:p>105.046</text:p>
          </table:table-cell>
          <table:table-cell table:style-name="ce10" table:formula="of:=(([.C13]-[.M13])/[.C13])^2" office:value-type="float" office:value="0.00134858995768091" calcext:value-type="float">
            <text:p>1.34859E-03</text:p>
          </table:table-cell>
          <table:table-cell table:style-name="ce11" table:formula="of:=8.314*[.D13]*([.A13]*LN([.K13])+(1-[.A13])*LN([.L13]))" office:value-type="float" office:value="733.522243156239" calcext:value-type="float">
            <text:p>733.5</text:p>
          </table:table-cell>
          <table:table-cell table:style-name="ce3" office:value-type="float" office:value="1.26" calcext:value-type="float">
            <text:p>1.2600</text:p>
          </table:table-cell>
          <table:table-cell table:style-name="ce3" office:value-type="float" office:value="1.211" calcext:value-type="float">
            <text:p>1.2110</text:p>
          </table:table-cell>
          <table:table-cell table:style-name="ce61" office:value-type="string" calcext:value-type="string">
            <text:p>A <text:s/>(Water)</text:p>
          </table:table-cell>
          <table:table-cell table:style-name="ce62" office:value-type="float" office:value="66.74" calcext:value-type="float">
            <text:p>66.740000</text:p>
          </table:table-cell>
          <table:table-cell table:style-name="ce3" table:formula="of:=[.P13]*[.A13]*[.E13]/[.M13]" office:value-type="float" office:value="0.140413948762923" calcext:value-type="float">
            <text:p>0.1404</text:p>
          </table:table-cell>
          <table:table-cell table:style-name="ce10" table:formula="of:=(([.B13]-[.T13])/[.B13])^2" office:value-type="float" office:value="0.00167185537662158" calcext:value-type="float">
            <text:p>1.67186E-03</text:p>
          </table:table-cell>
          <table:table-cell table:style-name="ce10" table:formula="of:=[.N13]+[.U13]" office:value-type="float" office:value="0.00302044533430249" calcext:value-type="float">
            <text:p>3.02045E-03</text:p>
          </table:table-cell>
          <table:table-cell table:style-name="ce6" table:formula="of:=ABS([.C13]-[.M13])" office:value-type="float" office:value="3.72097346588799" calcext:value-type="float">
            <text:p>3.721</text:p>
          </table:table-cell>
          <table:table-cell table:style-name="ce6" table:formula="of:=SUM([.U13:.U30])/18" office:value-type="float" office:value="0.000512191648653201" calcext:value-type="float">
            <text:p>0.001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2795" calcext:value-type="float">
            <text:p>0.2795</text:p>
          </table:table-cell>
          <table:table-cell table:style-name="ce3" office:value-type="float" office:value="0.1383" calcext:value-type="float">
            <text:p>0.1383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3.42" calcext:value-type="float">
            <text:p>373.42</text:p>
          </table:table-cell>
          <table:table-cell table:style-name="ce6" table:formula="of:=EXP([.$S$8]+[.$S$9]/[.D14]+[.$S$10]*LN([.D14])+[.$S$11]*[.D14]^[.$S$12])" office:value-type="float" office:value="37.9398887277817" calcext:value-type="float">
            <text:p>37.940</text:p>
          </table:table-cell>
          <table:table-cell table:style-name="ce6" table:formula="of:=EXP([.$S$13]+[.$S$14]/[.D14]+[.$S$15]*LN([.D14])+[.$S$16]*[.D14]^[.$S$17])" office:value-type="float" office:value="104.374687790195" calcext:value-type="float">
            <text:p>104.375</text:p>
          </table:table-cell>
          <table:table-cell table:style-name="ce3" table:formula="of:=[.$S$3]+[.$S$5]/[.D14]" office:value-type="float" office:value="-0.673122689039913" calcext:value-type="float">
            <text:p>-0.6731</text:p>
          </table:table-cell>
          <table:table-cell table:style-name="ce3" table:formula="of:=[.$S$4]+[.$S$6]/[.D14]" office:value-type="float" office:value="2.52964709549431" calcext:value-type="float">
            <text:p>2.5296</text:p>
          </table:table-cell>
          <table:table-cell table:style-name="ce3" table:formula="of:=EXP(-[.$S$7]*[.G14])" office:value-type="float" office:value="1.22377067157528" calcext:value-type="float">
            <text:p>1.2238</text:p>
          </table:table-cell>
          <table:table-cell table:style-name="ce3" table:formula="of:=EXP(-[.$S$7]*[.H14])" office:value-type="float" office:value="0.468183891985805" calcext:value-type="float">
            <text:p>0.4682</text:p>
          </table:table-cell>
          <table:table-cell table:style-name="ce3" table:formula="of:=EXP((1-[.A14])^2*([.H14]*([.J14]/([.A14]+(1-[.A14])*[.J14]))^2+[.G14]*([.I14]/((1-[.A14])+[.A14]*[.I14])^2)))" office:value-type="float" office:value="1.45904375798046" calcext:value-type="float">
            <text:p>1.4590</text:p>
          </table:table-cell>
          <table:table-cell table:style-name="ce3" table:formula="of:=EXP(([.A14])^2*([.G14]*([.I14]/((1-[.A14])+[.A14]*[.I14]))^2+[.H14]*([.J14]/([.A14]+(1-[.A14])*[.J14])^2)))" office:value-type="float" office:value="1.18936438297026" calcext:value-type="float">
            <text:p>1.1894</text:p>
          </table:table-cell>
          <table:table-cell table:style-name="ce6" table:formula="of:=[.A14]*[.K14]*[.E14]+(1-[.A14])*[.L14]*[.F14]" office:value-type="float" office:value="104.914526002381" calcext:value-type="float">
            <text:p>104.915</text:p>
          </table:table-cell>
          <table:table-cell table:style-name="ce10" table:formula="of:=(([.C14]-[.M14])/[.C14])^2" office:value-type="float" office:value="0.00125499207270423" calcext:value-type="float">
            <text:p>1.25499E-03</text:p>
          </table:table-cell>
          <table:table-cell table:style-name="ce12" table:formula="of:=8.314*[.D14]*([.A14]*LN([.K14])+(1-[.A14])*LN([.L14]))" office:value-type="float" office:value="715.732329368755" calcext:value-type="float">
            <text:p>715.7</text:p>
          </table:table-cell>
          <table:table-cell table:style-name="ce3" office:value-type="float" office:value="1.315" calcext:value-type="float">
            <text:p>1.3150</text:p>
          </table:table-cell>
          <table:table-cell table:style-name="ce3" office:value-type="float" office:value="1.186" calcext:value-type="float">
            <text:p>1.1860</text:p>
          </table:table-cell>
          <table:table-cell table:style-name="ce61" office:value-type="string" calcext:value-type="string">
            <text:p>B <text:s/>(Water)</text:p>
          </table:table-cell>
          <table:table-cell table:style-name="ce62" office:value-type="float" office:value="-7258.2" calcext:value-type="float">
            <text:p>-7258.200000</text:p>
          </table:table-cell>
          <table:table-cell table:style-name="ce3" table:formula="of:=[.P14]*[.A14]*[.E14]/[.M14]" office:value-type="float" office:value="0.132913163544334" calcext:value-type="float">
            <text:p>0.1329</text:p>
          </table:table-cell>
          <table:table-cell table:style-name="ce10" table:formula="of:=(([.B14]-[.T14])/[.B14])^2" office:value-type="float" office:value="0.00151713148348176" calcext:value-type="float">
            <text:p>1.51713E-03</text:p>
          </table:table-cell>
          <table:table-cell table:style-name="ce10" table:formula="of:=[.N14]+[.U14]" office:value-type="float" office:value="0.00277212355618598" calcext:value-type="float">
            <text:p>2.77212E-03</text:p>
          </table:table-cell>
          <table:table-cell table:style-name="ce7" table:formula="of:=ABS([.C14]-[.M14])" office:value-type="float" office:value="3.58952600238099" calcext:value-type="float">
            <text:p>3.590</text:p>
          </table:table-cell>
          <table:table-cell table:style-name="ce6" table:formula="of:=SUM([.U14:.U31])/18" office:value-type="float" office:value="0.000419310794396446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2506" calcext:value-type="float">
            <text:p>0.2506</text:p>
          </table:table-cell>
          <table:table-cell table:style-name="ce3" office:value-type="float" office:value="0.129" calcext:value-type="float">
            <text:p>0.1290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3.21" calcext:value-type="float">
            <text:p>373.21</text:p>
          </table:table-cell>
          <table:table-cell table:style-name="ce6" table:formula="of:=EXP([.$S$8]+[.$S$9]/[.D15]+[.$S$10]*LN([.D15])+[.$S$11]*[.D15]^[.$S$12])" office:value-type="float" office:value="37.6507794134836" calcext:value-type="float">
            <text:p>37.651</text:p>
          </table:table-cell>
          <table:table-cell table:style-name="ce6" table:formula="of:=EXP([.$S$13]+[.$S$14]/[.D15]+[.$S$15]*LN([.D15])+[.$S$16]*[.D15]^[.$S$17])" office:value-type="float" office:value="103.596503339638" calcext:value-type="float">
            <text:p>103.597</text:p>
          </table:table-cell>
          <table:table-cell table:style-name="ce3" table:formula="of:=[.$S$3]+[.$S$5]/[.D15]" office:value-type="float" office:value="-0.67557181619772" calcext:value-type="float">
            <text:p>-0.6756</text:p>
          </table:table-cell>
          <table:table-cell table:style-name="ce3" table:formula="of:=[.$S$4]+[.$S$6]/[.D15]" office:value-type="float" office:value="2.52442666047626" calcext:value-type="float">
            <text:p>2.5244</text:p>
          </table:table-cell>
          <table:table-cell table:style-name="ce3" table:formula="of:=EXP(-[.$S$7]*[.G15])" office:value-type="float" office:value="1.22467015297247" calcext:value-type="float">
            <text:p>1.2247</text:p>
          </table:table-cell>
          <table:table-cell table:style-name="ce3" table:formula="of:=EXP(-[.$S$7]*[.H15])" office:value-type="float" office:value="0.468917703533524" calcext:value-type="float">
            <text:p>0.4689</text:p>
          </table:table-cell>
          <table:table-cell table:style-name="ce3" table:formula="of:=EXP((1-[.A15])^2*([.H15]*([.J15]/([.A15]+(1-[.A15])*[.J15]))^2+[.G15]*([.I15]/((1-[.A15])+[.A15]*[.I15])^2)))" office:value-type="float" office:value="1.55851394275184" calcext:value-type="float">
            <text:p>1.5585</text:p>
          </table:table-cell>
          <table:table-cell table:style-name="ce3" table:formula="of:=EXP(([.A15])^2*([.G15]*([.I15]/((1-[.A15])+[.A15]*[.I15]))^2+[.H15]*([.J15]/([.A15]+(1-[.A15])*[.J15])^2)))" office:value-type="float" office:value="1.1596242356414" calcext:value-type="float">
            <text:p>1.1596</text:p>
          </table:table-cell>
          <table:table-cell table:style-name="ce6" table:formula="of:=[.A15]*[.K15]*[.E15]+(1-[.A15])*[.L15]*[.F15]" office:value-type="float" office:value="104.732705917312" calcext:value-type="float">
            <text:p>104.733</text:p>
          </table:table-cell>
          <table:table-cell table:style-name="ce10" table:formula="of:=(([.C15]-[.M15])/[.C15])^2" office:value-type="float" office:value="0.00113107392861343" calcext:value-type="float">
            <text:p>1.13107E-03</text:p>
          </table:table-cell>
          <table:table-cell table:style-name="ce11" table:formula="of:=8.314*[.D15]*([.A15]*LN([.K15])+(1-[.A15])*LN([.L15]))" office:value-type="float" office:value="689.403226175944" calcext:value-type="float">
            <text:p>689.4</text:p>
          </table:table-cell>
          <table:table-cell table:style-name="ce3" office:value-type="float" office:value="1.379" calcext:value-type="float">
            <text:p>1.3790</text:p>
          </table:table-cell>
          <table:table-cell table:style-name="ce3" office:value-type="float" office:value="1.161" calcext:value-type="float">
            <text:p>1.1610</text:p>
          </table:table-cell>
          <table:table-cell table:style-name="ce61" office:value-type="string" calcext:value-type="string">
            <text:p>E <text:s/>(Water)</text:p>
          </table:table-cell>
          <table:table-cell table:style-name="ce62" office:value-type="float" office:value="-7.3" calcext:value-type="float">
            <text:p>-7.300000</text:p>
          </table:table-cell>
          <table:table-cell table:style-name="ce3" table:formula="of:=[.P15]*[.A15]*[.E15]/[.M15]" office:value-type="float" office:value="0.124233001942657" calcext:value-type="float">
            <text:p>0.1242</text:p>
          </table:table-cell>
          <table:table-cell table:style-name="ce10" table:formula="of:=(([.B15]-[.T15])/[.B15])^2" office:value-type="float" office:value="0.00136555918987496" calcext:value-type="float">
            <text:p>1.36556E-03</text:p>
          </table:table-cell>
          <table:table-cell table:style-name="ce10" table:formula="of:=[.N15]+[.U15]" office:value-type="float" office:value="0.00249663311848838" calcext:value-type="float">
            <text:p>2.49663E-03</text:p>
          </table:table-cell>
          <table:table-cell table:style-name="ce6" table:formula="of:=ABS([.C15]-[.M15])" office:value-type="float" office:value="3.407705917312" calcext:value-type="float">
            <text:p>3.408</text:p>
          </table:table-cell>
          <table:table-cell table:style-name="ce6" table:formula="of:=SUM([.U15:.U32])/18" office:value-type="float" office:value="0.000335025711980793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2029" calcext:value-type="float">
            <text:p>0.2029</text:p>
          </table:table-cell>
          <table:table-cell table:style-name="ce3" office:value-type="float" office:value="0.119" calcext:value-type="float">
            <text:p>0.1190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3.02" calcext:value-type="float">
            <text:p>373.02</text:p>
          </table:table-cell>
          <table:table-cell table:style-name="ce6" table:formula="of:=EXP([.$S$8]+[.$S$9]/[.D16]+[.$S$10]*LN([.D16])+[.$S$11]*[.D16]^[.$S$12])" office:value-type="float" office:value="37.390790677899" calcext:value-type="float">
            <text:p>37.391</text:p>
          </table:table-cell>
          <table:table-cell table:style-name="ce6" table:formula="of:=EXP([.$S$13]+[.$S$14]/[.D16]+[.$S$15]*LN([.D16])+[.$S$16]*[.D16]^[.$S$17])" office:value-type="float" office:value="102.89657789184" calcext:value-type="float">
            <text:p>102.897</text:p>
          </table:table-cell>
          <table:table-cell table:style-name="ce3" table:formula="of:=[.$S$3]+[.$S$5]/[.D16]" office:value-type="float" office:value="-0.677790069298165" calcext:value-type="float">
            <text:p>-0.6778</text:p>
          </table:table-cell>
          <table:table-cell table:style-name="ce3" table:formula="of:=[.$S$4]+[.$S$6]/[.D16]" office:value-type="float" office:value="2.51969834486898" calcext:value-type="float">
            <text:p>2.5197</text:p>
          </table:table-cell>
          <table:table-cell table:style-name="ce3" table:formula="of:=EXP(-[.$S$7]*[.G16])" office:value-type="float" office:value="1.22548541271941" calcext:value-type="float">
            <text:p>1.2255</text:p>
          </table:table-cell>
          <table:table-cell table:style-name="ce3" table:formula="of:=EXP(-[.$S$7]*[.H16])" office:value-type="float" office:value="0.469583332786535" calcext:value-type="float">
            <text:p>0.4696</text:p>
          </table:table-cell>
          <table:table-cell table:style-name="ce3" table:formula="of:=EXP((1-[.A16])^2*([.H16]*([.J16]/([.A16]+(1-[.A16])*[.J16]))^2+[.G16]*([.I16]/((1-[.A16])+[.A16]*[.I16])^2)))" office:value-type="float" office:value="1.78070738432033" calcext:value-type="float">
            <text:p>1.7807</text:p>
          </table:table-cell>
          <table:table-cell table:style-name="ce3" table:formula="of:=EXP(([.A16])^2*([.G16]*([.I16]/((1-[.A16])+[.A16]*[.I16]))^2+[.H16]*([.J16]/([.A16]+(1-[.A16])*[.J16])^2)))" office:value-type="float" office:value="1.1139214418037" calcext:value-type="float">
            <text:p>1.1139</text:p>
          </table:table-cell>
          <table:table-cell table:style-name="ce6" table:formula="of:=[.A16]*[.K16]*[.E16]+(1-[.A16])*[.L16]*[.F16]" office:value-type="float" office:value="104.872068657424" calcext:value-type="float">
            <text:p>104.872</text:p>
          </table:table-cell>
          <table:table-cell table:style-name="ce10" table:formula="of:=(([.C16]-[.M16])/[.C16])^2" office:value-type="float" office:value="0.0012254792575212" calcext:value-type="float">
            <text:p>1.22548E-03</text:p>
          </table:table-cell>
          <table:table-cell table:style-name="ce12" table:formula="of:=8.314*[.D16]*([.A16]*LN([.K16])+(1-[.A16])*LN([.L16]))" office:value-type="float" office:value="629.784485662059" calcext:value-type="float">
            <text:p>629.8</text:p>
          </table:table-cell>
          <table:table-cell table:style-name="ce3" office:value-type="float" office:value="1.583" calcext:value-type="float">
            <text:p>1.5830</text:p>
          </table:table-cell>
          <table:table-cell table:style-name="ce3" office:value-type="float" office:value="1.111" calcext:value-type="float">
            <text:p>1.1110</text:p>
          </table:table-cell>
          <table:table-cell table:style-name="ce61" office:value-type="string" calcext:value-type="string">
            <text:p>F <text:s/>(Water)</text:p>
          </table:table-cell>
          <table:table-cell table:style-name="ce62" office:value-type="float" office:value="0.0000041653" calcext:value-type="float">
            <text:p>0.000004</text:p>
          </table:table-cell>
          <table:table-cell table:style-name="ce3" table:formula="of:=[.P16]*[.A16]*[.E16]/[.M16]" office:value-type="float" office:value="0.114516423535217" calcext:value-type="float">
            <text:p>0.1145</text:p>
          </table:table-cell>
          <table:table-cell table:style-name="ce10" table:formula="of:=(([.B16]-[.T16])/[.B16])^2" office:value-type="float" office:value="0.0014195648552756" calcext:value-type="float">
            <text:p>1.41956E-03</text:p>
          </table:table-cell>
          <table:table-cell table:style-name="ce10" table:formula="of:=[.N16]+[.U16]" office:value-type="float" office:value="0.0026450441127968" calcext:value-type="float">
            <text:p>2.64504E-03</text:p>
          </table:table-cell>
          <table:table-cell table:style-name="ce7" table:formula="of:=ABS([.C16]-[.M16])" office:value-type="float" office:value="3.54706865742399" calcext:value-type="float">
            <text:p>3.547</text:p>
          </table:table-cell>
          <table:table-cell table:style-name="ce6" table:formula="of:=SUM([.U16:.U33])/18" office:value-type="float" office:value="0.000259161312543295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133" calcext:value-type="float">
            <text:p>0.1330</text:p>
          </table:table-cell>
          <table:table-cell table:style-name="ce3" office:value-type="float" office:value="0.1034" calcext:value-type="float">
            <text:p>0.1034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2.75" calcext:value-type="float">
            <text:p>372.75</text:p>
          </table:table-cell>
          <table:table-cell table:style-name="ce6" table:formula="of:=EXP([.$S$8]+[.$S$9]/[.D17]+[.$S$10]*LN([.D17])+[.$S$11]*[.D17]^[.$S$12])" office:value-type="float" office:value="37.0239116274913" calcext:value-type="float">
            <text:p>37.024</text:p>
          </table:table-cell>
          <table:table-cell table:style-name="ce6" table:formula="of:=EXP([.$S$13]+[.$S$14]/[.D17]+[.$S$15]*LN([.D17])+[.$S$16]*[.D17]^[.$S$17])" office:value-type="float" office:value="101.908688424121" calcext:value-type="float">
            <text:p>101.909</text:p>
          </table:table-cell>
          <table:table-cell table:style-name="ce3" table:formula="of:=[.$S$3]+[.$S$5]/[.D17]" office:value-type="float" office:value="-0.680946213810103" calcext:value-type="float">
            <text:p>-0.6809</text:p>
          </table:table-cell>
          <table:table-cell table:style-name="ce3" table:formula="of:=[.$S$4]+[.$S$6]/[.D17]" office:value-type="float" office:value="2.51297086757992" calcext:value-type="float">
            <text:p>2.5130</text:p>
          </table:table-cell>
          <table:table-cell table:style-name="ce3" table:formula="of:=EXP(-[.$S$7]*[.G17])" office:value-type="float" office:value="1.22664630494217" calcext:value-type="float">
            <text:p>1.2266</text:p>
          </table:table-cell>
          <table:table-cell table:style-name="ce3" table:formula="of:=EXP(-[.$S$7]*[.H17])" office:value-type="float" office:value="0.470532023170454" calcext:value-type="float">
            <text:p>0.4705</text:p>
          </table:table-cell>
          <table:table-cell table:style-name="ce3" table:formula="of:=EXP((1-[.A17])^2*([.H17]*([.J17]/([.A17]+(1-[.A17])*[.J17]))^2+[.G17]*([.I17]/((1-[.A17])+[.A17]*[.I17])^2)))" office:value-type="float" office:value="2.31062839248771" calcext:value-type="float">
            <text:p>2.3106</text:p>
          </table:table-cell>
          <table:table-cell table:style-name="ce3" table:formula="of:=EXP(([.A17])^2*([.G17]*([.I17]/((1-[.A17])+[.A17]*[.I17]))^2+[.H17]*([.J17]/([.A17]+(1-[.A17])*[.J17])^2)))" office:value-type="float" office:value="1.05590444821539" calcext:value-type="float">
            <text:p>1.0559</text:p>
          </table:table-cell>
          <table:table-cell table:style-name="ce6" table:formula="of:=[.A17]*[.K17]*[.E17]+(1-[.A17])*[.L17]*[.F17]" office:value-type="float" office:value="104.672211729311" calcext:value-type="float">
            <text:p>104.672</text:p>
          </table:table-cell>
          <table:table-cell table:style-name="ce10" table:formula="of:=(([.C17]-[.M17])/[.C17])^2" office:value-type="float" office:value="0.00109127233276672" calcext:value-type="float">
            <text:p>1.09127E-03</text:p>
          </table:table-cell>
          <table:table-cell table:style-name="ce11" table:formula="of:=8.314*[.D17]*([.A17]*LN([.K17])+(1-[.A17])*LN([.L17]))" office:value-type="float" office:value="491.362330808367" calcext:value-type="float">
            <text:p>491.4</text:p>
          </table:table-cell>
          <table:table-cell table:style-name="ce3" office:value-type="float" office:value="2.121" calcext:value-type="float">
            <text:p>2.1210</text:p>
          </table:table-cell>
          <table:table-cell table:style-name="ce3" office:value-type="float" office:value="1.05" calcext:value-type="float">
            <text:p>1.0500</text:p>
          </table:table-cell>
          <table:table-cell table:style-name="ce61" office:value-type="string" calcext:value-type="string">
            <text:p>G <text:s/>(Water)</text:p>
          </table:table-cell>
          <table:table-cell table:style-name="ce63" office:value-type="float" office:value="2" calcext:value-type="float">
            <text:p>2.0000</text:p>
          </table:table-cell>
          <table:table-cell table:style-name="ce3" table:formula="of:=[.P17]*[.A17]*[.E17]/[.M17]" office:value-type="float" office:value="0.0997799332810812" calcext:value-type="float">
            <text:p>0.0998</text:p>
          </table:table-cell>
          <table:table-cell table:style-name="ce10" table:formula="of:=(([.B17]-[.T17])/[.B17])^2" office:value-type="float" office:value="0.00122572225656721" calcext:value-type="float">
            <text:p>1.22572E-03</text:p>
          </table:table-cell>
          <table:table-cell table:style-name="ce10" table:formula="of:=[.N17]+[.U17]" office:value-type="float" office:value="0.00231699458933393" calcext:value-type="float">
            <text:p>2.31699E-03</text:p>
          </table:table-cell>
          <table:table-cell table:style-name="ce6" table:formula="of:=ABS([.C17]-[.M17])" office:value-type="float" office:value="3.347211729311" calcext:value-type="float">
            <text:p>3.347</text:p>
          </table:table-cell>
          <table:table-cell table:style-name="ce6" table:formula="of:=SUM([.U17:.U34])/18" office:value-type="float" office:value="0.000180296598361318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0922" calcext:value-type="float">
            <text:p>0.0922</text:p>
          </table:table-cell>
          <table:table-cell table:style-name="ce3" office:value-type="float" office:value="0.0899" calcext:value-type="float">
            <text:p>0.0899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2.61" calcext:value-type="float">
            <text:p>372.61</text:p>
          </table:table-cell>
          <table:table-cell table:style-name="ce6" table:formula="of:=EXP([.$S$8]+[.$S$9]/[.D18]+[.$S$10]*LN([.D18])+[.$S$11]*[.D18]^[.$S$12])" office:value-type="float" office:value="36.8348640792342" calcext:value-type="float">
            <text:p>36.835</text:p>
          </table:table-cell>
          <table:table-cell table:style-name="ce6" table:formula="of:=EXP([.$S$13]+[.$S$14]/[.D18]+[.$S$15]*LN([.D18])+[.$S$16]*[.D18]^[.$S$17])" office:value-type="float" office:value="101.399550880838" calcext:value-type="float">
            <text:p>101.400</text:p>
          </table:table-cell>
          <table:table-cell table:style-name="ce3" table:formula="of:=[.$S$3]+[.$S$5]/[.D18]" office:value-type="float" office:value="-0.68258453392455" calcext:value-type="float">
            <text:p>-0.6826</text:p>
          </table:table-cell>
          <table:table-cell table:style-name="ce3" table:formula="of:=[.$S$4]+[.$S$6]/[.D18]" office:value-type="float" office:value="2.50947870766124" calcext:value-type="float">
            <text:p>2.5095</text:p>
          </table:table-cell>
          <table:table-cell table:style-name="ce3" table:formula="of:=EXP(-[.$S$7]*[.G18])" office:value-type="float" office:value="1.22724934492031" calcext:value-type="float">
            <text:p>1.2272</text:p>
          </table:table-cell>
          <table:table-cell table:style-name="ce3" table:formula="of:=EXP(-[.$S$7]*[.H18])" office:value-type="float" office:value="0.471025233402225" calcext:value-type="float">
            <text:p>0.4710</text:p>
          </table:table-cell>
          <table:table-cell table:style-name="ce3" table:formula="of:=EXP((1-[.A18])^2*([.H18]*([.J18]/([.A18]+(1-[.A18])*[.J18]))^2+[.G18]*([.I18]/((1-[.A18])+[.A18]*[.I18])^2)))" office:value-type="float" office:value="2.81758394186024" calcext:value-type="float">
            <text:p>2.8176</text:p>
          </table:table-cell>
          <table:table-cell table:style-name="ce3" table:formula="of:=EXP(([.A18])^2*([.G18]*([.I18]/((1-[.A18])+[.A18]*[.I18]))^2+[.H18]*([.J18]/([.A18]+(1-[.A18])*[.J18])^2)))" office:value-type="float" office:value="1.0292241495412" calcext:value-type="float">
            <text:p>1.0292</text:p>
          </table:table-cell>
          <table:table-cell table:style-name="ce6" table:formula="of:=[.A18]*[.K18]*[.E18]+(1-[.A18])*[.L18]*[.F18]" office:value-type="float" office:value="104.30961687121" calcext:value-type="float">
            <text:p>104.310</text:p>
          </table:table-cell>
          <table:table-cell table:style-name="ce10" table:formula="of:=(([.C18]-[.M18])/[.C18])^2" office:value-type="float" office:value="0.000867648767856279" calcext:value-type="float">
            <text:p>8.67649E-04</text:p>
          </table:table-cell>
          <table:table-cell table:style-name="ce12" table:formula="of:=8.314*[.D18]*([.A18]*LN([.K18])+(1-[.A18])*LN([.L18]))" office:value-type="float" office:value="376.880385084227" calcext:value-type="float">
            <text:p>376.9</text:p>
          </table:table-cell>
          <table:table-cell table:style-name="ce3" office:value-type="float" office:value="2.675" calcext:value-type="float">
            <text:p>2.6750</text:p>
          </table:table-cell>
          <table:table-cell table:style-name="ce3" office:value-type="float" office:value="1.022" calcext:value-type="float">
            <text:p>1.0220</text:p>
          </table:table-cell>
          <table:table-cell table:style-name="ce61"/>
          <table:table-cell table:style-name="ce63"/>
          <table:table-cell table:style-name="ce3" table:formula="of:=[.P18]*[.A18]*[.E18]/[.M18]" office:value-type="float" office:value="0.087094239003857" calcext:value-type="float">
            <text:p>0.0871</text:p>
          </table:table-cell>
          <table:table-cell table:style-name="ce10" table:formula="of:=(([.B18]-[.T18])/[.B18])^2" office:value-type="float" office:value="0.00097405159947556" calcext:value-type="float">
            <text:p>9.74052E-04</text:p>
          </table:table-cell>
          <table:table-cell table:style-name="ce10" table:formula="of:=[.N18]+[.U18]" office:value-type="float" office:value="0.00184170036733184" calcext:value-type="float">
            <text:p>1.84170E-03</text:p>
          </table:table-cell>
          <table:table-cell table:style-name="ce7" table:formula="of:=ABS([.C18]-[.M18])" office:value-type="float" office:value="2.98461687120999" calcext:value-type="float">
            <text:p>2.985</text:p>
          </table:table-cell>
          <table:table-cell table:style-name="ce6" table:formula="of:=SUM([.U18:.U35])/18" office:value-type="float" office:value="0.000112200917440917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0564" calcext:value-type="float">
            <text:p>0.0564</text:p>
          </table:table-cell>
          <table:table-cell table:style-name="ce3" office:value-type="float" office:value="0.0785" calcext:value-type="float">
            <text:p>0.0785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2.57" calcext:value-type="float">
            <text:p>372.57</text:p>
          </table:table-cell>
          <table:table-cell table:style-name="ce6" table:formula="of:=EXP([.$S$8]+[.$S$9]/[.D19]+[.$S$10]*LN([.D19])+[.$S$11]*[.D19]^[.$S$12])" office:value-type="float" office:value="36.7809987300763" calcext:value-type="float">
            <text:p>36.781</text:p>
          </table:table-cell>
          <table:table-cell table:style-name="ce6" table:formula="of:=EXP([.$S$13]+[.$S$14]/[.D19]+[.$S$15]*LN([.D19])+[.$S$16]*[.D19]^[.$S$17])" office:value-type="float" office:value="101.254470712638" calcext:value-type="float">
            <text:p>101.254</text:p>
          </table:table-cell>
          <table:table-cell table:style-name="ce3" table:formula="of:=[.$S$3]+[.$S$5]/[.D19]" office:value-type="float" office:value="-0.683052851535171" calcext:value-type="float">
            <text:p>-0.6831</text:p>
          </table:table-cell>
          <table:table-cell table:style-name="ce3" table:formula="of:=[.$S$4]+[.$S$6]/[.D19]" office:value-type="float" office:value="2.50848046563601" calcext:value-type="float">
            <text:p>2.5085</text:p>
          </table:table-cell>
          <table:table-cell table:style-name="ce3" table:formula="of:=EXP(-[.$S$7]*[.G19])" office:value-type="float" office:value="1.22742177977743" calcext:value-type="float">
            <text:p>1.2274</text:p>
          </table:table-cell>
          <table:table-cell table:style-name="ce3" table:formula="of:=EXP(-[.$S$7]*[.H19])" office:value-type="float" office:value="0.471166313680887" calcext:value-type="float">
            <text:p>0.4712</text:p>
          </table:table-cell>
          <table:table-cell table:style-name="ce3" table:formula="of:=EXP((1-[.A19])^2*([.H19]*([.J19]/([.A19]+(1-[.A19])*[.J19]))^2+[.G19]*([.I19]/((1-[.A19])+[.A19]*[.I19])^2)))" office:value-type="float" office:value="3.48259317066755" calcext:value-type="float">
            <text:p>3.4826</text:p>
          </table:table-cell>
          <table:table-cell table:style-name="ce3" table:formula="of:=EXP(([.A19])^2*([.G19]*([.I19]/((1-[.A19])+[.A19]*[.I19]))^2+[.H19]*([.J19]/([.A19]+(1-[.A19])*[.J19])^2)))" office:value-type="float" office:value="1.01185765316105" calcext:value-type="float">
            <text:p>1.0119</text:p>
          </table:table-cell>
          <table:table-cell table:style-name="ce6" table:formula="of:=[.A19]*[.K19]*[.E19]+(1-[.A19])*[.L19]*[.F19]" office:value-type="float" office:value="103.901102422205" calcext:value-type="float">
            <text:p>103.901</text:p>
          </table:table-cell>
          <table:table-cell table:style-name="ce10" table:formula="of:=(([.C19]-[.M19])/[.C19])^2" office:value-type="float" office:value="0.000646387615726393" calcext:value-type="float">
            <text:p>6.46388E-04</text:p>
          </table:table-cell>
          <table:table-cell table:style-name="ce11" table:formula="of:=8.314*[.D19]*([.A19]*LN([.K19])+(1-[.A19])*LN([.L19]))" office:value-type="float" office:value="252.442946249321" calcext:value-type="float">
            <text:p>252.4</text:p>
          </table:table-cell>
          <table:table-cell table:style-name="ce3" office:value-type="float" office:value="3.827" calcext:value-type="float">
            <text:p>3.8270</text:p>
          </table:table-cell>
          <table:table-cell table:style-name="ce3" office:value-type="float" office:value="0.997" calcext:value-type="float">
            <text:p>0.9970</text:p>
          </table:table-cell>
          <table:table-cell table:style-name="ce61" office:value-type="string" calcext:value-type="string">
            <text:p>a12 (Theoretical)</text:p>
          </table:table-cell>
          <table:table-cell table:style-name="ce62" office:value-type="float" office:value="3.68" calcext:value-type="float">
            <text:p>3.680000</text:p>
          </table:table-cell>
          <table:table-cell table:style-name="ce3" table:formula="of:=[.P19]*[.A19]*[.E19]/[.M19]" office:value-type="float" office:value="0.076408368800902" calcext:value-type="float">
            <text:p>0.0764</text:p>
          </table:table-cell>
          <table:table-cell table:style-name="ce10" table:formula="of:=(([.B19]-[.T19])/[.B19])^2" office:value-type="float" office:value="0.000709955141878384" calcext:value-type="float">
            <text:p>7.09955E-04</text:p>
          </table:table-cell>
          <table:table-cell table:style-name="ce10" table:formula="of:=[.N19]+[.U19]" office:value-type="float" office:value="0.00135634275760478" calcext:value-type="float">
            <text:p>1.35634E-03</text:p>
          </table:table-cell>
          <table:table-cell table:style-name="ce6" table:formula="of:=ABS([.C19]-[.M19])" office:value-type="float" office:value="2.576102422205" calcext:value-type="float">
            <text:p>2.576</text:p>
          </table:table-cell>
          <table:table-cell table:style-name="ce6" table:formula="of:=SUM([.U19:.U36])/18" office:value-type="float" office:value="0.0000580869396922748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0013" calcext:value-type="float">
            <text:p>0.0013</text:p>
          </table:table-cell>
          <table:table-cell table:style-name="ce3" office:value-type="float" office:value="0.0022" calcext:value-type="float">
            <text:p>0.0022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73.16" calcext:value-type="float">
            <text:p>373.16</text:p>
          </table:table-cell>
          <table:table-cell table:style-name="ce6" table:formula="of:=EXP([.$S$8]+[.$S$9]/[.D20]+[.$S$10]*LN([.D20])+[.$S$11]*[.D20]^[.$S$12])" office:value-type="float" office:value="37.5822155159411" calcext:value-type="float">
            <text:p>37.582</text:p>
          </table:table-cell>
          <table:table-cell table:style-name="ce6" table:formula="of:=EXP([.$S$13]+[.$S$14]/[.D20]+[.$S$15]*LN([.D20])+[.$S$16]*[.D20]^[.$S$17])" office:value-type="float" office:value="103.411931297612" calcext:value-type="float">
            <text:p>103.412</text:p>
          </table:table-cell>
          <table:table-cell table:style-name="ce3" table:formula="of:=[.$S$3]+[.$S$5]/[.D20]" office:value-type="float" office:value="-0.676155348005388" calcext:value-type="float">
            <text:p>-0.6762</text:p>
          </table:table-cell>
          <table:table-cell table:style-name="ce3" table:formula="of:=[.$S$4]+[.$S$6]/[.D20]" office:value-type="float" office:value="2.52318283372223" calcext:value-type="float">
            <text:p>2.5232</text:p>
          </table:table-cell>
          <table:table-cell table:style-name="ce3" table:formula="of:=EXP(-[.$S$7]*[.G20])" office:value-type="float" office:value="1.22488456193554" calcext:value-type="float">
            <text:p>1.2249</text:p>
          </table:table-cell>
          <table:table-cell table:style-name="ce3" table:formula="of:=EXP(-[.$S$7]*[.H20])" office:value-type="float" office:value="0.469092711899034" calcext:value-type="float">
            <text:p>0.4691</text:p>
          </table:table-cell>
          <table:table-cell table:style-name="ce3" table:formula="of:=EXP((1-[.A20])^2*([.H20]*([.J20]/([.A20]+(1-[.A20])*[.J20]))^2+[.G20]*([.I20]/((1-[.A20])+[.A20]*[.I20])^2)))" office:value-type="float" office:value="5.38523076191009" calcext:value-type="float">
            <text:p>5.3852</text:p>
          </table:table-cell>
          <table:table-cell table:style-name="ce3" table:formula="of:=EXP(([.A20])^2*([.G20]*([.I20]/((1-[.A20])+[.A20]*[.I20]))^2+[.H20]*([.J20]/([.A20]+(1-[.A20])*[.J20])^2)))" office:value-type="float" office:value="1.00000735016305" calcext:value-type="float">
            <text:p>1.0000</text:p>
          </table:table-cell>
          <table:table-cell table:style-name="ce6" table:formula="of:=[.A20]*[.K20]*[.E20]+(1-[.A20])*[.L20]*[.F20]" office:value-type="float" office:value="103.541360467385" calcext:value-type="float">
            <text:p>103.541</text:p>
          </table:table-cell>
          <table:table-cell table:style-name="ce10" table:formula="of:=(([.C20]-[.M20])/[.C20])^2" office:value-type="float" office:value="0.000478462125798096" calcext:value-type="float">
            <text:p>4.78462E-04</text:p>
          </table:table-cell>
          <table:table-cell table:style-name="ce12" table:formula="of:=8.314*[.D20]*([.A20]*LN([.K20])+(1-[.A20])*LN([.L20]))" office:value-type="float" office:value="6.81329161650191" calcext:value-type="float">
            <text:p>6.8</text:p>
          </table:table-cell>
          <table:table-cell table:style-name="ce3" office:value-type="float" office:value="4.577" calcext:value-type="float">
            <text:p>4.5770</text:p>
          </table:table-cell>
          <table:table-cell table:style-name="ce3" office:value-type="float" office:value="0.999" calcext:value-type="float">
            <text:p>0.9990</text:p>
          </table:table-cell>
          <table:table-cell table:style-name="ce61" office:value-type="string" calcext:value-type="string">
            <text:p>a21 (Theoretical)</text:p>
          </table:table-cell>
          <table:table-cell table:style-name="ce62" office:value-type="float" office:value="11.81" calcext:value-type="float">
            <text:p>11.810000</text:p>
          </table:table-cell>
          <table:table-cell table:style-name="ce3" table:formula="of:=[.P20]*[.A20]*[.E20]/[.M20]" office:value-type="float" office:value="0.00215969675820359" calcext:value-type="float">
            <text:p>0.0022</text:p>
          </table:table-cell>
          <table:table-cell table:style-name="ce10" table:formula="of:=(([.B20]-[.T20])/[.B20])^2" office:value-type="float" office:value="0.000335609772582563" calcext:value-type="float">
            <text:p>3.35610E-04</text:p>
          </table:table-cell>
          <table:table-cell table:style-name="ce10" table:formula="of:=[.N20]+[.U20]" office:value-type="float" office:value="0.000814071898380659" calcext:value-type="float">
            <text:p>8.14072E-04</text:p>
          </table:table-cell>
          <table:table-cell table:style-name="ce7" table:formula="of:=ABS([.C20]-[.M20])" office:value-type="float" office:value="2.216360467385" calcext:value-type="float">
            <text:p>2.216</text:p>
          </table:table-cell>
          <table:table-cell table:style-name="ce6" table:formula="of:=SUM([.U20:.U37])/18" office:value-type="float" office:value="0.0000186449873656979" calcext:value-type="float">
            <text:p>0.000</text:p>
          </table:table-cell>
          <table:table-cell/>
          <table:table-cell table:style-name="ce24" office:value-type="string" calcext:value-type="string">
            <text:p>Extended Antoine Constants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G</text:p>
          </table:table-cell>
          <table:table-cell table:style-name="Default" table:number-columns-repeated="16353"/>
        </table:table-row>
        <table:table-row table:style-name="ro1">
          <table:table-cell table:style-name="Default"/>
          <table:table-cell table:number-columns-repeated="16"/>
          <table:table-cell table:style-name="ce61" office:value-type="string" calcext:value-type="string">
            <text:p>b12 (Theoretical)</text:p>
          </table:table-cell>
          <table:table-cell table:style-name="ce62" office:value-type="float" office:value="-1625.21" calcext:value-type="float">
            <text:p>-1625.210000</text:p>
          </table:table-cell>
          <table:table-cell table:number-columns-repeated="2"/>
          <table:table-cell table:style-name="ce35" table:formula="of:=SUM([.V3:.V20])" office:value-type="float" office:value="0.0443421386628785" calcext:value-type="float">
            <text:p>4.43E-02</text:p>
          </table:table-cell>
          <table:table-cell table:style-name="ce23" table:formula="of:=SUM([.W3:.W20])/18" office:value-type="float" office:value="3.14822509094659" calcext:value-type="float">
            <text:p>3.14822509094659</text:p>
          </table:table-cell>
          <table:table-cell table:style-name="ce23" table:formula="of:=(SUM([.X3:.X20])/18)^0.5" office:value-type="float" office:value="0.0238800069012619" calcext:value-type="float">
            <text:p>0.0238800069012619</text:p>
          </table:table-cell>
          <table:table-cell/>
          <table:table-cell table:style-name="ce25" office:value-type="string" calcext:value-type="string">
            <text:p>2-MeO-1-PrOH</text:p>
          </table:table-cell>
          <table:table-cell table:style-name="ce8" office:value-type="float" office:value="58.47" calcext:value-type="float">
            <text:p>58.47</text:p>
          </table:table-cell>
          <table:table-cell table:style-name="ce11" office:value-type="float" office:value="-7185.1" calcext:value-type="float">
            <text:p>-7185.1</text:p>
          </table:table-cell>
          <table:table-cell table:style-name="ce6" office:value-type="float" office:value="-6.02" calcext:value-type="float">
            <text:p>-6.020</text:p>
          </table:table-cell>
          <table:table-cell table:style-name="ce27" office:value-type="float" office:value="2.2873E-017" calcext:value-type="float">
            <text:p>2.29E-17</text:p>
          </table:table-cell>
          <table:table-cell table:style-name="ce29" office:value-type="float" office:value="6" calcext:value-type="float">
            <text:p>6</text:p>
          </table:table-cell>
          <table:table-cell table:style-name="Default" table:number-columns-repeated="16353"/>
        </table:table-row>
        <table:table-row table:style-name="ro1">
          <table:table-cell table:number-columns-repeated="17"/>
          <table:table-cell table:style-name="ce61" office:value-type="string" calcext:value-type="string">
            <text:p>b21 (Theoretical)</text:p>
          </table:table-cell>
          <table:table-cell table:style-name="ce62" office:value-type="float" office:value="-3463.6" calcext:value-type="float">
            <text:p>-3463.600000</text:p>
          </table:table-cell>
          <table:table-cell table:number-columns-repeated="6"/>
          <table:table-cell table:style-name="ce25" office:value-type="string" calcext:value-type="string">
            <text:p>Water</text:p>
          </table:table-cell>
          <table:table-cell table:style-name="ce8" office:value-type="float" office:value="66.74" calcext:value-type="float">
            <text:p>66.74</text:p>
          </table:table-cell>
          <table:table-cell table:style-name="ce11" office:value-type="float" office:value="-7258.2" calcext:value-type="float">
            <text:p>-7258.2</text:p>
          </table:table-cell>
          <table:table-cell table:style-name="ce6" office:value-type="float" office:value="-7.3" calcext:value-type="float">
            <text:p>-7.300</text:p>
          </table:table-cell>
          <table:table-cell table:style-name="ce27" office:value-type="float" office:value="0.0000041653" calcext:value-type="float">
            <text:p>4.17E-06</text:p>
          </table:table-cell>
          <table:table-cell table:style-name="ce29" office:value-type="float" office:value="2" calcext:value-type="float">
            <text:p>2</text:p>
          </table:table-cell>
          <table:table-cell table:style-name="Default" table:number-columns-repeated="16353"/>
        </table:table-row>
        <table:table-row table:style-name="ro1">
          <table:table-cell table:number-columns-repeated="31"/>
          <table:table-cell table:style-name="Default" table:number-columns-repeated="16353"/>
        </table:table-row>
        <table:table-row table:style-name="ro1" table:number-rows-repeated="4">
          <table:table-cell table:number-columns-repeated="17"/>
          <table:table-cell table:style-name="ce17"/>
          <table:table-cell table:number-columns-repeated="13"/>
          <table:table-cell table:style-name="Default" table:number-columns-repeated="16353"/>
        </table:table-row>
        <table:table-row table:style-name="ro4" table:number-rows-repeated="1048548">
          <table:table-cell table:number-columns-repeated="31"/>
          <table:table-cell table:style-name="Default" table:number-columns-repeated="16353"/>
        </table:table-row>
        <table:table-row table:style-name="ro4">
          <table:table-cell table:number-columns-repeated="31"/>
          <table:table-cell table:style-name="Default" table:number-columns-repeated="16353"/>
        </table:table-row>
      </table:table>
      <table:table table:name="Sys3 1MeO2PrOH+2MeO1PrOH" table:style-name="ta3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4" table:number-columns-repeated="2" table:default-cell-style-name="ce5"/>
        <table:table-column table:style-name="co2" table:number-columns-repeated="2" table:default-cell-style-name="ce5"/>
        <table:table-column table:style-name="co4" table:number-columns-repeated="2" table:default-cell-style-name="ce5"/>
        <table:table-column table:style-name="co3" table:default-cell-style-name="ce5"/>
        <table:table-column table:style-name="co6" table:default-cell-style-name="ce5"/>
        <table:table-column table:style-name="co5" table:default-cell-style-name="ce5"/>
        <table:table-column table:style-name="co3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4" table:visibility="collapse" table:default-cell-style-name="ce5"/>
        <table:table-column table:style-name="co3" table:default-cell-style-name="ce5"/>
        <table:table-column table:style-name="co9" table:default-cell-style-name="Default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8" table:default-cell-style-name="ce5"/>
        <table:table-column table:style-name="co11" table:default-cell-style-name="ce5"/>
        <table:table-column table:style-name="co9" table:number-columns-repeated="16353"/>
        <table:table-row table:style-name="ro1">
          <table:table-cell table:style-name="ce1" office:value-type="string" calcext:value-type="string" table:number-columns-spanned="24" table:number-rows-spanned="1">
            <text:p>System 3: 1-methoxy-2-propanol (1) + 2-methoxy-1-propanol (2) | P = 101.325 kPa | NRTL MODEL</text:p>
          </table:table-cell>
          <table:covered-table-cell table:number-columns-repeated="23" table:style-name="ce1"/>
          <table:table-cell/>
          <table:table-cell>
            <draw:frame draw:z-index="0" draw:name="Chart 1" draw:style-name="gr1" draw:text-style-name="P1" svg:width="13.357cm" svg:height="9.998cm" svg:x="0cm" svg:y="0cm">
              <draw:object draw:notify-on-update-of-ranges="'Sys3 1MeO2PrOH+2MeO1PrOH'.A3:'Sys3 1MeO2PrOH+2MeO1PrOH'.A23 'Sys3 1MeO2PrOH+2MeO1PrOH'.D3:'Sys3 1MeO2PrOH+2MeO1PrOH'.D23 'Sys3 1MeO2PrOH+2MeO1PrOH'.B3:'Sys3 1MeO2PrOH+2MeO1PrOH'.B23 'Sys3 1MeO2PrOH+2MeO1PrOH'.D3:'Sys3 1MeO2PrOH+2MeO1PrOH'.D23 'Sys3 1MeO2PrOH+2MeO1PrOH'.T3:'Sys3 1MeO2PrOH+2MeO1PrOH'.T23 'Sys3 1MeO2PrOH+2MeO1PrOH'.D3:'Sys3 1MeO2PrOH+2MeO1PrOH'.D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 table:style-name="Default" table:number-columns-repeated="16353"/>
        </table:table-row>
        <table:table-row table:style-name="ro5">
          <table:table-cell table:style-name="ce24" office:value-type="string" calcext:value-type="string">
            <text:p>x1</text:p>
          </table:table-cell>
          <table:table-cell table:style-name="ce24" office:value-type="string" calcext:value-type="string">
            <text:p>y1 (exp)</text:p>
          </table:table-cell>
          <table:table-cell table:style-name="ce24" office:value-type="string" calcext:value-type="string">
            <text:p>P(exp) [kPa]</text:p>
          </table:table-cell>
          <table:table-cell table:style-name="ce24" office:value-type="string" calcext:value-type="string">
            <text:p>T(exp) [K]</text:p>
          </table:table-cell>
          <table:table-cell table:style-name="ce24" office:value-type="string" calcext:value-type="string">
            <text:p>P1sat (1-MeO-2-PrOH)</text:p>
          </table:table-cell>
          <table:table-cell table:style-name="ce24" office:value-type="string" calcext:value-type="string">
            <text:p>P2sat (2-MeO-1-PrOH)</text:p>
          </table:table-cell>
          <table:table-cell table:style-name="ce24" office:value-type="string" calcext:value-type="string">
            <text:p>Tau12</text:p>
          </table:table-cell>
          <table:table-cell table:style-name="ce24" office:value-type="string" calcext:value-type="string">
            <text:p>Tau21</text:p>
          </table:table-cell>
          <table:table-cell table:style-name="ce24" office:value-type="string" calcext:value-type="string">
            <text:p>G12</text:p>
          </table:table-cell>
          <table:table-cell table:style-name="ce24" office:value-type="string" calcext:value-type="string">
            <text:p>G21</text:p>
          </table:table-cell>
          <table:table-cell table:style-name="ce24" office:value-type="string" calcext:value-type="string">
            <text:p>Gamma1</text:p>
          </table:table-cell>
          <table:table-cell table:style-name="ce24" office:value-type="string" calcext:value-type="string">
            <text:p>Gamma2</text:p>
          </table:table-cell>
          <table:table-cell table:style-name="ce24" office:value-type="string" calcext:value-type="string">
            <text:p>P(calc)</text:p>
          </table:table-cell>
          <table:table-cell table:style-name="ce24" office:value-type="string" calcext:value-type="string">
            <text:p>((Pexp-Pcalc)/Pexp)^2)</text:p>
          </table:table-cell>
          <table:table-cell table:style-name="ce24" office:value-type="string" calcext:value-type="string">
            <text:p>Gibbs Energy</text:p>
          </table:table-cell>
          <table:table-cell table:style-name="ce24" office:value-type="string" calcext:value-type="string">
            <text:p>Gamma1(exp)</text:p>
          </table:table-cell>
          <table:table-cell table:style-name="ce24" office:value-type="string" calcext:value-type="string">
            <text:p>Gamma2(exp)</text:p>
          </table:table-cell>
          <table:table-cell table:style-name="ce24" office:value-type="string" calcext:value-type="string">
            <text:p>Parameter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y1(calc)</text:p>
          </table:table-cell>
          <table:table-cell table:style-name="ce24" office:value-type="string" calcext:value-type="string">
            <text:p>((yexp-ycalc)/yexp)^2)</text:p>
          </table:table-cell>
          <table:table-cell table:style-name="ce24" office:value-type="string" calcext:value-type="string">
            <text:p>ERROR</text:p>
          </table:table-cell>
          <table:table-cell table:style-name="ce24" office:value-type="string" calcext:value-type="string">
            <text:p>AAD</text:p>
          </table:table-cell>
          <table:table-cell table:style-name="ce24" office:value-type="string" calcext:value-type="string">
            <text:p>(RMSDz)^2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9266" calcext:value-type="float">
            <text:p>0.9266</text:p>
          </table:table-cell>
          <table:table-cell table:style-name="ce3" office:value-type="float" office:value="0.9524" calcext:value-type="float">
            <text:p>0.9524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3.84" calcext:value-type="float">
            <text:p>393.84</text:p>
          </table:table-cell>
          <table:table-cell table:style-name="ce6" table:formula="of:=EXP([.$S$8]+[.$S$9]/[.D3]+[.$S$10]*LN([.D3])+[.$S$11]*[.D3]^[.$S$12])" office:value-type="float" office:value="101.78253189021" calcext:value-type="float">
            <text:p>101.783</text:p>
          </table:table-cell>
          <table:table-cell table:style-name="ce6" table:formula="of:=EXP([.$S$13]+[.$S$14]/[.D3]+[.$S$15]*LN([.D3])+[.$S$16]*[.D3]^[.$S$17])" office:value-type="float" office:value="76.4370281670765" calcext:value-type="float">
            <text:p>76.437</text:p>
          </table:table-cell>
          <table:table-cell table:style-name="ce3" table:formula="of:=[.$S$3]+[.$S$5]/[.D3]" office:value-type="float" office:value="-0.462113800349157" calcext:value-type="float">
            <text:p>-0.4621</text:p>
          </table:table-cell>
          <table:table-cell table:style-name="ce3" table:formula="of:=[.$S$4]+[.$S$6]/[.D3]" office:value-type="float" office:value="0.38230263550754" calcext:value-type="float">
            <text:p>0.3823</text:p>
          </table:table-cell>
          <table:table-cell table:style-name="ce3" table:formula="of:=EXP(-[.$S$7]*[.G3])" office:value-type="float" office:value="1.14870375847849" calcext:value-type="float">
            <text:p>1.1487</text:p>
          </table:table-cell>
          <table:table-cell table:style-name="ce3" table:formula="of:=EXP(-[.$S$7]*[.H3])" office:value-type="float" office:value="0.891641805267123" calcext:value-type="float">
            <text:p>0.8916</text:p>
          </table:table-cell>
          <table:table-cell table:style-name="ce3" table:formula="of:=EXP((1-[.A3])^2*([.H3]*([.J3]/([.A3]+(1-[.A3])*[.J3]))^2+[.G3]*([.I3]/((1-[.A3])+[.A3]*[.I3])^2)))" office:value-type="float" office:value="0.999454853801419" calcext:value-type="float">
            <text:p>0.9995</text:p>
          </table:table-cell>
          <table:table-cell table:style-name="ce3" table:formula="of:=EXP(([.A3])^2*([.G3]*([.I3]/((1-[.A3])+[.A3]*[.I3]))^2+[.H3]*([.J3]/([.A3]+(1-[.A3])*[.J3])^2)))" office:value-type="float" office:value="0.898499074385122" calcext:value-type="float">
            <text:p>0.8985</text:p>
          </table:table-cell>
          <table:table-cell table:style-name="ce6" table:formula="of:=[.A3]*[.K3]*[.E3]+(1-[.A3])*[.L3]*[.F3]" office:value-type="float" office:value="99.3012895587496" calcext:value-type="float">
            <text:p>99.301</text:p>
          </table:table-cell>
          <table:table-cell table:style-name="ce10" table:formula="of:=(([.C3]-[.M3])/[.C3])^2" office:value-type="float" office:value="0.000398899525771647" calcext:value-type="float">
            <text:p>3.98900E-04</text:p>
          </table:table-cell>
          <table:table-cell table:style-name="ce11" table:formula="of:=8.314*[.D3]*([.A3]*LN([.K3])+(1-[.A3])*LN([.L3]))" office:value-type="float" office:value="-27.3779352075095" calcext:value-type="float">
            <text:p>-27.4</text:p>
          </table:table-cell>
          <table:table-cell table:style-name="ce3" office:value-type="float" office:value="1.009" calcext:value-type="float">
            <text:p>1.0090</text:p>
          </table:table-cell>
          <table:table-cell table:style-name="ce3" office:value-type="float" office:value="0.856" calcext:value-type="float">
            <text:p>0.8560</text:p>
          </table:table-cell>
          <table:table-cell table:style-name="ce31" office:value-type="string" calcext:value-type="string">
            <text:p>a12 (Minimized)</text:p>
          </table:table-cell>
          <table:table-cell table:style-name="ce18" office:value-type="float" office:value="1.20461509765988" calcext:value-type="float">
            <text:p>1.204615</text:p>
          </table:table-cell>
          <table:table-cell table:style-name="ce3" table:formula="of:=[.P3]*[.A3]*[.E3]/[.M3]" office:value-type="float" office:value="0.958300740290122" calcext:value-type="float">
            <text:p>0.9583</text:p>
          </table:table-cell>
          <table:table-cell table:style-name="ce10" table:formula="of:=(([.B3]-[.T3])/[.B3])^2" office:value-type="float" office:value="0.0000383861209483522" calcext:value-type="float">
            <text:p>3.83861E-05</text:p>
          </table:table-cell>
          <table:table-cell table:style-name="ce10" table:formula="of:=[.N3]+[.U3]" office:value-type="float" office:value="0.00043728564672" calcext:value-type="float">
            <text:p>4.37286E-04</text:p>
          </table:table-cell>
          <table:table-cell table:style-name="ce6" table:formula="of:=ABS([.C3]-[.M3])" office:value-type="float" office:value="2.0237104412504" calcext:value-type="float">
            <text:p>2.024</text:p>
          </table:table-cell>
          <table:table-cell table:style-name="ce6" table:formula="of:=SUM([.U3:.U23])/21" office:value-type="float" office:value="0.0000349733311632234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8966" calcext:value-type="float">
            <text:p>0.8966</text:p>
          </table:table-cell>
          <table:table-cell table:style-name="ce3" office:value-type="float" office:value="0.9303" calcext:value-type="float">
            <text:p>0.9303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4.26" calcext:value-type="float">
            <text:p>394.26</text:p>
          </table:table-cell>
          <table:table-cell table:style-name="ce6" table:formula="of:=EXP([.$S$8]+[.$S$9]/[.D4]+[.$S$10]*LN([.D4])+[.$S$11]*[.D4]^[.$S$12])" office:value-type="float" office:value="103.127663916039" calcext:value-type="float">
            <text:p>103.128</text:p>
          </table:table-cell>
          <table:table-cell table:style-name="ce6" table:formula="of:=EXP([.$S$13]+[.$S$14]/[.D4]+[.$S$15]*LN([.D4])+[.$S$16]*[.D4]^[.$S$17])" office:value-type="float" office:value="77.4810348237413" calcext:value-type="float">
            <text:p>77.481</text:p>
          </table:table-cell>
          <table:table-cell table:style-name="ce3" table:formula="of:=[.$S$3]+[.$S$5]/[.D4]" office:value-type="float" office:value="-0.460338255944034" calcext:value-type="float">
            <text:p>-0.4603</text:p>
          </table:table-cell>
          <table:table-cell table:style-name="ce3" table:formula="of:=[.$S$4]+[.$S$6]/[.D4]" office:value-type="float" office:value="0.382847303316247" calcext:value-type="float">
            <text:p>0.3828</text:p>
          </table:table-cell>
          <table:table-cell table:style-name="ce3" table:formula="of:=EXP(-[.$S$7]*[.G4])" office:value-type="float" office:value="1.14809204905109" calcext:value-type="float">
            <text:p>1.1481</text:p>
          </table:table-cell>
          <table:table-cell table:style-name="ce3" table:formula="of:=EXP(-[.$S$7]*[.H4])" office:value-type="float" office:value="0.891496122593279" calcext:value-type="float">
            <text:p>0.8915</text:p>
          </table:table-cell>
          <table:table-cell table:style-name="ce3" table:formula="of:=EXP((1-[.A4])^2*([.H4]*([.J4]/([.A4]+(1-[.A4])*[.J4]))^2+[.G4]*([.I4]/((1-[.A4])+[.A4]*[.I4])^2)))" office:value-type="float" office:value="0.99892442047029" calcext:value-type="float">
            <text:p>0.9989</text:p>
          </table:table-cell>
          <table:table-cell table:style-name="ce3" table:formula="of:=EXP(([.A4])^2*([.G4]*([.I4]/((1-[.A4])+[.A4]*[.I4]))^2+[.H4]*([.J4]/([.A4]+(1-[.A4])*[.J4])^2)))" office:value-type="float" office:value="0.905290797872309" calcext:value-type="float">
            <text:p>0.9053</text:p>
          </table:table-cell>
          <table:table-cell table:style-name="ce6" table:formula="of:=[.A4]*[.K4]*[.E4]+(1-[.A4])*[.L4]*[.F4]" office:value-type="float" office:value="99.6175833323021" calcext:value-type="float">
            <text:p>99.618</text:p>
          </table:table-cell>
          <table:table-cell table:style-name="ce10" table:formula="of:=(([.C4]-[.M4])/[.C4])^2" office:value-type="float" office:value="0.00028395257310243" calcext:value-type="float">
            <text:p>2.83953E-04</text:p>
          </table:table-cell>
          <table:table-cell table:style-name="ce11" table:formula="of:=8.314*[.D4]*([.A4]*LN([.K4])+(1-[.A4])*LN([.L4]))" office:value-type="float" office:value="-36.8862414291804" calcext:value-type="float">
            <text:p>-36.9</text:p>
          </table:table-cell>
          <table:table-cell table:style-name="ce3" office:value-type="float" office:value="1.005" calcext:value-type="float">
            <text:p>1.0050</text:p>
          </table:table-cell>
          <table:table-cell table:style-name="ce3" office:value-type="float" office:value="0.877" calcext:value-type="float">
            <text:p>0.8770</text:p>
          </table:table-cell>
          <table:table-cell table:style-name="ce31" office:value-type="string" calcext:value-type="string">
            <text:p>a21 (Minimized)</text:p>
          </table:table-cell>
          <table:table-cell table:style-name="ce18" office:value-type="float" office:value="0.893590088510223" calcext:value-type="float">
            <text:p>0.893590</text:p>
          </table:table-cell>
          <table:table-cell table:style-name="ce3" table:formula="of:=[.P4]*[.A4]*[.E4]/[.M4]" office:value-type="float" office:value="0.932833157319965" calcext:value-type="float">
            <text:p>0.9328</text:p>
          </table:table-cell>
          <table:table-cell table:style-name="ce10" table:formula="of:=(([.B4]-[.T4])/[.B4])^2" office:value-type="float" office:value="0.00000741443876004414" calcext:value-type="float">
            <text:p>7.41444E-06</text:p>
          </table:table-cell>
          <table:table-cell table:style-name="ce10" table:formula="of:=[.N4]+[.U4]" office:value-type="float" office:value="0.000291367011862474" calcext:value-type="float">
            <text:p>2.91367E-04</text:p>
          </table:table-cell>
          <table:table-cell table:style-name="ce7" table:formula="of:=ABS([.C4]-[.M4])" office:value-type="float" office:value="1.7074166676979" calcext:value-type="float">
            <text:p>1.707</text:p>
          </table:table-cell>
          <table:table-cell table:style-name="ce6" table:formula="of:=SUM([.U4:.U24])/21" office:value-type="float" office:value="0.0000331454206418733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8862" calcext:value-type="float">
            <text:p>0.8862</text:p>
          </table:table-cell>
          <table:table-cell table:style-name="ce3" office:value-type="float" office:value="0.9213" calcext:value-type="float">
            <text:p>0.9213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4.58" calcext:value-type="float">
            <text:p>394.58</text:p>
          </table:table-cell>
          <table:table-cell table:style-name="ce6" table:formula="of:=EXP([.$S$8]+[.$S$9]/[.D5]+[.$S$10]*LN([.D5])+[.$S$11]*[.D5]^[.$S$12])" office:value-type="float" office:value="104.162122019829" calcext:value-type="float">
            <text:p>104.162</text:p>
          </table:table-cell>
          <table:table-cell table:style-name="ce6" table:formula="of:=EXP([.$S$13]+[.$S$14]/[.D5]+[.$S$15]*LN([.D5])+[.$S$16]*[.D5]^[.$S$17])" office:value-type="float" office:value="78.2843677772358" calcext:value-type="float">
            <text:p>78.284</text:p>
          </table:table-cell>
          <table:table-cell table:style-name="ce3" table:formula="of:=[.$S$3]+[.$S$5]/[.D5]" office:value-type="float" office:value="-0.458987997255927" calcext:value-type="float">
            <text:p>-0.4590</text:p>
          </table:table-cell>
          <table:table-cell table:style-name="ce3" table:formula="of:=[.$S$4]+[.$S$6]/[.D5]" office:value-type="float" office:value="0.383261510045585" calcext:value-type="float">
            <text:p>0.3833</text:p>
          </table:table-cell>
          <table:table-cell table:style-name="ce3" table:formula="of:=EXP(-[.$S$7]*[.G5])" office:value-type="float" office:value="1.14762707685316" calcext:value-type="float">
            <text:p>1.1476</text:p>
          </table:table-cell>
          <table:table-cell table:style-name="ce3" table:formula="of:=EXP(-[.$S$7]*[.H5])" office:value-type="float" office:value="0.891385350367864" calcext:value-type="float">
            <text:p>0.8914</text:p>
          </table:table-cell>
          <table:table-cell table:style-name="ce3" table:formula="of:=EXP((1-[.A5])^2*([.H5]*([.J5]/([.A5]+(1-[.A5])*[.J5]))^2+[.G5]*([.I5]/((1-[.A5])+[.A5]*[.I5])^2)))" office:value-type="float" office:value="0.99870941998055" calcext:value-type="float">
            <text:p>0.9987</text:p>
          </table:table-cell>
          <table:table-cell table:style-name="ce3" table:formula="of:=EXP(([.A5])^2*([.G5]*([.I5]/((1-[.A5])+[.A5]*[.I5]))^2+[.H5]*([.J5]/([.A5]+(1-[.A5])*[.J5])^2)))" office:value-type="float" office:value="0.908285434683601" calcext:value-type="float">
            <text:p>0.9083</text:p>
          </table:table-cell>
          <table:table-cell table:style-name="ce6" table:formula="of:=[.A5]*[.K5]*[.E5]+(1-[.A5])*[.L5]*[.F5]" office:value-type="float" office:value="100.281038969256" calcext:value-type="float">
            <text:p>100.281</text:p>
          </table:table-cell>
          <table:table-cell table:style-name="ce10" table:formula="of:=(([.C5]-[.M5])/[.C5])^2" office:value-type="float" office:value="0.000106153752316727" calcext:value-type="float">
            <text:p>1.06154E-04</text:p>
          </table:table-cell>
          <table:table-cell table:style-name="ce11" table:formula="of:=8.314*[.D5]*([.A5]*LN([.K5])+(1-[.A5])*LN([.L5]))" office:value-type="float" office:value="-39.6670305702626" calcext:value-type="float">
            <text:p>-39.7</text:p>
          </table:table-cell>
          <table:table-cell table:style-name="ce3" office:value-type="float" office:value="0.997" calcext:value-type="float">
            <text:p>0.9970</text:p>
          </table:table-cell>
          <table:table-cell table:style-name="ce3" office:value-type="float" office:value="0.891" calcext:value-type="float">
            <text:p>0.8910</text:p>
          </table:table-cell>
          <table:table-cell table:style-name="ce31" office:value-type="string" calcext:value-type="string">
            <text:p>b12 (Minimized)</text:p>
          </table:table-cell>
          <table:table-cell table:style-name="ce18" office:value-type="float" office:value="-656.424509191881" calcext:value-type="float">
            <text:p>-656.424509</text:p>
          </table:table-cell>
          <table:table-cell table:style-name="ce3" table:formula="of:=[.P5]*[.A5]*[.E5]/[.M5]" office:value-type="float" office:value="0.917736274597094" calcext:value-type="float">
            <text:p>0.9177</text:p>
          </table:table-cell>
          <table:table-cell table:style-name="ce10" table:formula="of:=(([.B5]-[.T5])/[.B5])^2" office:value-type="float" office:value="0.0000149625744123027" calcext:value-type="float">
            <text:p>1.49626E-05</text:p>
          </table:table-cell>
          <table:table-cell table:style-name="ce10" table:formula="of:=[.N5]+[.U5]" office:value-type="float" office:value="0.000121116326729029" calcext:value-type="float">
            <text:p>1.21116E-04</text:p>
          </table:table-cell>
          <table:table-cell table:style-name="ce6" table:formula="of:=ABS([.C5]-[.M5])" office:value-type="float" office:value="1.04396103074426" calcext:value-type="float">
            <text:p>1.044</text:p>
          </table:table-cell>
          <table:table-cell table:style-name="ce6" table:formula="of:=SUM([.U5:.U25])/21" office:value-type="float" office:value="0.0000327923521294903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8353" calcext:value-type="float">
            <text:p>0.8353</text:p>
          </table:table-cell>
          <table:table-cell table:style-name="ce3" office:value-type="float" office:value="0.8812" calcext:value-type="float">
            <text:p>0.8812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5.11" calcext:value-type="float">
            <text:p>395.11</text:p>
          </table:table-cell>
          <table:table-cell table:style-name="ce6" table:formula="of:=EXP([.$S$8]+[.$S$9]/[.D6]+[.$S$10]*LN([.D6])+[.$S$11]*[.D6]^[.$S$12])" office:value-type="float" office:value="105.893839592902" calcext:value-type="float">
            <text:p>105.894</text:p>
          </table:table-cell>
          <table:table-cell table:style-name="ce6" table:formula="of:=EXP([.$S$13]+[.$S$14]/[.D6]+[.$S$15]*LN([.D6])+[.$S$16]*[.D6]^[.$S$17])" office:value-type="float" office:value="79.6300493428856" calcext:value-type="float">
            <text:p>79.630</text:p>
          </table:table-cell>
          <table:table-cell table:style-name="ce3" table:formula="of:=[.$S$3]+[.$S$5]/[.D6]" office:value-type="float" office:value="-0.456756442397013" calcext:value-type="float">
            <text:p>-0.4568</text:p>
          </table:table-cell>
          <table:table-cell table:style-name="ce3" table:formula="of:=[.$S$4]+[.$S$6]/[.D6]" office:value-type="float" office:value="0.383946064085185" calcext:value-type="float">
            <text:p>0.3839</text:p>
          </table:table-cell>
          <table:table-cell table:style-name="ce3" table:formula="of:=EXP(-[.$S$7]*[.G6])" office:value-type="float" office:value="1.14685903613672" calcext:value-type="float">
            <text:p>1.1469</text:p>
          </table:table-cell>
          <table:table-cell table:style-name="ce3" table:formula="of:=EXP(-[.$S$7]*[.H6])" office:value-type="float" office:value="0.891202308731061" calcext:value-type="float">
            <text:p>0.8912</text:p>
          </table:table-cell>
          <table:table-cell table:style-name="ce3" table:formula="of:=EXP((1-[.A6])^2*([.H6]*([.J6]/([.A6]+(1-[.A6])*[.J6]))^2+[.G6]*([.I6]/((1-[.A6])+[.A6]*[.I6])^2)))" office:value-type="float" office:value="0.997306275321629" calcext:value-type="float">
            <text:p>0.9973</text:p>
          </table:table-cell>
          <table:table-cell table:style-name="ce3" table:formula="of:=EXP(([.A6])^2*([.G6]*([.I6]/((1-[.A6])+[.A6]*[.I6]))^2+[.H6]*([.J6]/([.A6]+(1-[.A6])*[.J6])^2)))" office:value-type="float" office:value="0.918479294134056" calcext:value-type="float">
            <text:p>0.9185</text:p>
          </table:table-cell>
          <table:table-cell table:style-name="ce6" table:formula="of:=[.A6]*[.K6]*[.E6]+(1-[.A6])*[.L6]*[.F6]" office:value-type="float" office:value="100.26077528246" calcext:value-type="float">
            <text:p>100.261</text:p>
          </table:table-cell>
          <table:table-cell table:style-name="ce10" table:formula="of:=(([.C6]-[.M6])/[.C6])^2" office:value-type="float" office:value="0.000110314717793113" calcext:value-type="float">
            <text:p>1.10315E-04</text:p>
          </table:table-cell>
          <table:table-cell table:style-name="ce11" table:formula="of:=8.314*[.D6]*([.A6]*LN([.K6])+(1-[.A6])*LN([.L6]))" office:value-type="float" office:value="-53.4083360310588" calcext:value-type="float">
            <text:p>-53.4</text:p>
          </table:table-cell>
          <table:table-cell table:style-name="ce3" office:value-type="float" office:value="0.995" calcext:value-type="float">
            <text:p>0.9950</text:p>
          </table:table-cell>
          <table:table-cell table:style-name="ce3" office:value-type="float" office:value="0.913" calcext:value-type="float">
            <text:p>0.9130</text:p>
          </table:table-cell>
          <table:table-cell table:style-name="ce31" office:value-type="string" calcext:value-type="string">
            <text:p>b21 (Minimized)</text:p>
          </table:table-cell>
          <table:table-cell table:style-name="ce18" office:value-type="float" office:value="-201.365450490577" calcext:value-type="float">
            <text:p>-201.365450</text:p>
          </table:table-cell>
          <table:table-cell table:style-name="ce3" table:formula="of:=[.P6]*[.A6]*[.E6]/[.M6]" office:value-type="float" office:value="0.877819449759311" calcext:value-type="float">
            <text:p>0.8778</text:p>
          </table:table-cell>
          <table:table-cell table:style-name="ce10" table:formula="of:=(([.B6]-[.T6])/[.B6])^2" office:value-type="float" office:value="0.0000147172210307453" calcext:value-type="float">
            <text:p>1.47172E-05</text:p>
          </table:table-cell>
          <table:table-cell table:style-name="ce10" table:formula="of:=[.N6]+[.U6]" office:value-type="float" office:value="0.000125031938823858" calcext:value-type="float">
            <text:p>1.25032E-04</text:p>
          </table:table-cell>
          <table:table-cell table:style-name="ce7" table:formula="of:=ABS([.C6]-[.M6])" office:value-type="float" office:value="1.06422471753983" calcext:value-type="float">
            <text:p>1.064</text:p>
          </table:table-cell>
          <table:table-cell table:style-name="ce6" table:formula="of:=SUM([.U6:.U26])/21" office:value-type="float" office:value="0.0000320798485860473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7803" calcext:value-type="float">
            <text:p>0.7803</text:p>
          </table:table-cell>
          <table:table-cell table:style-name="ce3" office:value-type="float" office:value="0.8344" calcext:value-type="float">
            <text:p>0.8344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5.73" calcext:value-type="float">
            <text:p>395.73</text:p>
          </table:table-cell>
          <table:table-cell table:style-name="ce6" table:formula="of:=EXP([.$S$8]+[.$S$9]/[.D7]+[.$S$10]*LN([.D7])+[.$S$11]*[.D7]^[.$S$12])" office:value-type="float" office:value="107.948997791912" calcext:value-type="float">
            <text:p>107.949</text:p>
          </table:table-cell>
          <table:table-cell table:style-name="ce6" table:formula="of:=EXP([.$S$13]+[.$S$14]/[.D7]+[.$S$15]*LN([.D7])+[.$S$16]*[.D7]^[.$S$17])" office:value-type="float" office:value="81.2284845337339" calcext:value-type="float">
            <text:p>81.228</text:p>
          </table:table-cell>
          <table:table-cell table:style-name="ce3" table:formula="of:=[.$S$3]+[.$S$5]/[.D7]" office:value-type="float" office:value="-0.45415353042462" calcext:value-type="float">
            <text:p>-0.4542</text:p>
          </table:table-cell>
          <table:table-cell table:style-name="ce3" table:formula="of:=[.$S$4]+[.$S$6]/[.D7]" office:value-type="float" office:value="0.38474453601085" calcext:value-type="float">
            <text:p>0.3847</text:p>
          </table:table-cell>
          <table:table-cell table:style-name="ce3" table:formula="of:=EXP(-[.$S$7]*[.G7])" office:value-type="float" office:value="1.14596383376742" calcext:value-type="float">
            <text:p>1.1460</text:p>
          </table:table-cell>
          <table:table-cell table:style-name="ce3" table:formula="of:=EXP(-[.$S$7]*[.H7])" office:value-type="float" office:value="0.890988854290605" calcext:value-type="float">
            <text:p>0.8910</text:p>
          </table:table-cell>
          <table:table-cell table:style-name="ce3" table:formula="of:=EXP((1-[.A7])^2*([.H7]*([.J7]/([.A7]+(1-[.A7])*[.J7]))^2+[.G7]*([.I7]/((1-[.A7])+[.A7]*[.I7])^2)))" office:value-type="float" office:value="0.995240181353519" calcext:value-type="float">
            <text:p>0.9952</text:p>
          </table:table-cell>
          <table:table-cell table:style-name="ce3" table:formula="of:=EXP(([.A7])^2*([.G7]*([.I7]/((1-[.A7])+[.A7]*[.I7]))^2+[.H7]*([.J7]/([.A7]+(1-[.A7])*[.J7])^2)))" office:value-type="float" office:value="0.92906195051335" calcext:value-type="float">
            <text:p>0.9291</text:p>
          </table:table-cell>
          <table:table-cell table:style-name="ce6" table:formula="of:=[.A7]*[.K7]*[.E7]+(1-[.A7])*[.L7]*[.F7]" office:value-type="float" office:value="100.411615915648" calcext:value-type="float">
            <text:p>100.412</text:p>
          </table:table-cell>
          <table:table-cell table:style-name="ce10" table:formula="of:=(([.C7]-[.M7])/[.C7])^2" office:value-type="float" office:value="0.0000812594081343361" calcext:value-type="float">
            <text:p>8.12594E-05</text:p>
          </table:table-cell>
          <table:table-cell table:style-name="ce11" table:formula="of:=8.314*[.D7]*([.A7]*LN([.K7])+(1-[.A7])*LN([.L7]))" office:value-type="float" office:value="-65.434968771554" calcext:value-type="float">
            <text:p>-65.4</text:p>
          </table:table-cell>
          <table:table-cell table:style-name="ce3" office:value-type="float" office:value="0.99" calcext:value-type="float">
            <text:p>0.9900</text:p>
          </table:table-cell>
          <table:table-cell table:style-name="ce3" office:value-type="float" office:value="0.936" calcext:value-type="float">
            <text:p>0.9360</text:p>
          </table:table-cell>
          <table:table-cell table:style-name="ce61" office:value-type="string" calcext:value-type="string">
            <text:p>alpha (fixed)</text:p>
          </table:table-cell>
          <table:table-cell table:style-name="ce62" office:value-type="float" office:value="0.3" calcext:value-type="float">
            <text:p>0.300000</text:p>
          </table:table-cell>
          <table:table-cell table:style-name="ce3" table:formula="of:=[.P7]*[.A7]*[.E7]/[.M7]" office:value-type="float" office:value="0.830484363654818" calcext:value-type="float">
            <text:p>0.8305</text:p>
          </table:table-cell>
          <table:table-cell table:style-name="ce10" table:formula="of:=(([.B7]-[.T7])/[.B7])^2" office:value-type="float" office:value="0.0000220219671855155" calcext:value-type="float">
            <text:p>2.20220E-05</text:p>
          </table:table-cell>
          <table:table-cell table:style-name="ce10" table:formula="of:=[.N7]+[.U7]" office:value-type="float" office:value="0.000103281375319852" calcext:value-type="float">
            <text:p>1.03281E-04</text:p>
          </table:table-cell>
          <table:table-cell table:style-name="ce6" table:formula="of:=ABS([.C7]-[.M7])" office:value-type="float" office:value="0.913384084351904" calcext:value-type="float">
            <text:p>0.913</text:p>
          </table:table-cell>
          <table:table-cell table:style-name="ce6" table:formula="of:=SUM([.U7:.U27])/21" office:value-type="float" office:value="0.0000313790285369642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7387" calcext:value-type="float">
            <text:p>0.7387</text:p>
          </table:table-cell>
          <table:table-cell table:style-name="ce3" office:value-type="float" office:value="0.7989" calcext:value-type="float">
            <text:p>0.7989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6.03" calcext:value-type="float">
            <text:p>396.03</text:p>
          </table:table-cell>
          <table:table-cell table:style-name="ce6" table:formula="of:=EXP([.$S$8]+[.$S$9]/[.D8]+[.$S$10]*LN([.D8])+[.$S$11]*[.D8]^[.$S$12])" office:value-type="float" office:value="108.954899871961" calcext:value-type="float">
            <text:p>108.955</text:p>
          </table:table-cell>
          <table:table-cell table:style-name="ce6" table:formula="of:=EXP([.$S$13]+[.$S$14]/[.D8]+[.$S$15]*LN([.D8])+[.$S$16]*[.D8]^[.$S$17])" office:value-type="float" office:value="82.011399339493" calcext:value-type="float">
            <text:p>82.011</text:p>
          </table:table-cell>
          <table:table-cell table:style-name="ce3" table:formula="of:=[.$S$3]+[.$S$5]/[.D8]" office:value-type="float" office:value="-0.452896982717564" calcext:value-type="float">
            <text:p>-0.4529</text:p>
          </table:table-cell>
          <table:table-cell table:style-name="ce3" table:formula="of:=[.$S$4]+[.$S$6]/[.D8]" office:value-type="float" office:value="0.38512999586427" calcext:value-type="float">
            <text:p>0.3851</text:p>
          </table:table-cell>
          <table:table-cell table:style-name="ce3" table:formula="of:=EXP(-[.$S$7]*[.G8])" office:value-type="float" office:value="1.14553192771081" calcext:value-type="float">
            <text:p>1.1455</text:p>
          </table:table-cell>
          <table:table-cell table:style-name="ce3" table:formula="of:=EXP(-[.$S$7]*[.H8])" office:value-type="float" office:value="0.890885828117636" calcext:value-type="float">
            <text:p>0.8909</text:p>
          </table:table-cell>
          <table:table-cell table:style-name="ce3" table:formula="of:=EXP((1-[.A8])^2*([.H8]*([.J8]/([.A8]+(1-[.A8])*[.J8]))^2+[.G8]*([.I8]/((1-[.A8])+[.A8]*[.I8])^2)))" office:value-type="float" office:value="0.99325639163041" calcext:value-type="float">
            <text:p>0.9933</text:p>
          </table:table-cell>
          <table:table-cell table:style-name="ce3" table:formula="of:=EXP(([.A8])^2*([.G8]*([.I8]/((1-[.A8])+[.A8]*[.I8]))^2+[.H8]*([.J8]/([.A8]+(1-[.A8])*[.J8])^2)))" office:value-type="float" office:value="0.936110250779471" calcext:value-type="float">
            <text:p>0.9361</text:p>
          </table:table-cell>
          <table:table-cell table:style-name="ce6" table:formula="of:=[.A8]*[.K8]*[.E8]+(1-[.A8])*[.L8]*[.F8]" office:value-type="float" office:value="100.002673561803" calcext:value-type="float">
            <text:p>100.003</text:p>
          </table:table-cell>
          <table:table-cell table:style-name="ce10" table:formula="of:=(([.C8]-[.M8])/[.C8])^2" office:value-type="float" office:value="0.000170311564141729" calcext:value-type="float">
            <text:p>1.70312E-04</text:p>
          </table:table-cell>
          <table:table-cell table:style-name="ce11" table:formula="of:=8.314*[.D8]*([.A8]*LN([.K8])+(1-[.A8])*LN([.L8]))" office:value-type="float" office:value="-73.2599728458212" calcext:value-type="float">
            <text:p>-73.3</text:p>
          </table:table-cell>
          <table:table-cell table:style-name="ce3" office:value-type="float" office:value="0.992" calcext:value-type="float">
            <text:p>0.9920</text:p>
          </table:table-cell>
          <table:table-cell table:style-name="ce3" office:value-type="float" office:value="0.946" calcext:value-type="float">
            <text:p>0.9460</text:p>
          </table:table-cell>
          <table:table-cell table:style-name="ce61" office:value-type="string" calcext:value-type="string">
            <text:p>A <text:s/>(1-MeO-2-PrOH)</text:p>
          </table:table-cell>
          <table:table-cell table:style-name="ce62" office:value-type="float" office:value="51.91" calcext:value-type="float">
            <text:p>51.910000</text:p>
          </table:table-cell>
          <table:table-cell table:style-name="ce3" table:formula="of:=[.P8]*[.A8]*[.E8]/[.M8]" office:value-type="float" office:value="0.798389701149252" calcext:value-type="float">
            <text:p>0.7984</text:p>
          </table:table-cell>
          <table:table-cell table:style-name="ce10" table:formula="of:=(([.B8]-[.T8])/[.B8])^2" office:value-type="float" office:value="0.000000408003922332809" calcext:value-type="float">
            <text:p>4.08004E-07</text:p>
          </table:table-cell>
          <table:table-cell table:style-name="ce10" table:formula="of:=[.N8]+[.U8]" office:value-type="float" office:value="0.000170719568064061" calcext:value-type="float">
            <text:p>1.70720E-04</text:p>
          </table:table-cell>
          <table:table-cell table:style-name="ce7" table:formula="of:=ABS([.C8]-[.M8])" office:value-type="float" office:value="1.32232643819695" calcext:value-type="float">
            <text:p>1.322</text:p>
          </table:table-cell>
          <table:table-cell table:style-name="ce6" table:formula="of:=SUM([.U8:.U28])/21" office:value-type="float" office:value="0.000030330363432892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7337" calcext:value-type="float">
            <text:p>0.7337</text:p>
          </table:table-cell>
          <table:table-cell table:style-name="ce3" office:value-type="float" office:value="0.7955" calcext:value-type="float">
            <text:p>0.7955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6.06" calcext:value-type="float">
            <text:p>396.06</text:p>
          </table:table-cell>
          <table:table-cell table:style-name="ce6" table:formula="of:=EXP([.$S$8]+[.$S$9]/[.D9]+[.$S$10]*LN([.D9])+[.$S$11]*[.D9]^[.$S$12])" office:value-type="float" office:value="109.055903876747" calcext:value-type="float">
            <text:p>109.056</text:p>
          </table:table-cell>
          <table:table-cell table:style-name="ce6" table:formula="of:=EXP([.$S$13]+[.$S$14]/[.D9]+[.$S$15]*LN([.D9])+[.$S$16]*[.D9]^[.$S$17])" office:value-type="float" office:value="82.0900330414828" calcext:value-type="float">
            <text:p>82.090</text:p>
          </table:table-cell>
          <table:table-cell table:style-name="ce3" table:formula="of:=[.$S$3]+[.$S$5]/[.D9]" office:value-type="float" office:value="-0.452771432643304" calcext:value-type="float">
            <text:p>-0.4528</text:p>
          </table:table-cell>
          <table:table-cell table:style-name="ce3" table:formula="of:=[.$S$4]+[.$S$6]/[.D9]" office:value-type="float" office:value="0.385168509732824" calcext:value-type="float">
            <text:p>0.3852</text:p>
          </table:table-cell>
          <table:table-cell table:style-name="ce3" table:formula="of:=EXP(-[.$S$7]*[.G9])" office:value-type="float" office:value="1.14548878203778" calcext:value-type="float">
            <text:p>1.1455</text:p>
          </table:table-cell>
          <table:table-cell table:style-name="ce3" table:formula="of:=EXP(-[.$S$7]*[.H9])" office:value-type="float" office:value="0.890875534739198" calcext:value-type="float">
            <text:p>0.8909</text:p>
          </table:table-cell>
          <table:table-cell table:style-name="ce3" table:formula="of:=EXP((1-[.A9])^2*([.H9]*([.J9]/([.A9]+(1-[.A9])*[.J9]))^2+[.G9]*([.I9]/((1-[.A9])+[.A9]*[.I9])^2)))" office:value-type="float" office:value="0.992992786669012" calcext:value-type="float">
            <text:p>0.9930</text:p>
          </table:table-cell>
          <table:table-cell table:style-name="ce3" table:formula="of:=EXP(([.A9])^2*([.G9]*([.I9]/((1-[.A9])+[.A9]*[.I9]))^2+[.H9]*([.J9]/([.A9]+(1-[.A9])*[.J9])^2)))" office:value-type="float" office:value="0.936918657782711" calcext:value-type="float">
            <text:p>0.9369</text:p>
          </table:table-cell>
          <table:table-cell table:style-name="ce6" table:formula="of:=[.A9]*[.K9]*[.E9]+(1-[.A9])*[.L9]*[.F9]" office:value-type="float" office:value="99.9352206238055" calcext:value-type="float">
            <text:p>99.935</text:p>
          </table:table-cell>
          <table:table-cell table:style-name="ce10" table:formula="of:=(([.C9]-[.M9])/[.C9])^2" office:value-type="float" office:value="0.000188130192735129" calcext:value-type="float">
            <text:p>1.88130E-04</text:p>
          </table:table-cell>
          <table:table-cell table:style-name="ce11" table:formula="of:=8.314*[.D9]*([.A9]*LN([.K9])+(1-[.A9])*LN([.L9]))" office:value-type="float" office:value="-74.1254529501579" calcext:value-type="float">
            <text:p>-74.1</text:p>
          </table:table-cell>
          <table:table-cell table:style-name="ce3" office:value-type="float" office:value="0.993" calcext:value-type="float">
            <text:p>0.9930</text:p>
          </table:table-cell>
          <table:table-cell table:style-name="ce3" office:value-type="float" office:value="0.943" calcext:value-type="float">
            <text:p>0.9430</text:p>
          </table:table-cell>
          <table:table-cell table:style-name="ce61" office:value-type="string" calcext:value-type="string">
            <text:p>B <text:s/>(1-MeO-2-PrOH)</text:p>
          </table:table-cell>
          <table:table-cell table:style-name="ce62" office:value-type="float" office:value="-6812" calcext:value-type="float">
            <text:p>-6812.000000</text:p>
          </table:table-cell>
          <table:table-cell table:style-name="ce3" table:formula="of:=[.P9]*[.A9]*[.E9]/[.M9]" office:value-type="float" office:value="0.795057197669529" calcext:value-type="float">
            <text:p>0.7951</text:p>
          </table:table-cell>
          <table:table-cell table:style-name="ce10" table:formula="of:=(([.B9]-[.T9])/[.B9])^2" office:value-type="float" office:value="0.00000030984138682376" calcext:value-type="float">
            <text:p>3.09841E-07</text:p>
          </table:table-cell>
          <table:table-cell table:style-name="ce10" table:formula="of:=[.N9]+[.U9]" office:value-type="float" office:value="0.000188440034121953" calcext:value-type="float">
            <text:p>1.88440E-04</text:p>
          </table:table-cell>
          <table:table-cell table:style-name="ce6" table:formula="of:=ABS([.C9]-[.M9])" office:value-type="float" office:value="1.38977937619455" calcext:value-type="float">
            <text:p>1.390</text:p>
          </table:table-cell>
          <table:table-cell table:style-name="ce6" table:formula="of:=SUM([.U9:.U29])/21" office:value-type="float" office:value="0.0000303109346746857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6493" calcext:value-type="float">
            <text:p>0.6493</text:p>
          </table:table-cell>
          <table:table-cell table:style-name="ce3" office:value-type="float" office:value="0.7199" calcext:value-type="float">
            <text:p>0.7199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7" calcext:value-type="float">
            <text:p>397.00</text:p>
          </table:table-cell>
          <table:table-cell table:style-name="ce6" table:formula="of:=EXP([.$S$8]+[.$S$9]/[.D10]+[.$S$10]*LN([.D10])+[.$S$11]*[.D10]^[.$S$12])" office:value-type="float" office:value="112.259097445707" calcext:value-type="float">
            <text:p>112.259</text:p>
          </table:table-cell>
          <table:table-cell table:style-name="ce6" table:formula="of:=EXP([.$S$13]+[.$S$14]/[.D10]+[.$S$15]*LN([.D10])+[.$S$16]*[.D10]^[.$S$17])" office:value-type="float" office:value="84.5856850582758" calcext:value-type="float">
            <text:p>84.586</text:p>
          </table:table-cell>
          <table:table-cell table:style-name="ce3" table:formula="of:=[.$S$3]+[.$S$5]/[.D10]" office:value-type="float" office:value="-0.448847142118153" calcext:value-type="float">
            <text:p>-0.4488</text:p>
          </table:table-cell>
          <table:table-cell table:style-name="ce3" table:formula="of:=[.$S$4]+[.$S$6]/[.D10]" office:value-type="float" office:value="0.386372329088115" calcext:value-type="float">
            <text:p>0.3864</text:p>
          </table:table-cell>
          <table:table-cell table:style-name="ce3" table:formula="of:=EXP(-[.$S$7]*[.G10])" office:value-type="float" office:value="1.14414100632076" calcext:value-type="float">
            <text:p>1.1441</text:p>
          </table:table-cell>
          <table:table-cell table:style-name="ce3" table:formula="of:=EXP(-[.$S$7]*[.H10])" office:value-type="float" office:value="0.890553856865439" calcext:value-type="float">
            <text:p>0.8906</text:p>
          </table:table-cell>
          <table:table-cell table:style-name="ce3" table:formula="of:=EXP((1-[.A10])^2*([.H10]*([.J10]/([.A10]+(1-[.A10])*[.J10]))^2+[.G10]*([.I10]/((1-[.A10])+[.A10]*[.I10])^2)))" office:value-type="float" office:value="0.988015684139265" calcext:value-type="float">
            <text:p>0.9880</text:p>
          </table:table-cell>
          <table:table-cell table:style-name="ce3" table:formula="of:=EXP(([.A10])^2*([.G10]*([.I10]/((1-[.A10])+[.A10]*[.I10]))^2+[.H10]*([.J10]/([.A10]+(1-[.A10])*[.J10])^2)))" office:value-type="float" office:value="0.95098842436788" calcext:value-type="float">
            <text:p>0.9510</text:p>
          </table:table-cell>
          <table:table-cell table:style-name="ce6" table:formula="of:=[.A10]*[.K10]*[.E10]+(1-[.A10])*[.L10]*[.F10]" office:value-type="float" office:value="100.226607782442" calcext:value-type="float">
            <text:p>100.227</text:p>
          </table:table-cell>
          <table:table-cell table:style-name="ce10" table:formula="of:=(([.C10]-[.M10])/[.C10])^2" office:value-type="float" office:value="0.000117511851616928" calcext:value-type="float">
            <text:p>1.17512E-04</text:p>
          </table:table-cell>
          <table:table-cell table:style-name="ce11" table:formula="of:=8.314*[.D10]*([.A10]*LN([.K10])+(1-[.A10])*LN([.L10]))" office:value-type="float" office:value="-84.0092816662924" calcext:value-type="float">
            <text:p>-84.0</text:p>
          </table:table-cell>
          <table:table-cell table:style-name="ce3" office:value-type="float" office:value="0.987" calcext:value-type="float">
            <text:p>0.9870</text:p>
          </table:table-cell>
          <table:table-cell table:style-name="ce3" office:value-type="float" office:value="0.952" calcext:value-type="float">
            <text:p>0.9520</text:p>
          </table:table-cell>
          <table:table-cell table:style-name="ce61" office:value-type="string" calcext:value-type="string">
            <text:p>E <text:s/>(1-MeO-2-PrOH)</text:p>
          </table:table-cell>
          <table:table-cell table:style-name="ce62" office:value-type="float" office:value="-5.02" calcext:value-type="float">
            <text:p>-5.020000</text:p>
          </table:table-cell>
          <table:table-cell table:style-name="ce3" table:formula="of:=[.P10]*[.A10]*[.E10]/[.M10]" office:value-type="float" office:value="0.717796059825053" calcext:value-type="float">
            <text:p>0.7178</text:p>
          </table:table-cell>
          <table:table-cell table:style-name="ce10" table:formula="of:=(([.B10]-[.T10])/[.B10])^2" office:value-type="float" office:value="0.00000854126951611405" calcext:value-type="float">
            <text:p>8.54127E-06</text:p>
          </table:table-cell>
          <table:table-cell table:style-name="ce10" table:formula="of:=[.N10]+[.U10]" office:value-type="float" office:value="0.000126053121133042" calcext:value-type="float">
            <text:p>1.26053E-04</text:p>
          </table:table-cell>
          <table:table-cell table:style-name="ce7" table:formula="of:=ABS([.C10]-[.M10])" office:value-type="float" office:value="1.09839221755813" calcext:value-type="float">
            <text:p>1.098</text:p>
          </table:table-cell>
          <table:table-cell table:style-name="ce6" table:formula="of:=SUM([.U10:.U30])/21" office:value-type="float" office:value="0.0000302961803229322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6006" calcext:value-type="float">
            <text:p>0.6006</text:p>
          </table:table-cell>
          <table:table-cell table:style-name="ce3" office:value-type="float" office:value="0.6729" calcext:value-type="float">
            <text:p>0.6729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7.37" calcext:value-type="float">
            <text:p>397.37</text:p>
          </table:table-cell>
          <table:table-cell table:style-name="ce6" table:formula="of:=EXP([.$S$8]+[.$S$9]/[.D11]+[.$S$10]*LN([.D11])+[.$S$11]*[.D11]^[.$S$12])" office:value-type="float" office:value="113.540506035608" calcext:value-type="float">
            <text:p>113.541</text:p>
          </table:table-cell>
          <table:table-cell table:style-name="ce6" table:formula="of:=EXP([.$S$13]+[.$S$14]/[.D11]+[.$S$15]*LN([.D11])+[.$S$16]*[.D11]^[.$S$17])" office:value-type="float" office:value="85.5850748589091" calcext:value-type="float">
            <text:p>85.585</text:p>
          </table:table-cell>
          <table:table-cell table:style-name="ce3" table:formula="of:=[.$S$3]+[.$S$5]/[.D11]" office:value-type="float" office:value="-0.447307566838897" calcext:value-type="float">
            <text:p>-0.4473</text:p>
          </table:table-cell>
          <table:table-cell table:style-name="ce3" table:formula="of:=[.$S$4]+[.$S$6]/[.D11]" office:value-type="float" office:value="0.386844610767623" calcext:value-type="float">
            <text:p>0.3868</text:p>
          </table:table-cell>
          <table:table-cell table:style-name="ce3" table:formula="of:=EXP(-[.$S$7]*[.G11])" office:value-type="float" office:value="1.14361268097686" calcext:value-type="float">
            <text:p>1.1436</text:p>
          </table:table-cell>
          <table:table-cell table:style-name="ce3" table:formula="of:=EXP(-[.$S$7]*[.H11])" office:value-type="float" office:value="0.890427688122364" calcext:value-type="float">
            <text:p>0.8904</text:p>
          </table:table-cell>
          <table:table-cell table:style-name="ce3" table:formula="of:=EXP((1-[.A11])^2*([.H11]*([.J11]/([.A11]+(1-[.A11])*[.J11]))^2+[.G11]*([.I11]/((1-[.A11])+[.A11]*[.I11])^2)))" office:value-type="float" office:value="0.98447244575936" calcext:value-type="float">
            <text:p>0.9845</text:p>
          </table:table-cell>
          <table:table-cell table:style-name="ce3" table:formula="of:=EXP(([.A11])^2*([.G11]*([.I11]/((1-[.A11])+[.A11]*[.I11]))^2+[.H11]*([.J11]/([.A11]+(1-[.A11])*[.J11])^2)))" office:value-type="float" office:value="0.95795253778098" calcext:value-type="float">
            <text:p>0.9580</text:p>
          </table:table-cell>
          <table:table-cell table:style-name="ce6" table:formula="of:=[.A11]*[.K11]*[.E11]+(1-[.A11])*[.L11]*[.F11]" office:value-type="float" office:value="99.8789503006923" calcext:value-type="float">
            <text:p>99.879</text:p>
          </table:table-cell>
          <table:table-cell table:style-name="ce10" table:formula="of:=(([.C11]-[.M11])/[.C11])^2" office:value-type="float" office:value="0.000203672884526073" calcext:value-type="float">
            <text:p>2.03673E-04</text:p>
          </table:table-cell>
          <table:table-cell table:style-name="ce11" table:formula="of:=8.314*[.D11]*([.A11]*LN([.K11])+(1-[.A11])*LN([.L11]))" office:value-type="float" office:value="-87.734146954208" calcext:value-type="float">
            <text:p>-87.7</text:p>
          </table:table-cell>
          <table:table-cell table:style-name="ce3" office:value-type="float" office:value="0.986" calcext:value-type="float">
            <text:p>0.9860</text:p>
          </table:table-cell>
          <table:table-cell table:style-name="ce3" office:value-type="float" office:value="0.965" calcext:value-type="float">
            <text:p>0.9650</text:p>
          </table:table-cell>
          <table:table-cell table:style-name="ce61" office:value-type="string" calcext:value-type="string">
            <text:p>F <text:s/>(1-MeO-2-PrOH)</text:p>
          </table:table-cell>
          <table:table-cell table:style-name="ce62" office:value-type="float" office:value="2.263E-018" calcext:value-type="float">
            <text:p>0.000000</text:p>
          </table:table-cell>
          <table:table-cell table:style-name="ce3" table:formula="of:=[.P11]*[.A11]*[.E11]/[.M11]" office:value-type="float" office:value="0.673192236518429" calcext:value-type="float">
            <text:p>0.6732</text:p>
          </table:table-cell>
          <table:table-cell table:style-name="ce10" table:formula="of:=(([.B11]-[.T11])/[.B11])^2" office:value-type="float" office:value="0.000000188611389225656" calcext:value-type="float">
            <text:p>1.88611E-07</text:p>
          </table:table-cell>
          <table:table-cell table:style-name="ce10" table:formula="of:=[.N11]+[.U11]" office:value-type="float" office:value="0.000203861495915298" calcext:value-type="float">
            <text:p>2.03861E-04</text:p>
          </table:table-cell>
          <table:table-cell table:style-name="ce6" table:formula="of:=ABS([.C11]-[.M11])" office:value-type="float" office:value="1.44604969930775" calcext:value-type="float">
            <text:p>1.446</text:p>
          </table:table-cell>
          <table:table-cell table:style-name="ce6" table:formula="of:=SUM([.U11:.U31])/21" office:value-type="float" office:value="0.0000298894532031172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5923" calcext:value-type="float">
            <text:p>0.5923</text:p>
          </table:table-cell>
          <table:table-cell table:style-name="ce3" office:value-type="float" office:value="0.6667" calcext:value-type="float">
            <text:p>0.6667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7.46" calcext:value-type="float">
            <text:p>397.46</text:p>
          </table:table-cell>
          <table:table-cell table:style-name="ce6" table:formula="of:=EXP([.$S$8]+[.$S$9]/[.D12]+[.$S$10]*LN([.D12])+[.$S$11]*[.D12]^[.$S$12])" office:value-type="float" office:value="113.853972210315" calcext:value-type="float">
            <text:p>113.854</text:p>
          </table:table-cell>
          <table:table-cell table:style-name="ce6" table:formula="of:=EXP([.$S$13]+[.$S$14]/[.D12]+[.$S$15]*LN([.D12])+[.$S$16]*[.D12]^[.$S$17])" office:value-type="float" office:value="85.8296407495405" calcext:value-type="float">
            <text:p>85.830</text:p>
          </table:table-cell>
          <table:table-cell table:style-name="ce3" table:formula="of:=[.$S$3]+[.$S$5]/[.D12]" office:value-type="float" office:value="-0.44693350897193" calcext:value-type="float">
            <text:p>-0.4469</text:p>
          </table:table-cell>
          <table:table-cell table:style-name="ce3" table:formula="of:=[.$S$4]+[.$S$6]/[.D12]" office:value-type="float" office:value="0.386959357139577" calcext:value-type="float">
            <text:p>0.3870</text:p>
          </table:table-cell>
          <table:table-cell table:style-name="ce3" table:formula="of:=EXP(-[.$S$7]*[.G12])" office:value-type="float" office:value="1.14348435498117" calcext:value-type="float">
            <text:p>1.1435</text:p>
          </table:table-cell>
          <table:table-cell table:style-name="ce3" table:formula="of:=EXP(-[.$S$7]*[.H12])" office:value-type="float" office:value="0.890397036645929" calcext:value-type="float">
            <text:p>0.8904</text:p>
          </table:table-cell>
          <table:table-cell table:style-name="ce3" table:formula="of:=EXP((1-[.A12])^2*([.H12]*([.J12]/([.A12]+(1-[.A12])*[.J12]))^2+[.G12]*([.I12]/((1-[.A12])+[.A12]*[.I12])^2)))" office:value-type="float" office:value="0.983845710045586" calcext:value-type="float">
            <text:p>0.9838</text:p>
          </table:table-cell>
          <table:table-cell table:style-name="ce3" table:formula="of:=EXP(([.A12])^2*([.G12]*([.I12]/((1-[.A12])+[.A12]*[.I12]))^2+[.H12]*([.J12]/([.A12]+(1-[.A12])*[.J12])^2)))" office:value-type="float" office:value="0.959147953306554" calcext:value-type="float">
            <text:p>0.9591</text:p>
          </table:table-cell>
          <table:table-cell table:style-name="ce6" table:formula="of:=[.A12]*[.K12]*[.E12]+(1-[.A12])*[.L12]*[.F12]" office:value-type="float" office:value="99.9095510640235" calcext:value-type="float">
            <text:p>99.910</text:p>
          </table:table-cell>
          <table:table-cell table:style-name="ce10" table:formula="of:=(([.C12]-[.M12])/[.C12])^2" office:value-type="float" office:value="0.000195143993247336" calcext:value-type="float">
            <text:p>1.95144E-04</text:p>
          </table:table-cell>
          <table:table-cell table:style-name="ce11" table:formula="of:=8.314*[.D12]*([.A12]*LN([.K12])+(1-[.A12])*LN([.L12]))" office:value-type="float" office:value="-88.0692601295864" calcext:value-type="float">
            <text:p>-88.1</text:p>
          </table:table-cell>
          <table:table-cell table:style-name="ce3" office:value-type="float" office:value="0.988" calcext:value-type="float">
            <text:p>0.9880</text:p>
          </table:table-cell>
          <table:table-cell table:style-name="ce3" office:value-type="float" office:value="0.96" calcext:value-type="float">
            <text:p>0.9600</text:p>
          </table:table-cell>
          <table:table-cell table:style-name="ce61" office:value-type="string" calcext:value-type="string">
            <text:p>G <text:s/>(1-MeO-2-PrOH)</text:p>
          </table:table-cell>
          <table:table-cell table:style-name="ce63" office:value-type="float" office:value="6" calcext:value-type="float">
            <text:p>6.0000</text:p>
          </table:table-cell>
          <table:table-cell table:style-name="ce3" table:formula="of:=[.P12]*[.A12]*[.E12]/[.M12]" office:value-type="float" office:value="0.666867967453806" calcext:value-type="float">
            <text:p>0.6669</text:p>
          </table:table-cell>
          <table:table-cell table:style-name="ce10" table:formula="of:=(([.B12]-[.T12])/[.B12])^2" office:value-type="float" office:value="0.0000000634730499970486" calcext:value-type="float">
            <text:p>6.34730E-08</text:p>
          </table:table-cell>
          <table:table-cell table:style-name="ce10" table:formula="of:=[.N12]+[.U12]" office:value-type="float" office:value="0.000195207466297333" calcext:value-type="float">
            <text:p>1.95207E-04</text:p>
          </table:table-cell>
          <table:table-cell table:style-name="ce7" table:formula="of:=ABS([.C12]-[.M12])" office:value-type="float" office:value="1.41544893597651" calcext:value-type="float">
            <text:p>1.415</text:p>
          </table:table-cell>
          <table:table-cell table:style-name="ce6" table:formula="of:=SUM([.U12:.U32])/21" office:value-type="float" office:value="0.0000298804717083922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559" calcext:value-type="float">
            <text:p>0.5590</text:p>
          </table:table-cell>
          <table:table-cell table:style-name="ce3" office:value-type="float" office:value="0.6348" calcext:value-type="float">
            <text:p>0.6348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7.8" calcext:value-type="float">
            <text:p>397.80</text:p>
          </table:table-cell>
          <table:table-cell table:style-name="ce6" table:formula="of:=EXP([.$S$8]+[.$S$9]/[.D13]+[.$S$10]*LN([.D13])+[.$S$11]*[.D13]^[.$S$12])" office:value-type="float" office:value="115.0444657191" calcext:value-type="float">
            <text:p>115.044</text:p>
          </table:table-cell>
          <table:table-cell table:style-name="ce6" table:formula="of:=EXP([.$S$13]+[.$S$14]/[.D13]+[.$S$15]*LN([.D13])+[.$S$16]*[.D13]^[.$S$17])" office:value-type="float" office:value="86.7587797848414" calcext:value-type="float">
            <text:p>86.759</text:p>
          </table:table-cell>
          <table:table-cell table:style-name="ce3" table:formula="of:=[.$S$3]+[.$S$5]/[.D13]" office:value-type="float" office:value="-0.445521928966262" calcext:value-type="float">
            <text:p>-0.4455</text:p>
          </table:table-cell>
          <table:table-cell table:style-name="ce3" table:formula="of:=[.$S$4]+[.$S$6]/[.D13]" office:value-type="float" office:value="0.387392374858698" calcext:value-type="float">
            <text:p>0.3874</text:p>
          </table:table-cell>
          <table:table-cell table:style-name="ce3" table:formula="of:=EXP(-[.$S$7]*[.G13])" office:value-type="float" office:value="1.14300022160167" calcext:value-type="float">
            <text:p>1.1430</text:p>
          </table:table-cell>
          <table:table-cell table:style-name="ce3" table:formula="of:=EXP(-[.$S$7]*[.H13])" office:value-type="float" office:value="0.890281376850327" calcext:value-type="float">
            <text:p>0.8903</text:p>
          </table:table-cell>
          <table:table-cell table:style-name="ce3" table:formula="of:=EXP((1-[.A13])^2*([.H13]*([.J13]/([.A13]+(1-[.A13])*[.J13]))^2+[.G13]*([.I13]/((1-[.A13])+[.A13]*[.I13])^2)))" office:value-type="float" office:value="0.981203549949171" calcext:value-type="float">
            <text:p>0.9812</text:p>
          </table:table-cell>
          <table:table-cell table:style-name="ce3" table:formula="of:=EXP(([.A13])^2*([.G13]*([.I13]/((1-[.A13])+[.A13]*[.I13]))^2+[.H13]*([.J13]/([.A13]+(1-[.A13])*[.J13])^2)))" office:value-type="float" office:value="0.963732069043906" calcext:value-type="float">
            <text:p>0.9637</text:p>
          </table:table-cell>
          <table:table-cell table:style-name="ce6" table:formula="of:=[.A13]*[.K13]*[.E13]+(1-[.A13])*[.L13]*[.F13]" office:value-type="float" office:value="99.9740476268116" calcext:value-type="float">
            <text:p>99.974</text:p>
          </table:table-cell>
          <table:table-cell table:style-name="ce10" table:formula="of:=(([.C13]-[.M13])/[.C13])^2" office:value-type="float" office:value="0.000177765243596446" calcext:value-type="float">
            <text:p>1.77765E-04</text:p>
          </table:table-cell>
          <table:table-cell table:style-name="ce11" table:formula="of:=8.314*[.D13]*([.A13]*LN([.K13])+(1-[.A13])*LN([.L13]))" office:value-type="float" office:value="-88.9620669764436" calcext:value-type="float">
            <text:p>-89.0</text:p>
          </table:table-cell>
          <table:table-cell table:style-name="ce3" office:value-type="float" office:value="0.986" calcext:value-type="float">
            <text:p>0.9860</text:p>
          </table:table-cell>
          <table:table-cell table:style-name="ce3" office:value-type="float" office:value="0.962" calcext:value-type="float">
            <text:p>0.9620</text:p>
          </table:table-cell>
          <table:table-cell table:style-name="ce61" office:value-type="string" calcext:value-type="string">
            <text:p>A <text:s/>(2-MeO-1-PrOH)</text:p>
          </table:table-cell>
          <table:table-cell table:style-name="ce62" office:value-type="float" office:value="58.47" calcext:value-type="float">
            <text:p>58.470000</text:p>
          </table:table-cell>
          <table:table-cell table:style-name="ce3" table:formula="of:=[.P13]*[.A13]*[.E13]/[.M13]" office:value-type="float" office:value="0.634259788950007" calcext:value-type="float">
            <text:p>0.6343</text:p>
          </table:table-cell>
          <table:table-cell table:style-name="ce10" table:formula="of:=(([.B13]-[.T13])/[.B13])^2" office:value-type="float" office:value="0.000000724190945669256" calcext:value-type="float">
            <text:p>7.24191E-07</text:p>
          </table:table-cell>
          <table:table-cell table:style-name="ce10" table:formula="of:=[.N13]+[.U13]" office:value-type="float" office:value="0.000178489434542115" calcext:value-type="float">
            <text:p>1.78489E-04</text:p>
          </table:table-cell>
          <table:table-cell table:style-name="ce6" table:formula="of:=ABS([.C13]-[.M13])" office:value-type="float" office:value="1.35095237318838" calcext:value-type="float">
            <text:p>1.351</text:p>
          </table:table-cell>
          <table:table-cell table:style-name="ce6" table:formula="of:=SUM([.U13:.U33])/21" office:value-type="float" office:value="0.0000298774491822019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5103" calcext:value-type="float">
            <text:p>0.5103</text:p>
          </table:table-cell>
          <table:table-cell table:style-name="ce3" office:value-type="float" office:value="0.589" calcext:value-type="float">
            <text:p>0.5890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8.25" calcext:value-type="float">
            <text:p>398.25</text:p>
          </table:table-cell>
          <table:table-cell table:style-name="ce6" table:formula="of:=EXP([.$S$8]+[.$S$9]/[.D14]+[.$S$10]*LN([.D14])+[.$S$11]*[.D14]^[.$S$12])" office:value-type="float" office:value="116.635488179266" calcext:value-type="float">
            <text:p>116.635</text:p>
          </table:table-cell>
          <table:table-cell table:style-name="ce6" table:formula="of:=EXP([.$S$13]+[.$S$14]/[.D14]+[.$S$15]*LN([.D14])+[.$S$16]*[.D14]^[.$S$17])" office:value-type="float" office:value="88.0013005415273" calcext:value-type="float">
            <text:p>88.001</text:p>
          </table:table-cell>
          <table:table-cell table:style-name="ce3" table:formula="of:=[.$S$3]+[.$S$5]/[.D14]" office:value-type="float" office:value="-0.443657367354255" calcext:value-type="float">
            <text:p>-0.4437</text:p>
          </table:table-cell>
          <table:table-cell table:style-name="ce3" table:formula="of:=[.$S$4]+[.$S$6]/[.D14]" office:value-type="float" office:value="0.387964349676383" calcext:value-type="float">
            <text:p>0.3880</text:p>
          </table:table-cell>
          <table:table-cell table:style-name="ce3" table:formula="of:=EXP(-[.$S$7]*[.G14])" office:value-type="float" office:value="1.14236104208606" calcext:value-type="float">
            <text:p>1.1424</text:p>
          </table:table-cell>
          <table:table-cell table:style-name="ce3" table:formula="of:=EXP(-[.$S$7]*[.H14])" office:value-type="float" office:value="0.890128624397822" calcext:value-type="float">
            <text:p>0.8901</text:p>
          </table:table-cell>
          <table:table-cell table:style-name="ce3" table:formula="of:=EXP((1-[.A14])^2*([.H14]*([.J14]/([.A14]+(1-[.A14])*[.J14]))^2+[.G14]*([.I14]/((1-[.A14])+[.A14]*[.I14])^2)))" office:value-type="float" office:value="0.976973753069683" calcext:value-type="float">
            <text:p>0.9770</text:p>
          </table:table-cell>
          <table:table-cell table:style-name="ce3" table:formula="of:=EXP(([.A14])^2*([.G14]*([.I14]/((1-[.A14])+[.A14]*[.I14]))^2+[.H14]*([.J14]/([.A14]+(1-[.A14])*[.J14])^2)))" office:value-type="float" office:value="0.969872908169385" calcext:value-type="float">
            <text:p>0.9699</text:p>
          </table:table-cell>
          <table:table-cell table:style-name="ce6" table:formula="of:=[.A14]*[.K14]*[.E14]+(1-[.A14])*[.L14]*[.F14]" office:value-type="float" office:value="99.9445212067476" calcext:value-type="float">
            <text:p>99.945</text:p>
          </table:table-cell>
          <table:table-cell table:style-name="ce10" table:formula="of:=(([.C14]-[.M14])/[.C14])^2" office:value-type="float" office:value="0.000185620635011433" calcext:value-type="float">
            <text:p>1.85621E-04</text:p>
          </table:table-cell>
          <table:table-cell table:style-name="ce11" table:formula="of:=8.314*[.D14]*([.A14]*LN([.K14])+(1-[.A14])*LN([.L14]))" office:value-type="float" office:value="-88.960409061045" calcext:value-type="float">
            <text:p>-89.0</text:p>
          </table:table-cell>
          <table:table-cell table:style-name="ce3" office:value-type="float" office:value="0.989" calcext:value-type="float">
            <text:p>0.9890</text:p>
          </table:table-cell>
          <table:table-cell table:style-name="ce3" office:value-type="float" office:value="0.962" calcext:value-type="float">
            <text:p>0.9620</text:p>
          </table:table-cell>
          <table:table-cell table:style-name="ce61" office:value-type="string" calcext:value-type="string">
            <text:p>B <text:s/>(2-MeO-1-PrOH)</text:p>
          </table:table-cell>
          <table:table-cell table:style-name="ce62" office:value-type="float" office:value="-7185.1" calcext:value-type="float">
            <text:p>-7185.100000</text:p>
          </table:table-cell>
          <table:table-cell table:style-name="ce3" table:formula="of:=[.P14]*[.A14]*[.E14]/[.M14]" office:value-type="float" office:value="0.588970550074623" calcext:value-type="float">
            <text:p>0.5890</text:p>
          </table:table-cell>
          <table:table-cell table:style-name="ce10" table:formula="of:=(([.B14]-[.T14])/[.B14])^2" office:value-type="float" office:value="0.00000000249998733057836" calcext:value-type="float">
            <text:p>2.49999E-09</text:p>
          </table:table-cell>
          <table:table-cell table:style-name="ce10" table:formula="of:=[.N14]+[.U14]" office:value-type="float" office:value="0.000185623134998764" calcext:value-type="float">
            <text:p>1.85623E-04</text:p>
          </table:table-cell>
          <table:table-cell table:style-name="ce7" table:formula="of:=ABS([.C14]-[.M14])" office:value-type="float" office:value="1.38047879325244" calcext:value-type="float">
            <text:p>1.380</text:p>
          </table:table-cell>
          <table:table-cell table:style-name="ce6" table:formula="of:=SUM([.U14:.U34])/21" office:value-type="float" office:value="0.0000298429638990748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4404" calcext:value-type="float">
            <text:p>0.4404</text:p>
          </table:table-cell>
          <table:table-cell table:style-name="ce3" office:value-type="float" office:value="0.5177" calcext:value-type="float">
            <text:p>0.5177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8.9" calcext:value-type="float">
            <text:p>398.90</text:p>
          </table:table-cell>
          <table:table-cell table:style-name="ce6" table:formula="of:=EXP([.$S$8]+[.$S$9]/[.D15]+[.$S$10]*LN([.D15])+[.$S$11]*[.D15]^[.$S$12])" office:value-type="float" office:value="118.964805680345" calcext:value-type="float">
            <text:p>118.965</text:p>
          </table:table-cell>
          <table:table-cell table:style-name="ce6" table:formula="of:=EXP([.$S$13]+[.$S$14]/[.D15]+[.$S$15]*LN([.D15])+[.$S$16]*[.D15]^[.$S$17])" office:value-type="float" office:value="89.8220058187434" calcext:value-type="float">
            <text:p>89.822</text:p>
          </table:table-cell>
          <table:table-cell table:style-name="ce3" table:formula="of:=[.$S$3]+[.$S$5]/[.D15]" office:value-type="float" office:value="-0.440971538569449" calcext:value-type="float">
            <text:p>-0.4410</text:p>
          </table:table-cell>
          <table:table-cell table:style-name="ce3" table:formula="of:=[.$S$4]+[.$S$6]/[.D15]" office:value-type="float" office:value="0.388788257247809" calcext:value-type="float">
            <text:p>0.3888</text:p>
          </table:table-cell>
          <table:table-cell table:style-name="ce3" table:formula="of:=EXP(-[.$S$7]*[.G15])" office:value-type="float" office:value="1.14144095696366" calcext:value-type="float">
            <text:p>1.1414</text:p>
          </table:table-cell>
          <table:table-cell table:style-name="ce3" table:formula="of:=EXP(-[.$S$7]*[.H15])" office:value-type="float" office:value="0.889908636472444" calcext:value-type="float">
            <text:p>0.8899</text:p>
          </table:table-cell>
          <table:table-cell table:style-name="ce3" table:formula="of:=EXP((1-[.A15])^2*([.H15]*([.J15]/([.A15]+(1-[.A15])*[.J15]))^2+[.G15]*([.I15]/((1-[.A15])+[.A15]*[.I15])^2)))" office:value-type="float" office:value="0.970265428235234" calcext:value-type="float">
            <text:p>0.9703</text:p>
          </table:table-cell>
          <table:table-cell table:style-name="ce3" table:formula="of:=EXP(([.A15])^2*([.G15]*([.I15]/((1-[.A15])+[.A15]*[.I15]))^2+[.H15]*([.J15]/([.A15]+(1-[.A15])*[.J15])^2)))" office:value-type="float" office:value="0.977709892959548" calcext:value-type="float">
            <text:p>0.9777</text:p>
          </table:table-cell>
          <table:table-cell table:style-name="ce6" table:formula="of:=[.A15]*[.K15]*[.E15]+(1-[.A15])*[.L15]*[.F15]" office:value-type="float" office:value="99.9782394751476" calcext:value-type="float">
            <text:p>99.978</text:p>
          </table:table-cell>
          <table:table-cell table:style-name="ce10" table:formula="of:=(([.C15]-[.M15])/[.C15])^2" office:value-type="float" office:value="0.000176663785284235" calcext:value-type="float">
            <text:p>1.76664E-04</text:p>
          </table:table-cell>
          <table:table-cell table:style-name="ce11" table:formula="of:=8.314*[.D15]*([.A15]*LN([.K15])+(1-[.A15])*LN([.L15]))" office:value-type="float" office:value="-85.924048174904" calcext:value-type="float">
            <text:p>-85.9</text:p>
          </table:table-cell>
          <table:table-cell table:style-name="ce3" office:value-type="float" office:value="0.987" calcext:value-type="float">
            <text:p>0.9870</text:p>
          </table:table-cell>
          <table:table-cell table:style-name="ce3" office:value-type="float" office:value="0.968" calcext:value-type="float">
            <text:p>0.9680</text:p>
          </table:table-cell>
          <table:table-cell table:style-name="ce61" office:value-type="string" calcext:value-type="string">
            <text:p>E <text:s/>(2-MeO-1-PrOH)</text:p>
          </table:table-cell>
          <table:table-cell table:style-name="ce62" office:value-type="float" office:value="-6.02" calcext:value-type="float">
            <text:p>-6.020000</text:p>
          </table:table-cell>
          <table:table-cell table:style-name="ce3" table:formula="of:=[.P15]*[.A15]*[.E15]/[.M15]" office:value-type="float" office:value="0.51722258150982" calcext:value-type="float">
            <text:p>0.5172</text:p>
          </table:table-cell>
          <table:table-cell table:style-name="ce10" table:formula="of:=(([.B15]-[.T15])/[.B15])^2" office:value-type="float" office:value="0.00000085043698678595" calcext:value-type="float">
            <text:p>8.50437E-07</text:p>
          </table:table-cell>
          <table:table-cell table:style-name="ce10" table:formula="of:=[.N15]+[.U15]" office:value-type="float" office:value="0.000177514222271021" calcext:value-type="float">
            <text:p>1.77514E-04</text:p>
          </table:table-cell>
          <table:table-cell table:style-name="ce6" table:formula="of:=ABS([.C15]-[.M15])" office:value-type="float" office:value="1.3467605248524" calcext:value-type="float">
            <text:p>1.347</text:p>
          </table:table-cell>
          <table:table-cell table:style-name="ce6" table:formula="of:=SUM([.U15:.U35])/21" office:value-type="float" office:value="0.000029842844852059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395" calcext:value-type="float">
            <text:p>0.3950</text:p>
          </table:table-cell>
          <table:table-cell table:style-name="ce3" office:value-type="float" office:value="0.47" calcext:value-type="float">
            <text:p>0.4700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9.33" calcext:value-type="float">
            <text:p>399.33</text:p>
          </table:table-cell>
          <table:table-cell table:style-name="ce6" table:formula="of:=EXP([.$S$8]+[.$S$9]/[.D16]+[.$S$10]*LN([.D16])+[.$S$11]*[.D16]^[.$S$12])" office:value-type="float" office:value="120.526168439784" calcext:value-type="float">
            <text:p>120.526</text:p>
          </table:table-cell>
          <table:table-cell table:style-name="ce6" table:formula="of:=EXP([.$S$13]+[.$S$14]/[.D16]+[.$S$15]*LN([.D16])+[.$S$16]*[.D16]^[.$S$17])" office:value-type="float" office:value="91.0435053247482" calcext:value-type="float">
            <text:p>91.044</text:p>
          </table:table-cell>
          <table:table-cell table:style-name="ce3" table:formula="of:=[.$S$3]+[.$S$5]/[.D16]" office:value-type="float" office:value="-0.439199564879571" calcext:value-type="float">
            <text:p>-0.4392</text:p>
          </table:table-cell>
          <table:table-cell table:style-name="ce3" table:formula="of:=[.$S$4]+[.$S$6]/[.D16]" office:value-type="float" office:value="0.389331829700274" calcext:value-type="float">
            <text:p>0.3893</text:p>
          </table:table-cell>
          <table:table-cell table:style-name="ce3" table:formula="of:=EXP(-[.$S$7]*[.G16])" office:value-type="float" office:value="1.14083433721179" calcext:value-type="float">
            <text:p>1.1408</text:p>
          </table:table-cell>
          <table:table-cell table:style-name="ce3" table:formula="of:=EXP(-[.$S$7]*[.H16])" office:value-type="float" office:value="0.889763529358201" calcext:value-type="float">
            <text:p>0.8898</text:p>
          </table:table-cell>
          <table:table-cell table:style-name="ce3" table:formula="of:=EXP((1-[.A16])^2*([.H16]*([.J16]/([.A16]+(1-[.A16])*[.J16]))^2+[.G16]*([.I16]/((1-[.A16])+[.A16]*[.I16])^2)))" office:value-type="float" office:value="0.965547562440286" calcext:value-type="float">
            <text:p>0.9655</text:p>
          </table:table-cell>
          <table:table-cell table:style-name="ce3" table:formula="of:=EXP(([.A16])^2*([.G16]*([.I16]/((1-[.A16])+[.A16]*[.I16]))^2+[.H16]*([.J16]/([.A16]+(1-[.A16])*[.J16])^2)))" office:value-type="float" office:value="0.98217579610263" calcext:value-type="float">
            <text:p>0.9822</text:p>
          </table:table-cell>
          <table:table-cell table:style-name="ce6" table:formula="of:=[.A16]*[.K16]*[.E16]+(1-[.A16])*[.L16]*[.F16]" office:value-type="float" office:value="100.067170548181" calcext:value-type="float">
            <text:p>100.067</text:p>
          </table:table-cell>
          <table:table-cell table:style-name="ce10" table:formula="of:=(([.C16]-[.M16])/[.C16])^2" office:value-type="float" office:value="0.000154102716345166" calcext:value-type="float">
            <text:p>1.54103E-04</text:p>
          </table:table-cell>
          <table:table-cell table:style-name="ce11" table:formula="of:=8.314*[.D16]*([.A16]*LN([.K16])+(1-[.A16])*LN([.L16]))" office:value-type="float" office:value="-82.1029139460428" calcext:value-type="float">
            <text:p>-82.1</text:p>
          </table:table-cell>
          <table:table-cell table:style-name="ce3" office:value-type="float" office:value="0.986" calcext:value-type="float">
            <text:p>0.9860</text:p>
          </table:table-cell>
          <table:table-cell table:style-name="ce3" office:value-type="float" office:value="0.97" calcext:value-type="float">
            <text:p>0.9700</text:p>
          </table:table-cell>
          <table:table-cell table:style-name="ce61" office:value-type="string" calcext:value-type="string">
            <text:p>F <text:s/>(2-MeO-1-PrOH)</text:p>
          </table:table-cell>
          <table:table-cell table:style-name="ce62" office:value-type="float" office:value="2.2873E-017" calcext:value-type="float">
            <text:p>0.000000</text:p>
          </table:table-cell>
          <table:table-cell table:style-name="ce3" table:formula="of:=[.P16]*[.A16]*[.E16]/[.M16]" office:value-type="float" office:value="0.469098172408516" calcext:value-type="float">
            <text:p>0.4691</text:p>
          </table:table-cell>
          <table:table-cell table:style-name="ce10" table:formula="of:=(([.B16]-[.T16])/[.B16])^2" office:value-type="float" office:value="0.00000368172478389553" calcext:value-type="float">
            <text:p>3.68172E-06</text:p>
          </table:table-cell>
          <table:table-cell table:style-name="ce10" table:formula="of:=[.N16]+[.U16]" office:value-type="float" office:value="0.000157784441129062" calcext:value-type="float">
            <text:p>1.57784E-04</text:p>
          </table:table-cell>
          <table:table-cell table:style-name="ce7" table:formula="of:=ABS([.C16]-[.M16])" office:value-type="float" office:value="1.25782945181949" calcext:value-type="float">
            <text:p>1.258</text:p>
          </table:table-cell>
          <table:table-cell table:style-name="ce6" table:formula="of:=SUM([.U16:.U36])/21" office:value-type="float" office:value="0.0000298023478526883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3396" calcext:value-type="float">
            <text:p>0.3396</text:p>
          </table:table-cell>
          <table:table-cell table:style-name="ce3" office:value-type="float" office:value="0.4106" calcext:value-type="float">
            <text:p>0.4106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399.9" calcext:value-type="float">
            <text:p>399.90</text:p>
          </table:table-cell>
          <table:table-cell table:style-name="ce6" table:formula="of:=EXP([.$S$8]+[.$S$9]/[.D17]+[.$S$10]*LN([.D17])+[.$S$11]*[.D17]^[.$S$12])" office:value-type="float" office:value="122.621198770665" calcext:value-type="float">
            <text:p>122.621</text:p>
          </table:table-cell>
          <table:table-cell table:style-name="ce6" table:formula="of:=EXP([.$S$13]+[.$S$14]/[.D17]+[.$S$15]*LN([.D17])+[.$S$16]*[.D17]^[.$S$17])" office:value-type="float" office:value="92.6838433932974" calcext:value-type="float">
            <text:p>92.684</text:p>
          </table:table-cell>
          <table:table-cell table:style-name="ce3" table:formula="of:=[.$S$3]+[.$S$5]/[.D17]" office:value-type="float" office:value="-0.43685654323004" calcext:value-type="float">
            <text:p>-0.4369</text:p>
          </table:table-cell>
          <table:table-cell table:style-name="ce3" table:formula="of:=[.$S$4]+[.$S$6]/[.D17]" office:value-type="float" office:value="0.390050577406005" calcext:value-type="float">
            <text:p>0.3901</text:p>
          </table:table-cell>
          <table:table-cell table:style-name="ce3" table:formula="of:=EXP(-[.$S$7]*[.G17])" office:value-type="float" office:value="1.1400327191109" calcext:value-type="float">
            <text:p>1.1400</text:p>
          </table:table-cell>
          <table:table-cell table:style-name="ce3" table:formula="of:=EXP(-[.$S$7]*[.H17])" office:value-type="float" office:value="0.889571695392367" calcext:value-type="float">
            <text:p>0.8896</text:p>
          </table:table-cell>
          <table:table-cell table:style-name="ce3" table:formula="of:=EXP((1-[.A17])^2*([.H17]*([.J17]/([.A17]+(1-[.A17])*[.J17]))^2+[.G17]*([.I17]/((1-[.A17])+[.A17]*[.I17])^2)))" office:value-type="float" office:value="0.959537008047868" calcext:value-type="float">
            <text:p>0.9595</text:p>
          </table:table-cell>
          <table:table-cell table:style-name="ce3" table:formula="of:=EXP(([.A17])^2*([.G17]*([.I17]/((1-[.A17])+[.A17]*[.I17]))^2+[.H17]*([.J17]/([.A17]+(1-[.A17])*[.J17])^2)))" office:value-type="float" office:value="0.986975296896749" calcext:value-type="float">
            <text:p>0.9870</text:p>
          </table:table-cell>
          <table:table-cell table:style-name="ce6" table:formula="of:=[.A17]*[.K17]*[.E17]+(1-[.A17])*[.L17]*[.F17]" office:value-type="float" office:value="100.36838156084" calcext:value-type="float">
            <text:p>100.368</text:p>
          </table:table-cell>
          <table:table-cell table:style-name="ce10" table:formula="of:=(([.C17]-[.M17])/[.C17])^2" office:value-type="float" office:value="0.00008913417943953" calcext:value-type="float">
            <text:p>8.91342E-05</text:p>
          </table:table-cell>
          <table:table-cell table:style-name="ce11" table:formula="of:=8.314*[.D17]*([.A17]*LN([.K17])+(1-[.A17])*LN([.L17]))" office:value-type="float" office:value="-75.422353941909" calcext:value-type="float">
            <text:p>-75.4</text:p>
          </table:table-cell>
          <table:table-cell table:style-name="ce3" office:value-type="float" office:value="0.985" calcext:value-type="float">
            <text:p>0.9850</text:p>
          </table:table-cell>
          <table:table-cell table:style-name="ce3" office:value-type="float" office:value="0.971" calcext:value-type="float">
            <text:p>0.9710</text:p>
          </table:table-cell>
          <table:table-cell table:style-name="ce61" office:value-type="string" calcext:value-type="string">
            <text:p>G <text:s/>(2-MeO-1-PrOH)</text:p>
          </table:table-cell>
          <table:table-cell table:style-name="ce63" office:value-type="float" office:value="6" calcext:value-type="float">
            <text:p>6.0000</text:p>
          </table:table-cell>
          <table:table-cell table:style-name="ce3" table:formula="of:=[.P17]*[.A17]*[.E17]/[.M17]" office:value-type="float" office:value="0.408669802960969" calcext:value-type="float">
            <text:p>0.4087</text:p>
          </table:table-cell>
          <table:table-cell table:style-name="ce10" table:formula="of:=(([.B17]-[.T17])/[.B17])^2" office:value-type="float" office:value="0.0000220986325209673" calcext:value-type="float">
            <text:p>2.20986E-05</text:p>
          </table:table-cell>
          <table:table-cell table:style-name="ce10" table:formula="of:=[.N17]+[.U17]" office:value-type="float" office:value="0.000111232811960497" calcext:value-type="float">
            <text:p>1.11233E-04</text:p>
          </table:table-cell>
          <table:table-cell table:style-name="ce6" table:formula="of:=ABS([.C17]-[.M17])" office:value-type="float" office:value="0.956618439159811" calcext:value-type="float">
            <text:p>0.957</text:p>
          </table:table-cell>
          <table:table-cell table:style-name="ce6" table:formula="of:=SUM([.U17:.U37])/21" office:value-type="float" office:value="0.0000296270276248837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3041" calcext:value-type="float">
            <text:p>0.3041</text:p>
          </table:table-cell>
          <table:table-cell table:style-name="ce3" office:value-type="float" office:value="0.3689" calcext:value-type="float">
            <text:p>0.3689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400.22" calcext:value-type="float">
            <text:p>400.22</text:p>
          </table:table-cell>
          <table:table-cell table:style-name="ce6" table:formula="of:=EXP([.$S$8]+[.$S$9]/[.D18]+[.$S$10]*LN([.D18])+[.$S$11]*[.D18]^[.$S$12])" office:value-type="float" office:value="123.810102755821" calcext:value-type="float">
            <text:p>123.810</text:p>
          </table:table-cell>
          <table:table-cell table:style-name="ce6" table:formula="of:=EXP([.$S$13]+[.$S$14]/[.D18]+[.$S$15]*LN([.D18])+[.$S$16]*[.D18]^[.$S$17])" office:value-type="float" office:value="93.6153926678975" calcext:value-type="float">
            <text:p>93.615</text:p>
          </table:table-cell>
          <table:table-cell table:style-name="ce3" table:formula="of:=[.$S$3]+[.$S$5]/[.D18]" office:value-type="float" office:value="-0.435544087767833" calcext:value-type="float">
            <text:p>-0.4355</text:p>
          </table:table-cell>
          <table:table-cell table:style-name="ce3" table:formula="of:=[.$S$4]+[.$S$6]/[.D18]" office:value-type="float" office:value="0.390453187579293" calcext:value-type="float">
            <text:p>0.3905</text:p>
          </table:table-cell>
          <table:table-cell table:style-name="ce3" table:formula="of:=EXP(-[.$S$7]*[.G18])" office:value-type="float" office:value="1.13958393481732" calcext:value-type="float">
            <text:p>1.1396</text:p>
          </table:table-cell>
          <table:table-cell table:style-name="ce3" table:formula="of:=EXP(-[.$S$7]*[.H18])" office:value-type="float" office:value="0.889464256696554" calcext:value-type="float">
            <text:p>0.8895</text:p>
          </table:table-cell>
          <table:table-cell table:style-name="ce3" table:formula="of:=EXP((1-[.A18])^2*([.H18]*([.J18]/([.A18]+(1-[.A18])*[.J18]))^2+[.G18]*([.I18]/((1-[.A18])+[.A18]*[.I18])^2)))" office:value-type="float" office:value="0.9554028460846" calcext:value-type="float">
            <text:p>0.9554</text:p>
          </table:table-cell>
          <table:table-cell table:style-name="ce3" table:formula="of:=EXP(([.A18])^2*([.G18]*([.I18]/((1-[.A18])+[.A18]*[.I18]))^2+[.H18]*([.J18]/([.A18]+(1-[.A18])*[.J18])^2)))" office:value-type="float" office:value="0.989612984121144" calcext:value-type="float">
            <text:p>0.9896</text:p>
          </table:table-cell>
          <table:table-cell table:style-name="ce6" table:formula="of:=[.A18]*[.K18]*[.E18]+(1-[.A18])*[.L18]*[.F18]" office:value-type="float" office:value="100.441809649949" calcext:value-type="float">
            <text:p>100.442</text:p>
          </table:table-cell>
          <table:table-cell table:style-name="ce10" table:formula="of:=(([.C18]-[.M18])/[.C18])^2" office:value-type="float" office:value="0.0000759758216631438" calcext:value-type="float">
            <text:p>7.59758E-05</text:p>
          </table:table-cell>
          <table:table-cell table:style-name="ce11" table:formula="of:=8.314*[.D18]*([.A18]*LN([.K18])+(1-[.A18])*LN([.L18]))" office:value-type="float" office:value="-70.341309873463" calcext:value-type="float">
            <text:p>-70.3</text:p>
          </table:table-cell>
          <table:table-cell table:style-name="ce3" office:value-type="float" office:value="0.979" calcext:value-type="float">
            <text:p>0.9790</text:p>
          </table:table-cell>
          <table:table-cell table:style-name="ce3" office:value-type="float" office:value="0.977" calcext:value-type="float">
            <text:p>0.9770</text:p>
          </table:table-cell>
          <table:table-cell table:style-name="ce61"/>
          <table:table-cell table:style-name="ce63"/>
          <table:table-cell table:style-name="ce3" table:formula="of:=[.P18]*[.A18]*[.E18]/[.M18]" office:value-type="float" office:value="0.366978538910216" calcext:value-type="float">
            <text:p>0.3670</text:p>
          </table:table-cell>
          <table:table-cell table:style-name="ce10" table:formula="of:=(([.B18]-[.T18])/[.B18])^2" office:value-type="float" office:value="0.0000271297553940139" calcext:value-type="float">
            <text:p>2.71298E-05</text:p>
          </table:table-cell>
          <table:table-cell table:style-name="ce10" table:formula="of:=[.N18]+[.U18]" office:value-type="float" office:value="0.000103105577057158" calcext:value-type="float">
            <text:p>1.03106E-04</text:p>
          </table:table-cell>
          <table:table-cell table:style-name="ce7" table:formula="of:=ABS([.C18]-[.M18])" office:value-type="float" office:value="0.883190350051493" calcext:value-type="float">
            <text:p>0.883</text:p>
          </table:table-cell>
          <table:table-cell table:style-name="ce6" table:formula="of:=SUM([.U18:.U38])/21" office:value-type="float" office:value="0.0000285747117905519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2769" calcext:value-type="float">
            <text:p>0.2769</text:p>
          </table:table-cell>
          <table:table-cell table:style-name="ce3" office:value-type="float" office:value="0.3358" calcext:value-type="float">
            <text:p>0.3358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400.48" calcext:value-type="float">
            <text:p>400.48</text:p>
          </table:table-cell>
          <table:table-cell table:style-name="ce6" table:formula="of:=EXP([.$S$8]+[.$S$9]/[.D19]+[.$S$10]*LN([.D19])+[.$S$11]*[.D19]^[.$S$12])" office:value-type="float" office:value="124.782881410719" calcext:value-type="float">
            <text:p>124.783</text:p>
          </table:table-cell>
          <table:table-cell table:style-name="ce6" table:formula="of:=EXP([.$S$13]+[.$S$14]/[.D19]+[.$S$15]*LN([.D19])+[.$S$16]*[.D19]^[.$S$17])" office:value-type="float" office:value="94.3779635662826" calcext:value-type="float">
            <text:p>94.378</text:p>
          </table:table-cell>
          <table:table-cell table:style-name="ce3" table:formula="of:=[.$S$3]+[.$S$5]/[.D19]" office:value-type="float" office:value="-0.43447926208812" calcext:value-type="float">
            <text:p>-0.4345</text:p>
          </table:table-cell>
          <table:table-cell table:style-name="ce3" table:formula="of:=[.$S$4]+[.$S$6]/[.D19]" office:value-type="float" office:value="0.390779834588487" calcext:value-type="float">
            <text:p>0.3908</text:p>
          </table:table-cell>
          <table:table-cell table:style-name="ce3" table:formula="of:=EXP(-[.$S$7]*[.G19])" office:value-type="float" office:value="1.1392199554852" calcext:value-type="float">
            <text:p>1.1392</text:p>
          </table:table-cell>
          <table:table-cell table:style-name="ce3" table:formula="of:=EXP(-[.$S$7]*[.H19])" office:value-type="float" office:value="0.889377098715337" calcext:value-type="float">
            <text:p>0.8894</text:p>
          </table:table-cell>
          <table:table-cell table:style-name="ce3" table:formula="of:=EXP((1-[.A19])^2*([.H19]*([.J19]/([.A19]+(1-[.A19])*[.J19]))^2+[.G19]*([.I19]/((1-[.A19])+[.A19]*[.I19])^2)))" office:value-type="float" office:value="0.952181181665242" calcext:value-type="float">
            <text:p>0.9522</text:p>
          </table:table-cell>
          <table:table-cell table:style-name="ce3" table:formula="of:=EXP(([.A19])^2*([.G19]*([.I19]/((1-[.A19])+[.A19]*[.I19]))^2+[.H19]*([.J19]/([.A19]+(1-[.A19])*[.J19])^2)))" office:value-type="float" office:value="0.991435790714093" calcext:value-type="float">
            <text:p>0.9914</text:p>
          </table:table-cell>
          <table:table-cell table:style-name="ce6" table:formula="of:=[.A19]*[.K19]*[.E19]+(1-[.A19])*[.L19]*[.F19]" office:value-type="float" office:value="100.560369401553" calcext:value-type="float">
            <text:p>100.560</text:p>
          </table:table-cell>
          <table:table-cell table:style-name="ce10" table:formula="of:=(([.C19]-[.M19])/[.C19])^2" office:value-type="float" office:value="0.0000569469044980738" calcext:value-type="float">
            <text:p>5.69469E-05</text:p>
          </table:table-cell>
          <table:table-cell table:style-name="ce11" table:formula="of:=8.314*[.D19]*([.A19]*LN([.K19])+(1-[.A19])*LN([.L19]))" office:value-type="float" office:value="-65.8843933638598" calcext:value-type="float">
            <text:p>-65.9</text:p>
          </table:table-cell>
          <table:table-cell table:style-name="ce3" office:value-type="float" office:value="0.971" calcext:value-type="float">
            <text:p>0.9710</text:p>
          </table:table-cell>
          <table:table-cell table:style-name="ce3" office:value-type="float" office:value="0.981" calcext:value-type="float">
            <text:p>0.9810</text:p>
          </table:table-cell>
          <table:table-cell table:style-name="ce61" office:value-type="string" calcext:value-type="string">
            <text:p>Paper a12</text:p>
          </table:table-cell>
          <table:table-cell table:style-name="ce62" office:value-type="float" office:value="1.2" calcext:value-type="float">
            <text:p>1.200000</text:p>
          </table:table-cell>
          <table:table-cell table:style-name="ce3" table:formula="of:=[.P19]*[.A19]*[.E19]/[.M19]" office:value-type="float" office:value="0.333634025474193" calcext:value-type="float">
            <text:p>0.3336</text:p>
          </table:table-cell>
          <table:table-cell table:style-name="ce10" table:formula="of:=(([.B19]-[.T19])/[.B19])^2" office:value-type="float" office:value="0.0000416049788424922" calcext:value-type="float">
            <text:p>4.16050E-05</text:p>
          </table:table-cell>
          <table:table-cell table:style-name="ce10" table:formula="of:=[.N19]+[.U19]" office:value-type="float" office:value="0.000098551883340566" calcext:value-type="float">
            <text:p>9.85519E-05</text:p>
          </table:table-cell>
          <table:table-cell table:style-name="ce6" table:formula="of:=ABS([.C19]-[.M19])" office:value-type="float" office:value="0.76463059844734" calcext:value-type="float">
            <text:p>0.765</text:p>
          </table:table-cell>
          <table:table-cell table:style-name="ce6" table:formula="of:=SUM([.U19:.U39])/21" office:value-type="float" office:value="0.0000272828186765513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ce3" office:value-type="float" office:value="0.2148" calcext:value-type="float">
            <text:p>0.2148</text:p>
          </table:table-cell>
          <table:table-cell table:style-name="ce3" office:value-type="float" office:value="0.2621" calcext:value-type="float">
            <text:p>0.2621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400.96" calcext:value-type="float">
            <text:p>400.96</text:p>
          </table:table-cell>
          <table:table-cell table:style-name="ce6" table:formula="of:=EXP([.$S$8]+[.$S$9]/[.D20]+[.$S$10]*LN([.D20])+[.$S$11]*[.D20]^[.$S$12])" office:value-type="float" office:value="126.594881536077" calcext:value-type="float">
            <text:p>126.595</text:p>
          </table:table-cell>
          <table:table-cell table:style-name="ce6" table:formula="of:=EXP([.$S$13]+[.$S$14]/[.D20]+[.$S$15]*LN([.D20])+[.$S$16]*[.D20]^[.$S$17])" office:value-type="float" office:value="95.799278306507" calcext:value-type="float">
            <text:p>95.799</text:p>
          </table:table-cell>
          <table:table-cell table:style-name="ce3" table:formula="of:=[.$S$3]+[.$S$5]/[.D20]" office:value-type="float" office:value="-0.432517058145884" calcext:value-type="float">
            <text:p>-0.4325</text:p>
          </table:table-cell>
          <table:table-cell table:style-name="ce3" table:formula="of:=[.$S$4]+[.$S$6]/[.D20]" office:value-type="float" office:value="0.391381762266765" calcext:value-type="float">
            <text:p>0.3914</text:p>
          </table:table-cell>
          <table:table-cell table:style-name="ce3" table:formula="of:=EXP(-[.$S$7]*[.G20])" office:value-type="float" office:value="1.13854953826254" calcext:value-type="float">
            <text:p>1.1385</text:p>
          </table:table-cell>
          <table:table-cell table:style-name="ce3" table:formula="of:=EXP(-[.$S$7]*[.H20])" office:value-type="float" office:value="0.889216511007459" calcext:value-type="float">
            <text:p>0.8892</text:p>
          </table:table-cell>
          <table:table-cell table:style-name="ce3" table:formula="of:=EXP((1-[.A20])^2*([.H20]*([.J20]/([.A20]+(1-[.A20])*[.J20]))^2+[.G20]*([.I20]/((1-[.A20])+[.A20]*[.I20])^2)))" office:value-type="float" office:value="0.944191006160863" calcext:value-type="float">
            <text:p>0.9442</text:p>
          </table:table-cell>
          <table:table-cell table:style-name="ce3" table:formula="of:=EXP(([.A20])^2*([.G20]*([.I20]/((1-[.A20])+[.A20]*[.I20]))^2+[.H20]*([.J20]/([.A20]+(1-[.A20])*[.J20])^2)))" office:value-type="float" office:value="0.994880966248786" calcext:value-type="float">
            <text:p>0.9949</text:p>
          </table:table-cell>
          <table:table-cell table:style-name="ce6" table:formula="of:=[.A20]*[.K20]*[.E20]+(1-[.A20])*[.L20]*[.F20]" office:value-type="float" office:value="100.511521444556" calcext:value-type="float">
            <text:p>100.512</text:p>
          </table:table-cell>
          <table:table-cell table:style-name="ce10" table:formula="of:=(([.C20]-[.M20])/[.C20])^2" office:value-type="float" office:value="0.000064455353213649" calcext:value-type="float">
            <text:p>6.44554E-05</text:p>
          </table:table-cell>
          <table:table-cell table:style-name="ce11" table:formula="of:=8.314*[.D20]*([.A20]*LN([.K20])+(1-[.A20])*LN([.L20]))" office:value-type="float" office:value="-54.5542745284289" calcext:value-type="float">
            <text:p>-54.6</text:p>
          </table:table-cell>
          <table:table-cell table:style-name="ce3" office:value-type="float" office:value="0.963" calcext:value-type="float">
            <text:p>0.9630</text:p>
          </table:table-cell>
          <table:table-cell table:style-name="ce3" office:value-type="float" office:value="0.989" calcext:value-type="float">
            <text:p>0.9890</text:p>
          </table:table-cell>
          <table:table-cell table:style-name="ce61" office:value-type="string" calcext:value-type="string">
            <text:p>Paper a21</text:p>
          </table:table-cell>
          <table:table-cell table:style-name="ce62" office:value-type="float" office:value="0.89" calcext:value-type="float">
            <text:p>0.890000</text:p>
          </table:table-cell>
          <table:table-cell table:style-name="ce3" table:formula="of:=[.P20]*[.A20]*[.E20]/[.M20]" office:value-type="float" office:value="0.260531874327444" calcext:value-type="float">
            <text:p>0.2605</text:p>
          </table:table-cell>
          <table:table-cell table:style-name="ce10" table:formula="of:=(([.B20]-[.T20])/[.B20])^2" office:value-type="float" office:value="0.0000357954385815724" calcext:value-type="float">
            <text:p>3.57954E-05</text:p>
          </table:table-cell>
          <table:table-cell table:style-name="ce10" table:formula="of:=[.N20]+[.U20]" office:value-type="float" office:value="0.000100250791795221" calcext:value-type="float">
            <text:p>1.00251E-04</text:p>
          </table:table-cell>
          <table:table-cell table:style-name="ce7" table:formula="of:=ABS([.C20]-[.M20])" office:value-type="float" office:value="0.813478555444206" calcext:value-type="float">
            <text:p>0.813</text:p>
          </table:table-cell>
          <table:table-cell table:style-name="ce6" table:formula="of:=SUM([.U20:.U40])/21" office:value-type="float" office:value="0.0000253016292078612" calcext:value-type="float">
            <text:p>0.000</text:p>
          </table:table-cell>
          <table:table-cell/>
          <table:table-cell table:style-name="ce24" office:value-type="string" calcext:value-type="string">
            <text:p>Extended Antoine Constants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G</text:p>
          </table:table-cell>
          <table:table-cell table:style-name="Default" table:number-columns-repeated="16353"/>
        </table:table-row>
        <table:table-row table:style-name="ro1">
          <table:table-cell table:style-name="ce3" office:value-type="float" office:value="0.1663" calcext:value-type="float">
            <text:p>0.1663</text:p>
          </table:table-cell>
          <table:table-cell table:style-name="ce3" office:value-type="float" office:value="0.1985" calcext:value-type="float">
            <text:p>0.1985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401.48" calcext:value-type="float">
            <text:p>401.48</text:p>
          </table:table-cell>
          <table:table-cell table:style-name="ce6" table:formula="of:=EXP([.$S$8]+[.$S$9]/[.D21]+[.$S$10]*LN([.D21])+[.$S$11]*[.D21]^[.$S$12])" office:value-type="float" office:value="128.581623857654" calcext:value-type="float">
            <text:p>128.582</text:p>
          </table:table-cell>
          <table:table-cell table:style-name="ce6" table:formula="of:=EXP([.$S$13]+[.$S$14]/[.D21]+[.$S$15]*LN([.D21])+[.$S$16]*[.D21]^[.$S$17])" office:value-type="float" office:value="97.3589549470598" calcext:value-type="float">
            <text:p>97.359</text:p>
          </table:table-cell>
          <table:table-cell table:style-name="ce3" table:formula="of:=[.$S$3]+[.$S$5]/[.D21]" office:value-type="float" office:value="-0.430396631920371" calcext:value-type="float">
            <text:p>-0.4304</text:p>
          </table:table-cell>
          <table:table-cell table:style-name="ce3" table:formula="of:=[.$S$4]+[.$S$6]/[.D21]" office:value-type="float" office:value="0.392032226373686" calcext:value-type="float">
            <text:p>0.3920</text:p>
          </table:table-cell>
          <table:table-cell table:style-name="ce3" table:formula="of:=EXP(-[.$S$7]*[.G21])" office:value-type="float" office:value="1.13782550548568" calcext:value-type="float">
            <text:p>1.1378</text:p>
          </table:table-cell>
          <table:table-cell table:style-name="ce3" table:formula="of:=EXP(-[.$S$7]*[.H21])" office:value-type="float" office:value="0.88904300690963" calcext:value-type="float">
            <text:p>0.8890</text:p>
          </table:table-cell>
          <table:table-cell table:style-name="ce3" table:formula="of:=EXP((1-[.A21])^2*([.H21]*([.J21]/([.A21]+(1-[.A21])*[.J21]))^2+[.G21]*([.I21]/((1-[.A21])+[.A21]*[.I21])^2)))" office:value-type="float" office:value="0.938210167028939" calcext:value-type="float">
            <text:p>0.9382</text:p>
          </table:table-cell>
          <table:table-cell table:style-name="ce3" table:formula="of:=EXP(([.A21])^2*([.G21]*([.I21]/((1-[.A21])+[.A21]*[.I21]))^2+[.H21]*([.J21]/([.A21]+(1-[.A21])*[.J21])^2)))" office:value-type="float" office:value="0.996981500506518" calcext:value-type="float">
            <text:p>0.9970</text:p>
          </table:table-cell>
          <table:table-cell table:style-name="ce6" table:formula="of:=[.A21]*[.K21]*[.E21]+(1-[.A21])*[.L21]*[.F21]" office:value-type="float" office:value="100.985019071517" calcext:value-type="float">
            <text:p>100.985</text:p>
          </table:table-cell>
          <table:table-cell table:style-name="ce10" table:formula="of:=(([.C21]-[.M21])/[.C21])^2" office:value-type="float" office:value="0.0000112583795654906" calcext:value-type="float">
            <text:p>1.12584E-05</text:p>
          </table:table-cell>
          <table:table-cell table:style-name="ce11" table:formula="of:=8.314*[.D21]*([.A21]*LN([.K21])+(1-[.A21])*LN([.L21]))" office:value-type="float" office:value="-43.8172037908246" calcext:value-type="float">
            <text:p>-43.8</text:p>
          </table:table-cell>
          <table:table-cell table:style-name="ce3" office:value-type="float" office:value="0.927" calcext:value-type="float">
            <text:p>0.9270</text:p>
          </table:table-cell>
          <table:table-cell table:style-name="ce3" office:value-type="float" office:value="0.996" calcext:value-type="float">
            <text:p>0.9960</text:p>
          </table:table-cell>
          <table:table-cell table:style-name="ce61" office:value-type="string" calcext:value-type="string">
            <text:p>Paper b12</text:p>
          </table:table-cell>
          <table:table-cell table:style-name="ce62" office:value-type="float" office:value="-657.84" calcext:value-type="float">
            <text:p>-657.840000</text:p>
          </table:table-cell>
          <table:table-cell table:style-name="ce3" table:formula="of:=[.P21]*[.A21]*[.E21]/[.M21]" office:value-type="float" office:value="0.196288084849699" calcext:value-type="float">
            <text:p>0.1963</text:p>
          </table:table-cell>
          <table:table-cell table:style-name="ce10" table:formula="of:=(([.B21]-[.T21])/[.B21])^2" office:value-type="float" office:value="0.000124169777922117" calcext:value-type="float">
            <text:p>1.24170E-04</text:p>
          </table:table-cell>
          <table:table-cell table:style-name="ce10" table:formula="of:=[.N21]+[.U21]" office:value-type="float" office:value="0.000135428157487607" calcext:value-type="float">
            <text:p>1.35428E-04</text:p>
          </table:table-cell>
          <table:table-cell table:style-name="ce6" table:formula="of:=ABS([.C21]-[.M21])" office:value-type="float" office:value="0.339980928483328" calcext:value-type="float">
            <text:p>0.340</text:p>
          </table:table-cell>
          <table:table-cell table:style-name="ce6" table:formula="of:=SUM([.U21:.U41])/21" office:value-type="float" office:value="0.0000235970845135006" calcext:value-type="float">
            <text:p>0.000</text:p>
          </table:table-cell>
          <table:table-cell/>
          <table:table-cell table:style-name="ce25" office:value-type="string" calcext:value-type="string">
            <text:p>1-MeO-2-PrOH</text:p>
          </table:table-cell>
          <table:table-cell table:style-name="ce8" office:value-type="float" office:value="51.91" calcext:value-type="float">
            <text:p>51.91</text:p>
          </table:table-cell>
          <table:table-cell table:style-name="ce11" office:value-type="float" office:value="-6812" calcext:value-type="float">
            <text:p>-6812.0</text:p>
          </table:table-cell>
          <table:table-cell table:style-name="ce6" office:value-type="float" office:value="-5.02" calcext:value-type="float">
            <text:p>-5.020</text:p>
          </table:table-cell>
          <table:table-cell table:style-name="ce27" office:value-type="float" office:value="2.263E-018" calcext:value-type="float">
            <text:p>2.26E-18</text:p>
          </table:table-cell>
          <table:table-cell table:style-name="ce29" office:value-type="float" office:value="6" calcext:value-type="float">
            <text:p>6</text:p>
          </table:table-cell>
          <table:table-cell table:style-name="Default" table:number-columns-repeated="16353"/>
        </table:table-row>
        <table:table-row table:style-name="ro1">
          <table:table-cell table:style-name="ce3" office:value-type="float" office:value="0.1451" calcext:value-type="float">
            <text:p>0.1451</text:p>
          </table:table-cell>
          <table:table-cell table:style-name="ce3" office:value-type="float" office:value="0.1702" calcext:value-type="float">
            <text:p>0.1702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401.69" calcext:value-type="float">
            <text:p>401.69</text:p>
          </table:table-cell>
          <table:table-cell table:style-name="ce6" table:formula="of:=EXP([.$S$8]+[.$S$9]/[.D22]+[.$S$10]*LN([.D22])+[.$S$11]*[.D22]^[.$S$12])" office:value-type="float" office:value="129.391009981324" calcext:value-type="float">
            <text:p>129.391</text:p>
          </table:table-cell>
          <table:table-cell table:style-name="ce6" table:formula="of:=EXP([.$S$13]+[.$S$14]/[.D22]+[.$S$15]*LN([.D22])+[.$S$16]*[.D22]^[.$S$17])" office:value-type="float" office:value="97.9947444216739" calcext:value-type="float">
            <text:p>97.995</text:p>
          </table:table-cell>
          <table:table-cell table:style-name="ce3" table:formula="of:=[.$S$3]+[.$S$5]/[.D22]" office:value-type="float" office:value="-0.42954186216456" calcext:value-type="float">
            <text:p>-0.4295</text:p>
          </table:table-cell>
          <table:table-cell table:style-name="ce3" table:formula="of:=[.$S$4]+[.$S$6]/[.D22]" office:value-type="float" office:value="0.392294436413888" calcext:value-type="float">
            <text:p>0.3923</text:p>
          </table:table-cell>
          <table:table-cell table:style-name="ce3" table:formula="of:=EXP(-[.$S$7]*[.G22])" office:value-type="float" office:value="1.13753376924353" calcext:value-type="float">
            <text:p>1.1375</text:p>
          </table:table-cell>
          <table:table-cell table:style-name="ce3" table:formula="of:=EXP(-[.$S$7]*[.H22])" office:value-type="float" office:value="0.888973074859424" calcext:value-type="float">
            <text:p>0.8890</text:p>
          </table:table-cell>
          <table:table-cell table:style-name="ce3" table:formula="of:=EXP((1-[.A22])^2*([.H22]*([.J22]/([.A22]+(1-[.A22])*[.J22]))^2+[.G22]*([.I22]/((1-[.A22])+[.A22]*[.I22])^2)))" office:value-type="float" office:value="0.93549729620731" calcext:value-type="float">
            <text:p>0.9355</text:p>
          </table:table-cell>
          <table:table-cell table:style-name="ce3" table:formula="of:=EXP(([.A22])^2*([.G22]*([.I22]/((1-[.A22])+[.A22]*[.I22]))^2+[.H22]*([.J22]/([.A22]+(1-[.A22])*[.J22])^2)))" office:value-type="float" office:value="0.997716926640704" calcext:value-type="float">
            <text:p>0.9977</text:p>
          </table:table-cell>
          <table:table-cell table:style-name="ce6" table:formula="of:=[.A22]*[.K22]*[.E22]+(1-[.A22])*[.L22]*[.F22]" office:value-type="float" office:value="101.14806171397" calcext:value-type="float">
            <text:p>101.148</text:p>
          </table:table-cell>
          <table:table-cell table:style-name="ce10" table:formula="of:=(([.C22]-[.M22])/[.C22])^2" office:value-type="float" office:value="0.00000304937199312578" calcext:value-type="float">
            <text:p>3.04937E-06</text:p>
          </table:table-cell>
          <table:table-cell table:style-name="ce11" table:formula="of:=8.314*[.D22]*([.A22]*LN([.K22])+(1-[.A22])*LN([.L22]))" office:value-type="float" office:value="-38.8363532512768" calcext:value-type="float">
            <text:p>-38.8</text:p>
          </table:table-cell>
          <table:table-cell table:style-name="ce3" office:value-type="float" office:value="0.906" calcext:value-type="float">
            <text:p>0.9060</text:p>
          </table:table-cell>
          <table:table-cell table:style-name="ce3" office:value-type="float" office:value="0.999" calcext:value-type="float">
            <text:p>0.9990</text:p>
          </table:table-cell>
          <table:table-cell table:style-name="ce61" office:value-type="string" calcext:value-type="string">
            <text:p>Paper b21</text:p>
          </table:table-cell>
          <table:table-cell table:style-name="ce62" office:value-type="float" office:value="-202.48" calcext:value-type="float">
            <text:p>-202.480000</text:p>
          </table:table-cell>
          <table:table-cell table:style-name="ce3" table:formula="of:=[.P22]*[.A22]*[.E22]/[.M22]" office:value-type="float" office:value="0.168167531028441" calcext:value-type="float">
            <text:p>0.1682</text:p>
          </table:table-cell>
          <table:table-cell table:style-name="ce10" table:formula="of:=(([.B22]-[.T22])/[.B22])^2" office:value-type="float" office:value="0.000142603024586694" calcext:value-type="float">
            <text:p>1.42603E-04</text:p>
          </table:table-cell>
          <table:table-cell table:style-name="ce10" table:formula="of:=[.N22]+[.U22]" office:value-type="float" office:value="0.00014565239657982" calcext:value-type="float">
            <text:p>1.45652E-04</text:p>
          </table:table-cell>
          <table:table-cell table:style-name="ce7" table:formula="of:=ABS([.C22]-[.M22])" office:value-type="float" office:value="0.176938286029738" calcext:value-type="float">
            <text:p>0.177</text:p>
          </table:table-cell>
          <table:table-cell table:style-name="ce6" table:formula="of:=SUM([.U22:.U42])/21" office:value-type="float" office:value="0.0000176842379457807" calcext:value-type="float">
            <text:p>0.000</text:p>
          </table:table-cell>
          <table:table-cell/>
          <table:table-cell table:style-name="ce25" office:value-type="string" calcext:value-type="string">
            <text:p>2-MeO-1-PrOH</text:p>
          </table:table-cell>
          <table:table-cell table:style-name="ce8" office:value-type="float" office:value="58.47" calcext:value-type="float">
            <text:p>58.47</text:p>
          </table:table-cell>
          <table:table-cell table:style-name="ce11" office:value-type="float" office:value="-7185.1" calcext:value-type="float">
            <text:p>-7185.1</text:p>
          </table:table-cell>
          <table:table-cell table:style-name="ce6" office:value-type="float" office:value="-6.02" calcext:value-type="float">
            <text:p>-6.020</text:p>
          </table:table-cell>
          <table:table-cell table:style-name="ce27" office:value-type="float" office:value="2.2873E-017" calcext:value-type="float">
            <text:p>2.29E-17</text:p>
          </table:table-cell>
          <table:table-cell table:style-name="ce29" office:value-type="float" office:value="6" calcext:value-type="float">
            <text:p>6</text:p>
          </table:table-cell>
          <table:table-cell table:style-name="Default" table:number-columns-repeated="16353"/>
        </table:table-row>
        <table:table-row table:style-name="ro1">
          <table:table-cell table:style-name="ce3" office:value-type="float" office:value="0.0903" calcext:value-type="float">
            <text:p>0.0903</text:p>
          </table:table-cell>
          <table:table-cell table:style-name="ce3" office:value-type="float" office:value="0.101" calcext:value-type="float">
            <text:p>0.1010</text:p>
          </table:table-cell>
          <table:table-cell table:style-name="ce6" office:value-type="float" office:value="101.325" calcext:value-type="float">
            <text:p>101.325</text:p>
          </table:table-cell>
          <table:table-cell table:style-name="ce8" office:value-type="float" office:value="402.16" calcext:value-type="float">
            <text:p>402.16</text:p>
          </table:table-cell>
          <table:table-cell table:style-name="ce6" table:formula="of:=EXP([.$S$8]+[.$S$9]/[.D23]+[.$S$10]*LN([.D23])+[.$S$11]*[.D23]^[.$S$12])" office:value-type="float" office:value="131.217287251002" calcext:value-type="float">
            <text:p>131.217</text:p>
          </table:table-cell>
          <table:table-cell table:style-name="ce6" table:formula="of:=EXP([.$S$13]+[.$S$14]/[.D23]+[.$S$15]*LN([.D23])+[.$S$16]*[.D23]^[.$S$17])" office:value-type="float" office:value="99.4301433873288" calcext:value-type="float">
            <text:p>99.430</text:p>
          </table:table-cell>
          <table:table-cell table:style-name="ce3" table:formula="of:=[.$S$3]+[.$S$5]/[.D23]" office:value-type="float" office:value="-0.427632040772284" calcext:value-type="float">
            <text:p>-0.4276</text:p>
          </table:table-cell>
          <table:table-cell table:style-name="ce3" table:formula="of:=[.$S$4]+[.$S$6]/[.D23]" office:value-type="float" office:value="0.39288029516783" calcext:value-type="float">
            <text:p>0.3929</text:p>
          </table:table-cell>
          <table:table-cell table:style-name="ce3" table:formula="of:=EXP(-[.$S$7]*[.G23])" office:value-type="float" office:value="1.13688221001753" calcext:value-type="float">
            <text:p>1.1369</text:p>
          </table:table-cell>
          <table:table-cell table:style-name="ce3" table:formula="of:=EXP(-[.$S$7]*[.H23])" office:value-type="float" office:value="0.888816844791761" calcext:value-type="float">
            <text:p>0.8888</text:p>
          </table:table-cell>
          <table:table-cell table:style-name="ce3" table:formula="of:=EXP((1-[.A23])^2*([.H23]*([.J23]/([.A23]+(1-[.A23])*[.J23]))^2+[.G23]*([.I23]/((1-[.A23])+[.A23]*[.I23])^2)))" office:value-type="float" office:value="0.928060819542152" calcext:value-type="float">
            <text:p>0.9281</text:p>
          </table:table-cell>
          <table:table-cell table:style-name="ce3" table:formula="of:=EXP(([.A23])^2*([.G23]*([.I23]/((1-[.A23])+[.A23]*[.I23]))^2+[.H23]*([.J23]/([.A23]+(1-[.A23])*[.J23])^2)))" office:value-type="float" office:value="0.999127129661924" calcext:value-type="float">
            <text:p>0.9991</text:p>
          </table:table-cell>
          <table:table-cell table:style-name="ce6" table:formula="of:=[.A23]*[.K23]*[.E23]+(1-[.A23])*[.L23]*[.F23]" office:value-type="float" office:value="101.369168289452" calcext:value-type="float">
            <text:p>101.369</text:p>
          </table:table-cell>
          <table:table-cell table:style-name="ce10" table:formula="of:=(([.C23]-[.M23])/[.C23])^2" office:value-type="float" office:value="0.000000190015021723173" calcext:value-type="float">
            <text:p>1.90015E-07</text:p>
          </table:table-cell>
          <table:table-cell table:style-name="ce11" table:formula="of:=8.314*[.D23]*([.A23]*LN([.K23])+(1-[.A23])*LN([.L23]))" office:value-type="float" office:value="-25.1971057411363" calcext:value-type="float">
            <text:p>-25.2</text:p>
          </table:table-cell>
          <table:table-cell table:style-name="ce3" office:value-type="float" office:value="0.851" calcext:value-type="float">
            <text:p>0.8510</text:p>
          </table:table-cell>
          <table:table-cell table:style-name="ce3" office:value-type="float" office:value="1.002" calcext:value-type="float">
            <text:p>1.0020</text:p>
          </table:table-cell>
          <table:table-cell table:style-name="ce3" table:number-columns-repeated="2"/>
          <table:table-cell table:style-name="ce3" table:formula="of:=[.P23]*[.A23]*[.E23]/[.M23]" office:value-type="float" office:value="0.0994723738405048" calcext:value-type="float">
            <text:p>0.0995</text:p>
          </table:table-cell>
          <table:table-cell table:style-name="ce10" table:formula="of:=(([.B23]-[.T23])/[.B23])^2" office:value-type="float" office:value="0.000228765972274701" calcext:value-type="float">
            <text:p>2.28766E-04</text:p>
          </table:table-cell>
          <table:table-cell table:style-name="ce10" table:formula="of:=[.N23]+[.U23]" office:value-type="float" office:value="0.000228955987296424" calcext:value-type="float">
            <text:p>2.28956E-04</text:p>
          </table:table-cell>
          <table:table-cell table:style-name="ce6" table:formula="of:=ABS([.C23]-[.M23])" office:value-type="float" office:value="0.044168289451946" calcext:value-type="float">
            <text:p>0.044</text:p>
          </table:table-cell>
          <table:table-cell table:style-name="ce6" table:formula="of:=SUM([.U23:.U43])/21" office:value-type="float" office:value="0.0000108936177273667" calcext:value-type="float">
            <text:p>0.000</text:p>
          </table:table-cell>
          <table:table-cell table:number-columns-repeated="7"/>
          <table:table-cell table:style-name="Default" table:number-columns-repeated="16353"/>
        </table:table-row>
        <table:table-row table:style-name="ro1">
          <table:table-cell table:style-name="Default"/>
          <table:table-cell table:number-columns-repeated="16"/>
          <table:table-cell table:style-name="ce17"/>
          <table:table-cell table:number-columns-repeated="3"/>
          <table:table-cell table:style-name="ce36" table:formula="of:=SUM([.V3:.V23])" office:value-type="float" office:value="0.00358495282344516" calcext:value-type="float">
            <text:p>0.00358495282344516</text:p>
          </table:table-cell>
          <table:table-cell table:style-name="ce36" table:formula="of:=SUM([.W3:.W23])/21" office:value-type="float" office:value="1.08284381899994" calcext:value-type="float">
            <text:p>1.08284381899994</text:p>
          </table:table-cell>
          <table:table-cell table:style-name="ce36" table:formula="of:=(SUM([.X3:.X23])/21)^0.5" office:value-type="float" office:value="0.00533364932548482" calcext:value-type="float">
            <text:p>0.00533364932548482</text:p>
          </table:table-cell>
          <table:table-cell table:number-columns-repeated="7"/>
          <table:table-cell table:style-name="Default" table:number-columns-repeated="16353"/>
        </table:table-row>
        <table:table-row table:style-name="ro1" table:number-rows-repeated="3">
          <table:table-cell table:number-columns-repeated="17"/>
          <table:table-cell table:style-name="ce17"/>
          <table:table-cell table:number-columns-repeated="13"/>
          <table:table-cell table:style-name="Default" table:number-columns-repeated="16353"/>
        </table:table-row>
        <table:table-row table:style-name="ro4" table:number-rows-repeated="1048548">
          <table:table-cell table:number-columns-repeated="31"/>
          <table:table-cell table:style-name="Default" table:number-columns-repeated="16353"/>
        </table:table-row>
        <table:table-row table:style-name="ro4">
          <table:table-cell table:number-columns-repeated="31"/>
          <table:table-cell table:style-name="Default" table:number-columns-repeated="163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 loext:blank-width-char="-1">- 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8">
      <number:number number:decimal-places="1" number:min-decimal-places="1" number:min-integer-digits="1"/>
    </number:number-style>
    <number:number-style style:name="N139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5:15:24.25741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ys1_20_1MeO2PrOH_2b_Water" style:display-name="PageStyle_Sys1 1MeO2PrOH+Wa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ys2_20_2MeO1PrOH_2b_Water" style:display-name="PageStyle_Sys2 2MeO1PrOH+Wa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ys3_20_1MeO2PrOH_2b_2MeO1PrOH" style:display-name="PageStyle_Sys3 1MeO2PrOH+2MeO1PrO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2T20:28:05</meta:creation-date>
    <meta:initial-creator>openpyxl</meta:initial-creator>
    <dc:language>en-IN</dc:language>
    <dc:date>2026-04-23T15:32:57.959967100</dc:date>
    <meta:editing-cycles>4</meta:editing-cycles>
    <meta:editing-duration>PT19M4S</meta:editing-duration>
    <meta:generator>LibreOffice/26.2.2.2$Windows_X86_64 LibreOffice_project/1f77d10d6938fd34972958f64b2bcfa54f8b1ba5</meta:generator>
    <meta:document-statistic meta:table-count="3" meta:cell-count="1418" meta:object-count="3"/>
    <meta:user-defined meta:name="AppVersion">15.00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2">
      <number:number number:decimal-places="2" number:min-decimal-places="2" number:min-integer-digits="1"/>
    </number:number-style>
    <number:number-style style:name="N135">
      <number:number number:decimal-places="4" number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135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2">
      <style:chart-properties chart:symbol-type="named-symbol" chart:symbol-name="circle" chart:symbol-width="0.176cm" chart:symbol-height="0.176cm" chart:link-data-style-to-source="true" chart:label-position="right"/>
      <style:graphic-properties svg:stroke-width="0.05cm" svg:stroke-color="#1f77b4" draw:fill-color="#1f77b4"/>
      <style:text-properties fo:color="#000000" style:text-position="0% 100%" fo:font-family="Arial"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176cm" chart:symbol-height="0.176cm" chart:link-data-style-to-source="true" chart:label-position="right"/>
      <style:graphic-properties svg:stroke-width="0.05cm" svg:stroke-color="#ff7f0e" draw:fill-color="#ff7f0e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2">
      <style:chart-properties chart:symbol-type="named-symbol" chart:symbol-name="horizontal-bar" chart:symbol-width="0.176cm" chart:symbol-height="0.176cm" chart:link-data-style-to-source="true" chart:label-position="right"/>
      <style:graphic-properties svg:stroke-width="0.05cm" svg:stroke-color="#2ca02c" draw:fill-color="#2ca02c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</office:automatic-styles>
  <office:body>
    <office:chart>
      <chart:chart svg:width="13.358cm" svg:height="9.999cm" xlink:href=".." xlink:type="simple" chart:class="chart:scatter" chart:style-name="ch1">
        <chart:title svg:x="2.12cm" svg:y="0.335cm" chart:style-name="ch2">
          <text:p><text:span text:style-name="T1">Sys1 1MeO2PrOH+Water: T-x1-y1</text:span></text:p>
        </chart:title>
        <chart:legend chart:legend-position="end" svg:x="10.285cm" svg:y="4.268cm" style:legend-expansion="high" chart:style-name="ch3"/>
        <chart:plot-area chart:style-name="ch4" svg:x="1.283cm" svg:y="1.551cm" svg:width="8.735cm" svg:height="7.263cm">
          <chart:coordinate-region svg:x="2.367cm" svg:y="1.729cm" svg:width="7.158cm" svg:height="6.633cm"/>
          <chart:axis chart:dimension="x" chart:name="primary-x" chart:style-name="ch5">
            <chart:title svg:x="4.567cm" svg:y="9.014cm" chart:style-name="ch2">
              <text:p><text:span text:style-name="T2">Mole Fraction</text:span></text:p>
            </chart:title>
            <chart:grid chart:style-name="ch6" chart:class="major"/>
          </chart:axis>
          <chart:axis chart:dimension="y" chart:name="primary-y" chart:style-name="ch7">
            <chart:title svg:x="0.451cm" svg:y="5.58cm" chart:style-name="ch8">
              <text:p><text:span text:style-name="T2">T (K)</text:span></text:p>
            </chart:title>
            <chart:grid chart:style-name="ch6" chart:class="major"/>
          </chart:axis>
          <chart:series chart:style-name="ch9" chart:values-cell-range-address="'Sys1 1MeO2PrOH+Water'.D3:'Sys1 1MeO2PrOH+Water'.D16" loext:label-string="&quot;T vs x1&quot;" chart:class="chart:scatter">
            <chart:domain table:cell-range-address="'Sys1 1MeO2PrOH+Water'.A3:'Sys1 1MeO2PrOH+Water'.A16"/>
            <chart:data-point chart:repeated="14"/>
          </chart:series>
          <chart:series chart:style-name="ch10" chart:values-cell-range-address="'Sys1 1MeO2PrOH+Water'.D3:'Sys1 1MeO2PrOH+Water'.D16" loext:label-string="&quot;T vs y1(exp)&quot;" chart:class="chart:scatter">
            <chart:domain table:cell-range-address="'Sys1 1MeO2PrOH+Water'.B3:'Sys1 1MeO2PrOH+Water'.B16"/>
            <chart:data-point chart:repeated="14"/>
          </chart:series>
          <chart:series chart:style-name="ch11" chart:values-cell-range-address="'Sys1 1MeO2PrOH+Water'.D3:'Sys1 1MeO2PrOH+Water'.D16" loext:label-string="&quot;T vs y1(calc)&quot;" chart:class="chart:scatter">
            <chart:domain table:cell-range-address="'Sys1 1MeO2PrOH+Water'.T3:'Sys1 1MeO2PrOH+Water'.T16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 vs x1</text:p>
              </table:table-cell>
              <table:table-cell office:value-type="string">
                <text:p>Column B</text:p>
              </table:table-cell>
              <table:table-cell office:value-type="string">
                <text:p>T vs y1(exp)</text:p>
              </table:table-cell>
              <table:table-cell office:value-type="string">
                <text:p>Column T</text:p>
              </table:table-cell>
              <table:table-cell office:value-type="string">
                <text:p>T vs y1(cal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9">
                <text:p>0.989</text:p>
                <draw:g>
                  <svg:desc>'Sys1 1MeO2PrOH+Water'.A3:'Sys1 1MeO2PrOH+Water'.A16</svg:desc>
                </draw:g>
              </table:table-cell>
              <table:table-cell office:value-type="float" office:value="391.41">
                <text:p>391.41</text:p>
                <draw:g>
                  <svg:desc>'Sys1 1MeO2PrOH+Water'.D3:'Sys1 1MeO2PrOH+Water'.D16</svg:desc>
                </draw:g>
              </table:table-cell>
              <table:table-cell office:value-type="float" office:value="0.949">
                <text:p>0.949</text:p>
                <draw:g>
                  <svg:desc>'Sys1 1MeO2PrOH+Water'.B3:'Sys1 1MeO2PrOH+Water'.B16</svg:desc>
                </draw:g>
              </table:table-cell>
              <table:table-cell office:value-type="float" office:value="391.41">
                <text:p>391.41</text:p>
                <draw:g>
                  <svg:desc>'Sys1 1MeO2PrOH+Water'.D3:'Sys1 1MeO2PrOH+Water'.D16</svg:desc>
                </draw:g>
              </table:table-cell>
              <table:table-cell office:value-type="float" office:value="0.96416146030652">
                <text:p>0.96416146030652</text:p>
                <draw:g>
                  <svg:desc>'Sys1 1MeO2PrOH+Water'.T3:'Sys1 1MeO2PrOH+Water'.T16</svg:desc>
                </draw:g>
              </table:table-cell>
              <table:table-cell office:value-type="float" office:value="391.41">
                <text:p>391.41</text:p>
                <draw:g>
                  <svg:desc>'Sys1 1MeO2PrOH+Water'.D3:'Sys1 1MeO2PrOH+Water'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97">
                <text:p>0.8297</text:p>
              </table:table-cell>
              <table:table-cell office:value-type="float" office:value="380.19">
                <text:p>380.19</text:p>
              </table:table-cell>
              <table:table-cell office:value-type="float" office:value="0.5405">
                <text:p>0.5405</text:p>
              </table:table-cell>
              <table:table-cell office:value-type="float" office:value="380.19">
                <text:p>380.19</text:p>
              </table:table-cell>
              <table:table-cell office:value-type="float" office:value="0.53601191249291">
                <text:p>0.53601191249291</text:p>
              </table:table-cell>
              <table:table-cell office:value-type="float" office:value="380.19">
                <text:p>38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73">
                <text:p>0.7473</text:p>
              </table:table-cell>
              <table:table-cell office:value-type="float" office:value="378.19">
                <text:p>378.19</text:p>
              </table:table-cell>
              <table:table-cell office:value-type="float" office:value="0.4617">
                <text:p>0.4617</text:p>
              </table:table-cell>
              <table:table-cell office:value-type="float" office:value="378.19">
                <text:p>378.19</text:p>
              </table:table-cell>
              <table:table-cell office:value-type="float" office:value="0.434899028800969">
                <text:p>0.434899028800969</text:p>
              </table:table-cell>
              <table:table-cell office:value-type="float" office:value="378.19">
                <text:p>378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01">
                <text:p>0.6701</text:p>
              </table:table-cell>
              <table:table-cell office:value-type="float" office:value="375.49">
                <text:p>375.49</text:p>
              </table:table-cell>
              <table:table-cell office:value-type="float" office:value="0.3982">
                <text:p>0.3982</text:p>
              </table:table-cell>
              <table:table-cell office:value-type="float" office:value="375.49">
                <text:p>375.49</text:p>
              </table:table-cell>
              <table:table-cell office:value-type="float" office:value="0.382498196168178">
                <text:p>0.382498196168178</text:p>
              </table:table-cell>
              <table:table-cell office:value-type="float" office:value="375.49">
                <text:p>375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56">
                <text:p>0.4656</text:p>
              </table:table-cell>
              <table:table-cell office:value-type="float" office:value="371.93">
                <text:p>371.93</text:p>
              </table:table-cell>
              <table:table-cell office:value-type="float" office:value="0.2943">
                <text:p>0.2943</text:p>
              </table:table-cell>
              <table:table-cell office:value-type="float" office:value="371.93">
                <text:p>371.93</text:p>
              </table:table-cell>
              <table:table-cell office:value-type="float" office:value="0.286630812969407">
                <text:p>0.286630812969407</text:p>
              </table:table-cell>
              <table:table-cell office:value-type="float" office:value="371.93">
                <text:p>371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4">
                <text:p>0.334</text:p>
              </table:table-cell>
              <table:table-cell office:value-type="float" office:value="370.92">
                <text:p>370.92</text:p>
              </table:table-cell>
              <table:table-cell office:value-type="float" office:value="0.2435">
                <text:p>0.2435</text:p>
              </table:table-cell>
              <table:table-cell office:value-type="float" office:value="370.92">
                <text:p>370.92</text:p>
              </table:table-cell>
              <table:table-cell office:value-type="float" office:value="0.238651485390068">
                <text:p>0.238651485390068</text:p>
              </table:table-cell>
              <table:table-cell office:value-type="float" office:value="370.92">
                <text:p>370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04">
                <text:p>0.2404</text:p>
              </table:table-cell>
              <table:table-cell office:value-type="float" office:value="370.69">
                <text:p>370.69</text:p>
              </table:table-cell>
              <table:table-cell office:value-type="float" office:value="0.2136">
                <text:p>0.2136</text:p>
              </table:table-cell>
              <table:table-cell office:value-type="float" office:value="370.69">
                <text:p>370.69</text:p>
              </table:table-cell>
              <table:table-cell office:value-type="float" office:value="0.209025046905247">
                <text:p>0.209025046905247</text:p>
              </table:table-cell>
              <table:table-cell office:value-type="float" office:value="370.69">
                <text:p>370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89">
                <text:p>0.2089</text:p>
              </table:table-cell>
              <table:table-cell office:value-type="float" office:value="370.57">
                <text:p>370.57</text:p>
              </table:table-cell>
              <table:table-cell office:value-type="float" office:value="0.1984">
                <text:p>0.1984</text:p>
              </table:table-cell>
              <table:table-cell office:value-type="float" office:value="370.57">
                <text:p>370.57</text:p>
              </table:table-cell>
              <table:table-cell office:value-type="float" office:value="0.19484384477951">
                <text:p>0.19484384477951</text:p>
              </table:table-cell>
              <table:table-cell office:value-type="float" office:value="370.57">
                <text:p>370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92">
                <text:p>0.1692</text:p>
              </table:table-cell>
              <table:table-cell office:value-type="float" office:value="370.61">
                <text:p>370.61</text:p>
              </table:table-cell>
              <table:table-cell office:value-type="float" office:value="0.1741">
                <text:p>0.1741</text:p>
              </table:table-cell>
              <table:table-cell office:value-type="float" office:value="370.61">
                <text:p>370.61</text:p>
              </table:table-cell>
              <table:table-cell office:value-type="float" office:value="0.170768354760982">
                <text:p>0.170768354760982</text:p>
              </table:table-cell>
              <table:table-cell office:value-type="float" office:value="370.61">
                <text:p>370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9">
                <text:p>0.1439</text:p>
              </table:table-cell>
              <table:table-cell office:value-type="float" office:value="370.7">
                <text:p>370.7</text:p>
              </table:table-cell>
              <table:table-cell office:value-type="float" office:value="0.164">
                <text:p>0.164</text:p>
              </table:table-cell>
              <table:table-cell office:value-type="float" office:value="370.7">
                <text:p>370.7</text:p>
              </table:table-cell>
              <table:table-cell office:value-type="float" office:value="0.160532113650758">
                <text:p>0.160532113650758</text:p>
              </table:table-cell>
              <table:table-cell office:value-type="float" office:value="370.7">
                <text:p>37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3">
                <text:p>0.1193</text:p>
              </table:table-cell>
              <table:table-cell office:value-type="float" office:value="370.82">
                <text:p>370.82</text:p>
              </table:table-cell>
              <table:table-cell office:value-type="float" office:value="0.1605">
                <text:p>0.1605</text:p>
              </table:table-cell>
              <table:table-cell office:value-type="float" office:value="370.82">
                <text:p>370.82</text:p>
              </table:table-cell>
              <table:table-cell office:value-type="float" office:value="0.156680111423267">
                <text:p>0.156680111423267</text:p>
              </table:table-cell>
              <table:table-cell office:value-type="float" office:value="370.82">
                <text:p>370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5">
                <text:p>0.075</text:p>
              </table:table-cell>
              <table:table-cell office:value-type="float" office:value="371.18">
                <text:p>371.18</text:p>
              </table:table-cell>
              <table:table-cell office:value-type="float" office:value="0.1134">
                <text:p>0.1134</text:p>
              </table:table-cell>
              <table:table-cell office:value-type="float" office:value="371.18">
                <text:p>371.18</text:p>
              </table:table-cell>
              <table:table-cell office:value-type="float" office:value="0.110566753516094">
                <text:p>0.110566753516094</text:p>
              </table:table-cell>
              <table:table-cell office:value-type="float" office:value="371.18">
                <text:p>371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41">
                <text:p>0.0441</text:p>
              </table:table-cell>
              <table:table-cell office:value-type="float" office:value="371.68">
                <text:p>371.68</text:p>
              </table:table-cell>
              <table:table-cell office:value-type="float" office:value="0.1018">
                <text:p>0.1018</text:p>
              </table:table-cell>
              <table:table-cell office:value-type="float" office:value="371.68">
                <text:p>371.68</text:p>
              </table:table-cell>
              <table:table-cell office:value-type="float" office:value="0.0989972122138692">
                <text:p>0.0989972122138692</text:p>
              </table:table-cell>
              <table:table-cell office:value-type="float" office:value="371.68">
                <text:p>371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98">
                <text:p>0.0198</text:p>
              </table:table-cell>
              <table:table-cell office:value-type="float" office:value="372.61">
                <text:p>372.61</text:p>
              </table:table-cell>
              <table:table-cell office:value-type="float" office:value="0.0548">
                <text:p>0.0548</text:p>
              </table:table-cell>
              <table:table-cell office:value-type="float" office:value="372.61">
                <text:p>372.61</text:p>
              </table:table-cell>
              <table:table-cell office:value-type="float" office:value="0.0528221230743796">
                <text:p>0.0528221230743796</text:p>
              </table:table-cell>
              <table:table-cell office:value-type="float" office:value="372.61">
                <text:p>372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2">
      <number:number number:decimal-places="2" number:min-decimal-places="2" number:min-integer-digits="1"/>
    </number:number-style>
    <number:number-style style:name="N135">
      <number:number number:decimal-places="4" number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135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2">
      <style:chart-properties chart:symbol-type="named-symbol" chart:symbol-name="circle" chart:symbol-width="0.176cm" chart:symbol-height="0.176cm" chart:link-data-style-to-source="true" chart:label-position="right"/>
      <style:graphic-properties svg:stroke-width="0.05cm" svg:stroke-color="#1f77b4" draw:fill-color="#1f77b4"/>
      <style:text-properties fo:color="#000000" style:text-position="0% 100%" fo:font-family="Arial"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176cm" chart:symbol-height="0.176cm" chart:link-data-style-to-source="true" chart:label-position="right"/>
      <style:graphic-properties svg:stroke-width="0.05cm" svg:stroke-color="#ff7f0e" draw:fill-color="#ff7f0e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2">
      <style:chart-properties chart:symbol-type="named-symbol" chart:symbol-name="horizontal-bar" chart:symbol-width="0.176cm" chart:symbol-height="0.176cm" chart:link-data-style-to-source="true" chart:label-position="right"/>
      <style:graphic-properties svg:stroke-width="0.05cm" svg:stroke-color="#2ca02c" draw:fill-color="#2ca02c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</office:automatic-styles>
  <office:body>
    <office:chart>
      <chart:chart svg:width="13.358cm" svg:height="9.999cm" xlink:href=".." xlink:type="simple" chart:class="chart:scatter" chart:style-name="ch1">
        <chart:title svg:x="2.12cm" svg:y="0.335cm" chart:style-name="ch2">
          <text:p><text:span text:style-name="T1">Sys2 2MeO1PrOH+Water: T-x1-y1</text:span></text:p>
        </chart:title>
        <chart:legend chart:legend-position="end" svg:x="10.285cm" svg:y="4.268cm" style:legend-expansion="high" chart:style-name="ch3"/>
        <chart:plot-area chart:style-name="ch4" svg:x="1.283cm" svg:y="1.551cm" svg:width="8.735cm" svg:height="7.263cm">
          <chart:coordinate-region svg:x="2.367cm" svg:y="1.728cm" svg:width="7.158cm" svg:height="6.633cm"/>
          <chart:axis chart:dimension="x" chart:name="primary-x" chart:style-name="ch5">
            <chart:title svg:x="4.567cm" svg:y="9.014cm" chart:style-name="ch2">
              <text:p><text:span text:style-name="T2">Mole Fraction</text:span></text:p>
            </chart:title>
            <chart:grid chart:style-name="ch6" chart:class="major"/>
          </chart:axis>
          <chart:axis chart:dimension="y" chart:name="primary-y" chart:style-name="ch7">
            <chart:title svg:x="0.451cm" svg:y="5.58cm" chart:style-name="ch8">
              <text:p><text:span text:style-name="T2">T (K)</text:span></text:p>
            </chart:title>
            <chart:grid chart:style-name="ch6" chart:class="major"/>
          </chart:axis>
          <chart:series chart:style-name="ch9" chart:values-cell-range-address="'Sys2 2MeO1PrOH+Water'.D3:'Sys2 2MeO1PrOH+Water'.D20" loext:label-string="&quot;T vs x1&quot;" chart:class="chart:scatter">
            <chart:domain table:cell-range-address="'Sys2 2MeO1PrOH+Water'.A3:'Sys2 2MeO1PrOH+Water'.A20"/>
            <chart:data-point chart:repeated="18"/>
          </chart:series>
          <chart:series chart:style-name="ch10" chart:values-cell-range-address="'Sys2 2MeO1PrOH+Water'.D3:'Sys2 2MeO1PrOH+Water'.D20" loext:label-string="&quot;T vs y1(exp)&quot;" chart:class="chart:scatter">
            <chart:domain table:cell-range-address="'Sys2 2MeO1PrOH+Water'.B3:'Sys2 2MeO1PrOH+Water'.B20"/>
            <chart:data-point chart:repeated="18"/>
          </chart:series>
          <chart:series chart:style-name="ch11" chart:values-cell-range-address="'Sys2 2MeO1PrOH+Water'.D3:'Sys2 2MeO1PrOH+Water'.D20" loext:label-string="&quot;T vs y1(calc)&quot;" chart:class="chart:scatter">
            <chart:domain table:cell-range-address="'Sys2 2MeO1PrOH+Water'.T3:'Sys2 2MeO1PrOH+Water'.T20"/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 vs x1</text:p>
              </table:table-cell>
              <table:table-cell office:value-type="string">
                <text:p>Column B</text:p>
              </table:table-cell>
              <table:table-cell office:value-type="string">
                <text:p>T vs y1(exp)</text:p>
              </table:table-cell>
              <table:table-cell office:value-type="string">
                <text:p>Column T</text:p>
              </table:table-cell>
              <table:table-cell office:value-type="string">
                <text:p>T vs y1(cal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12">
                <text:p>0.9612</text:p>
                <draw:g>
                  <svg:desc>'Sys2 2MeO1PrOH+Water'.A3:'Sys2 2MeO1PrOH+Water'.A20</svg:desc>
                </draw:g>
              </table:table-cell>
              <table:table-cell office:value-type="float" office:value="398.27">
                <text:p>398.27</text:p>
                <draw:g>
                  <svg:desc>'Sys2 2MeO1PrOH+Water'.D3:'Sys2 2MeO1PrOH+Water'.D20</svg:desc>
                </draw:g>
              </table:table-cell>
              <table:table-cell office:value-type="float" office:value="0.8345">
                <text:p>0.8345</text:p>
                <draw:g>
                  <svg:desc>'Sys2 2MeO1PrOH+Water'.B3:'Sys2 2MeO1PrOH+Water'.B20</svg:desc>
                </draw:g>
              </table:table-cell>
              <table:table-cell office:value-type="float" office:value="398.27">
                <text:p>398.27</text:p>
                <draw:g>
                  <svg:desc>'Sys2 2MeO1PrOH+Water'.D3:'Sys2 2MeO1PrOH+Water'.D20</svg:desc>
                </draw:g>
              </table:table-cell>
              <table:table-cell office:value-type="float" office:value="0.795814632055305">
                <text:p>0.795814632055305</text:p>
                <draw:g>
                  <svg:desc>'Sys2 2MeO1PrOH+Water'.T3:'Sys2 2MeO1PrOH+Water'.T20</svg:desc>
                </draw:g>
              </table:table-cell>
              <table:table-cell office:value-type="float" office:value="398.27">
                <text:p>398.27</text:p>
                <draw:g>
                  <svg:desc>'Sys2 2MeO1PrOH+Water'.D3:'Sys2 2MeO1PrOH+Water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25">
                <text:p>0.8625</text:p>
              </table:table-cell>
              <table:table-cell office:value-type="float" office:value="389">
                <text:p>389</text:p>
              </table:table-cell>
              <table:table-cell office:value-type="float" office:value="0.5646">
                <text:p>0.5646</text:p>
              </table:table-cell>
              <table:table-cell office:value-type="float" office:value="389">
                <text:p>389</text:p>
              </table:table-cell>
              <table:table-cell office:value-type="float" office:value="0.54037004443193">
                <text:p>0.5403700444319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936">
                <text:p>0.7936</text:p>
              </table:table-cell>
              <table:table-cell office:value-type="float" office:value="384.2">
                <text:p>384.2</text:p>
              </table:table-cell>
              <table:table-cell office:value-type="float" office:value="0.4398">
                <text:p>0.4398</text:p>
              </table:table-cell>
              <table:table-cell office:value-type="float" office:value="384.2">
                <text:p>384.2</text:p>
              </table:table-cell>
              <table:table-cell office:value-type="float" office:value="0.433296061237878">
                <text:p>0.433296061237878</text:p>
              </table:table-cell>
              <table:table-cell office:value-type="float" office:value="384.2">
                <text:p>38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19">
                <text:p>0.7219</text:p>
              </table:table-cell>
              <table:table-cell office:value-type="float" office:value="379.96">
                <text:p>379.96</text:p>
              </table:table-cell>
              <table:table-cell office:value-type="float" office:value="0.3528">
                <text:p>0.3528</text:p>
              </table:table-cell>
              <table:table-cell office:value-type="float" office:value="379.96">
                <text:p>379.96</text:p>
              </table:table-cell>
              <table:table-cell office:value-type="float" office:value="0.363743885564242">
                <text:p>0.363743885564242</text:p>
              </table:table-cell>
              <table:table-cell office:value-type="float" office:value="379.96">
                <text:p>379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94">
                <text:p>0.6694</text:p>
              </table:table-cell>
              <table:table-cell office:value-type="float" office:value="377.61">
                <text:p>377.61</text:p>
              </table:table-cell>
              <table:table-cell office:value-type="float" office:value="0.3146">
                <text:p>0.3146</text:p>
              </table:table-cell>
              <table:table-cell office:value-type="float" office:value="377.61">
                <text:p>377.61</text:p>
              </table:table-cell>
              <table:table-cell office:value-type="float" office:value="0.331382643417483">
                <text:p>0.331382643417483</text:p>
              </table:table-cell>
              <table:table-cell office:value-type="float" office:value="377.61">
                <text:p>377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75">
                <text:p>0.6275</text:p>
              </table:table-cell>
              <table:table-cell office:value-type="float" office:value="376.26">
                <text:p>376.26</text:p>
              </table:table-cell>
              <table:table-cell office:value-type="float" office:value="0.2822">
                <text:p>0.2822</text:p>
              </table:table-cell>
              <table:table-cell office:value-type="float" office:value="376.26">
                <text:p>376.26</text:p>
              </table:table-cell>
              <table:table-cell office:value-type="float" office:value="0.298933291537478">
                <text:p>0.298933291537478</text:p>
              </table:table-cell>
              <table:table-cell office:value-type="float" office:value="376.26">
                <text:p>376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59">
                <text:p>0.5659</text:p>
              </table:table-cell>
              <table:table-cell office:value-type="float" office:value="375.6">
                <text:p>375.6</text:p>
              </table:table-cell>
              <table:table-cell office:value-type="float" office:value="0.2588">
                <text:p>0.2588</text:p>
              </table:table-cell>
              <table:table-cell office:value-type="float" office:value="375.6">
                <text:p>375.6</text:p>
              </table:table-cell>
              <table:table-cell office:value-type="float" office:value="0.264502809223419">
                <text:p>0.264502809223419</text:p>
              </table:table-cell>
              <table:table-cell office:value-type="float" office:value="375.6">
                <text:p>37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17">
                <text:p>0.5117</text:p>
              </table:table-cell>
              <table:table-cell office:value-type="float" office:value="375.18">
                <text:p>375.18</text:p>
              </table:table-cell>
              <table:table-cell office:value-type="float" office:value="0.2399">
                <text:p>0.2399</text:p>
              </table:table-cell>
              <table:table-cell office:value-type="float" office:value="375.18">
                <text:p>375.18</text:p>
              </table:table-cell>
              <table:table-cell office:value-type="float" office:value="0.2386121674786">
                <text:p>0.2386121674786</text:p>
              </table:table-cell>
              <table:table-cell office:value-type="float" office:value="375.18">
                <text:p>375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37">
                <text:p>0.4237</text:p>
              </table:table-cell>
              <table:table-cell office:value-type="float" office:value="374.1">
                <text:p>374.1</text:p>
              </table:table-cell>
              <table:table-cell office:value-type="float" office:value="0.1901">
                <text:p>0.1901</text:p>
              </table:table-cell>
              <table:table-cell office:value-type="float" office:value="374.1">
                <text:p>374.1</text:p>
              </table:table-cell>
              <table:table-cell office:value-type="float" office:value="0.187184539520377">
                <text:p>0.187184539520377</text:p>
              </table:table-cell>
              <table:table-cell office:value-type="float" office:value="374.1">
                <text:p>374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87">
                <text:p>0.3887</text:p>
              </table:table-cell>
              <table:table-cell office:value-type="float" office:value="373.99">
                <text:p>373.99</text:p>
              </table:table-cell>
              <table:table-cell office:value-type="float" office:value="0.1699">
                <text:p>0.1699</text:p>
              </table:table-cell>
              <table:table-cell office:value-type="float" office:value="373.99">
                <text:p>373.99</text:p>
              </table:table-cell>
              <table:table-cell office:value-type="float" office:value="0.165388641069226">
                <text:p>0.165388641069226</text:p>
              </table:table-cell>
              <table:table-cell office:value-type="float" office:value="373.99">
                <text:p>373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62">
                <text:p>0.3062</text:p>
              </table:table-cell>
              <table:table-cell office:value-type="float" office:value="373.63">
                <text:p>373.63</text:p>
              </table:table-cell>
              <table:table-cell office:value-type="float" office:value="0.1464">
                <text:p>0.1464</text:p>
              </table:table-cell>
              <table:table-cell office:value-type="float" office:value="373.63">
                <text:p>373.63</text:p>
              </table:table-cell>
              <table:table-cell office:value-type="float" office:value="0.140413948762923">
                <text:p>0.140413948762923</text:p>
              </table:table-cell>
              <table:table-cell office:value-type="float" office:value="373.63">
                <text:p>373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95">
                <text:p>0.2795</text:p>
              </table:table-cell>
              <table:table-cell office:value-type="float" office:value="373.42">
                <text:p>373.42</text:p>
              </table:table-cell>
              <table:table-cell office:value-type="float" office:value="0.1383">
                <text:p>0.1383</text:p>
              </table:table-cell>
              <table:table-cell office:value-type="float" office:value="373.42">
                <text:p>373.42</text:p>
              </table:table-cell>
              <table:table-cell office:value-type="float" office:value="0.132913163544334">
                <text:p>0.132913163544334</text:p>
              </table:table-cell>
              <table:table-cell office:value-type="float" office:value="373.42">
                <text:p>373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06">
                <text:p>0.2506</text:p>
              </table:table-cell>
              <table:table-cell office:value-type="float" office:value="373.21">
                <text:p>373.21</text:p>
              </table:table-cell>
              <table:table-cell office:value-type="float" office:value="0.129">
                <text:p>0.129</text:p>
              </table:table-cell>
              <table:table-cell office:value-type="float" office:value="373.21">
                <text:p>373.21</text:p>
              </table:table-cell>
              <table:table-cell office:value-type="float" office:value="0.124233001942657">
                <text:p>0.124233001942657</text:p>
              </table:table-cell>
              <table:table-cell office:value-type="float" office:value="373.21">
                <text:p>373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29">
                <text:p>0.2029</text:p>
              </table:table-cell>
              <table:table-cell office:value-type="float" office:value="373.02">
                <text:p>373.02</text:p>
              </table:table-cell>
              <table:table-cell office:value-type="float" office:value="0.119">
                <text:p>0.119</text:p>
              </table:table-cell>
              <table:table-cell office:value-type="float" office:value="373.02">
                <text:p>373.02</text:p>
              </table:table-cell>
              <table:table-cell office:value-type="float" office:value="0.114516423535217">
                <text:p>0.114516423535217</text:p>
              </table:table-cell>
              <table:table-cell office:value-type="float" office:value="373.02">
                <text:p>373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3">
                <text:p>0.133</text:p>
              </table:table-cell>
              <table:table-cell office:value-type="float" office:value="372.75">
                <text:p>372.75</text:p>
              </table:table-cell>
              <table:table-cell office:value-type="float" office:value="0.1034">
                <text:p>0.1034</text:p>
              </table:table-cell>
              <table:table-cell office:value-type="float" office:value="372.75">
                <text:p>372.75</text:p>
              </table:table-cell>
              <table:table-cell office:value-type="float" office:value="0.0997799332810812">
                <text:p>0.0997799332810812</text:p>
              </table:table-cell>
              <table:table-cell office:value-type="float" office:value="372.75">
                <text:p>372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22">
                <text:p>0.0922</text:p>
              </table:table-cell>
              <table:table-cell office:value-type="float" office:value="372.61">
                <text:p>372.61</text:p>
              </table:table-cell>
              <table:table-cell office:value-type="float" office:value="0.0899">
                <text:p>0.0899</text:p>
              </table:table-cell>
              <table:table-cell office:value-type="float" office:value="372.61">
                <text:p>372.61</text:p>
              </table:table-cell>
              <table:table-cell office:value-type="float" office:value="0.087094239003857">
                <text:p>0.087094239003857</text:p>
              </table:table-cell>
              <table:table-cell office:value-type="float" office:value="372.61">
                <text:p>372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64">
                <text:p>0.0564</text:p>
              </table:table-cell>
              <table:table-cell office:value-type="float" office:value="372.57">
                <text:p>372.57</text:p>
              </table:table-cell>
              <table:table-cell office:value-type="float" office:value="0.0785">
                <text:p>0.0785</text:p>
              </table:table-cell>
              <table:table-cell office:value-type="float" office:value="372.57">
                <text:p>372.57</text:p>
              </table:table-cell>
              <table:table-cell office:value-type="float" office:value="0.076408368800902">
                <text:p>0.076408368800902</text:p>
              </table:table-cell>
              <table:table-cell office:value-type="float" office:value="372.57">
                <text:p>372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3">
                <text:p>0.0013</text:p>
              </table:table-cell>
              <table:table-cell office:value-type="float" office:value="373.16">
                <text:p>373.16</text:p>
              </table:table-cell>
              <table:table-cell office:value-type="float" office:value="0.0022">
                <text:p>0.0022</text:p>
              </table:table-cell>
              <table:table-cell office:value-type="float" office:value="373.16">
                <text:p>373.16</text:p>
              </table:table-cell>
              <table:table-cell office:value-type="float" office:value="0.00215969675820359">
                <text:p>0.00215969675820359</text:p>
              </table:table-cell>
              <table:table-cell office:value-type="float" office:value="373.16">
                <text:p>373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2">
      <number:number number:decimal-places="2" number:min-decimal-places="2" number:min-integer-digits="1"/>
    </number:number-style>
    <number:number-style style:name="N135">
      <number:number number:decimal-places="4" number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135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2">
      <style:chart-properties chart:symbol-type="named-symbol" chart:symbol-name="circle" chart:symbol-width="0.176cm" chart:symbol-height="0.176cm" chart:link-data-style-to-source="true" chart:label-position="right"/>
      <style:graphic-properties svg:stroke-width="0.05cm" svg:stroke-color="#1f77b4" draw:fill-color="#1f77b4"/>
      <style:text-properties fo:color="#000000" style:text-position="0% 100%" fo:font-family="Arial"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176cm" chart:symbol-height="0.176cm" chart:link-data-style-to-source="true" chart:label-position="right"/>
      <style:graphic-properties svg:stroke-width="0.05cm" svg:stroke-color="#ff7f0e" draw:fill-color="#ff7f0e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2">
      <style:chart-properties chart:symbol-type="named-symbol" chart:symbol-name="horizontal-bar" chart:symbol-width="0.176cm" chart:symbol-height="0.176cm" chart:link-data-style-to-source="true" chart:label-position="right"/>
      <style:graphic-properties svg:stroke-width="0.05cm" svg:stroke-color="#2ca02c" draw:fill-color="#2ca02c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</office:automatic-styles>
  <office:body>
    <office:chart>
      <chart:chart svg:width="13.358cm" svg:height="9.999cm" xlink:href=".." xlink:type="simple" chart:class="chart:scatter" chart:style-name="ch1">
        <chart:title svg:x="1.588cm" svg:y="0.334cm" chart:style-name="ch2">
          <text:p><text:span text:style-name="T1">Sys3 1MeO2PrOH+2MeO1PrOH: T-x1-y1</text:span></text:p>
        </chart:title>
        <chart:legend chart:legend-position="end" svg:x="10.285cm" svg:y="4.268cm" style:legend-expansion="high" chart:style-name="ch3"/>
        <chart:plot-area chart:style-name="ch4" svg:x="1.283cm" svg:y="2.186cm" svg:width="8.735cm" svg:height="6.628cm">
          <chart:coordinate-region svg:x="2.367cm" svg:y="2.363cm" svg:width="7.158cm" svg:height="5.998cm"/>
          <chart:axis chart:dimension="x" chart:name="primary-x" chart:style-name="ch5">
            <chart:title svg:x="4.567cm" svg:y="9.014cm" chart:style-name="ch2">
              <text:p><text:span text:style-name="T2">Mole Fraction</text:span></text:p>
            </chart:title>
            <chart:grid chart:style-name="ch6" chart:class="major"/>
          </chart:axis>
          <chart:axis chart:dimension="y" chart:name="primary-y" chart:style-name="ch7">
            <chart:title svg:x="0.451cm" svg:y="5.898cm" chart:style-name="ch8">
              <text:p><text:span text:style-name="T2">T (K)</text:span></text:p>
            </chart:title>
            <chart:grid chart:style-name="ch6" chart:class="major"/>
          </chart:axis>
          <chart:series chart:style-name="ch9" chart:values-cell-range-address="'Sys3 1MeO2PrOH+2MeO1PrOH'.D3:'Sys3 1MeO2PrOH+2MeO1PrOH'.D23" loext:label-string="&quot;T vs x1&quot;" chart:class="chart:scatter">
            <chart:domain table:cell-range-address="'Sys3 1MeO2PrOH+2MeO1PrOH'.A3:'Sys3 1MeO2PrOH+2MeO1PrOH'.A23"/>
            <chart:data-point chart:repeated="21"/>
          </chart:series>
          <chart:series chart:style-name="ch10" chart:values-cell-range-address="'Sys3 1MeO2PrOH+2MeO1PrOH'.D3:'Sys3 1MeO2PrOH+2MeO1PrOH'.D23" loext:label-string="&quot;T vs y1(exp)&quot;" chart:class="chart:scatter">
            <chart:domain table:cell-range-address="'Sys3 1MeO2PrOH+2MeO1PrOH'.B3:'Sys3 1MeO2PrOH+2MeO1PrOH'.B23"/>
            <chart:data-point chart:repeated="21"/>
          </chart:series>
          <chart:series chart:style-name="ch11" chart:values-cell-range-address="'Sys3 1MeO2PrOH+2MeO1PrOH'.D3:'Sys3 1MeO2PrOH+2MeO1PrOH'.D23" loext:label-string="&quot;T vs y1(calc)&quot;" chart:class="chart:scatter">
            <chart:domain table:cell-range-address="'Sys3 1MeO2PrOH+2MeO1PrOH'.T3:'Sys3 1MeO2PrOH+2MeO1PrOH'.T23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 vs x1</text:p>
              </table:table-cell>
              <table:table-cell office:value-type="string">
                <text:p>Column B</text:p>
              </table:table-cell>
              <table:table-cell office:value-type="string">
                <text:p>T vs y1(exp)</text:p>
              </table:table-cell>
              <table:table-cell office:value-type="string">
                <text:p>Column T</text:p>
              </table:table-cell>
              <table:table-cell office:value-type="string">
                <text:p>T vs y1(cal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66">
                <text:p>0.9266</text:p>
                <draw:g>
                  <svg:desc>'Sys3 1MeO2PrOH+2MeO1PrOH'.A3:'Sys3 1MeO2PrOH+2MeO1PrOH'.A23</svg:desc>
                </draw:g>
              </table:table-cell>
              <table:table-cell office:value-type="float" office:value="393.84">
                <text:p>393.84</text:p>
                <draw:g>
                  <svg:desc>'Sys3 1MeO2PrOH+2MeO1PrOH'.D3:'Sys3 1MeO2PrOH+2MeO1PrOH'.D23</svg:desc>
                </draw:g>
              </table:table-cell>
              <table:table-cell office:value-type="float" office:value="0.9524">
                <text:p>0.9524</text:p>
                <draw:g>
                  <svg:desc>'Sys3 1MeO2PrOH+2MeO1PrOH'.B3:'Sys3 1MeO2PrOH+2MeO1PrOH'.B23</svg:desc>
                </draw:g>
              </table:table-cell>
              <table:table-cell office:value-type="float" office:value="393.84">
                <text:p>393.84</text:p>
                <draw:g>
                  <svg:desc>'Sys3 1MeO2PrOH+2MeO1PrOH'.D3:'Sys3 1MeO2PrOH+2MeO1PrOH'.D23</svg:desc>
                </draw:g>
              </table:table-cell>
              <table:table-cell office:value-type="float" office:value="0.958300740290122">
                <text:p>0.958300740290122</text:p>
                <draw:g>
                  <svg:desc>'Sys3 1MeO2PrOH+2MeO1PrOH'.T3:'Sys3 1MeO2PrOH+2MeO1PrOH'.T23</svg:desc>
                </draw:g>
              </table:table-cell>
              <table:table-cell office:value-type="float" office:value="393.84">
                <text:p>393.84</text:p>
                <draw:g>
                  <svg:desc>'Sys3 1MeO2PrOH+2MeO1PrOH'.D3:'Sys3 1MeO2PrOH+2MeO1PrOH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66">
                <text:p>0.8966</text:p>
              </table:table-cell>
              <table:table-cell office:value-type="float" office:value="394.26">
                <text:p>394.26</text:p>
              </table:table-cell>
              <table:table-cell office:value-type="float" office:value="0.9303">
                <text:p>0.9303</text:p>
              </table:table-cell>
              <table:table-cell office:value-type="float" office:value="394.26">
                <text:p>394.26</text:p>
              </table:table-cell>
              <table:table-cell office:value-type="float" office:value="0.932833157319965">
                <text:p>0.932833157319965</text:p>
              </table:table-cell>
              <table:table-cell office:value-type="float" office:value="394.26">
                <text:p>394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62">
                <text:p>0.8862</text:p>
              </table:table-cell>
              <table:table-cell office:value-type="float" office:value="394.58">
                <text:p>394.58</text:p>
              </table:table-cell>
              <table:table-cell office:value-type="float" office:value="0.9213">
                <text:p>0.9213</text:p>
              </table:table-cell>
              <table:table-cell office:value-type="float" office:value="394.58">
                <text:p>394.58</text:p>
              </table:table-cell>
              <table:table-cell office:value-type="float" office:value="0.917736274597094">
                <text:p>0.917736274597094</text:p>
              </table:table-cell>
              <table:table-cell office:value-type="float" office:value="394.58">
                <text:p>394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53">
                <text:p>0.8353</text:p>
              </table:table-cell>
              <table:table-cell office:value-type="float" office:value="395.11">
                <text:p>395.11</text:p>
              </table:table-cell>
              <table:table-cell office:value-type="float" office:value="0.8812">
                <text:p>0.8812</text:p>
              </table:table-cell>
              <table:table-cell office:value-type="float" office:value="395.11">
                <text:p>395.11</text:p>
              </table:table-cell>
              <table:table-cell office:value-type="float" office:value="0.877819449759311">
                <text:p>0.877819449759311</text:p>
              </table:table-cell>
              <table:table-cell office:value-type="float" office:value="395.11">
                <text:p>395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03">
                <text:p>0.7803</text:p>
              </table:table-cell>
              <table:table-cell office:value-type="float" office:value="395.73">
                <text:p>395.73</text:p>
              </table:table-cell>
              <table:table-cell office:value-type="float" office:value="0.8344">
                <text:p>0.8344</text:p>
              </table:table-cell>
              <table:table-cell office:value-type="float" office:value="395.73">
                <text:p>395.73</text:p>
              </table:table-cell>
              <table:table-cell office:value-type="float" office:value="0.830484363654818">
                <text:p>0.830484363654818</text:p>
              </table:table-cell>
              <table:table-cell office:value-type="float" office:value="395.73">
                <text:p>395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87">
                <text:p>0.7387</text:p>
              </table:table-cell>
              <table:table-cell office:value-type="float" office:value="396.03">
                <text:p>396.03</text:p>
              </table:table-cell>
              <table:table-cell office:value-type="float" office:value="0.7989">
                <text:p>0.7989</text:p>
              </table:table-cell>
              <table:table-cell office:value-type="float" office:value="396.03">
                <text:p>396.03</text:p>
              </table:table-cell>
              <table:table-cell office:value-type="float" office:value="0.798389701149252">
                <text:p>0.798389701149252</text:p>
              </table:table-cell>
              <table:table-cell office:value-type="float" office:value="396.03">
                <text:p>396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37">
                <text:p>0.7337</text:p>
              </table:table-cell>
              <table:table-cell office:value-type="float" office:value="396.06">
                <text:p>396.06</text:p>
              </table:table-cell>
              <table:table-cell office:value-type="float" office:value="0.7955">
                <text:p>0.7955</text:p>
              </table:table-cell>
              <table:table-cell office:value-type="float" office:value="396.06">
                <text:p>396.06</text:p>
              </table:table-cell>
              <table:table-cell office:value-type="float" office:value="0.795057197669529">
                <text:p>0.795057197669529</text:p>
              </table:table-cell>
              <table:table-cell office:value-type="float" office:value="396.06">
                <text:p>396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93">
                <text:p>0.6493</text:p>
              </table:table-cell>
              <table:table-cell office:value-type="float" office:value="397">
                <text:p>397</text:p>
              </table:table-cell>
              <table:table-cell office:value-type="float" office:value="0.7199">
                <text:p>0.7199</text:p>
              </table:table-cell>
              <table:table-cell office:value-type="float" office:value="397">
                <text:p>397</text:p>
              </table:table-cell>
              <table:table-cell office:value-type="float" office:value="0.717796059825053">
                <text:p>0.71779605982505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06">
                <text:p>0.6006</text:p>
              </table:table-cell>
              <table:table-cell office:value-type="float" office:value="397.37">
                <text:p>397.37</text:p>
              </table:table-cell>
              <table:table-cell office:value-type="float" office:value="0.6729">
                <text:p>0.6729</text:p>
              </table:table-cell>
              <table:table-cell office:value-type="float" office:value="397.37">
                <text:p>397.37</text:p>
              </table:table-cell>
              <table:table-cell office:value-type="float" office:value="0.673192236518429">
                <text:p>0.673192236518429</text:p>
              </table:table-cell>
              <table:table-cell office:value-type="float" office:value="397.37">
                <text:p>397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23">
                <text:p>0.5923</text:p>
              </table:table-cell>
              <table:table-cell office:value-type="float" office:value="397.46">
                <text:p>397.46</text:p>
              </table:table-cell>
              <table:table-cell office:value-type="float" office:value="0.6667">
                <text:p>0.6667</text:p>
              </table:table-cell>
              <table:table-cell office:value-type="float" office:value="397.46">
                <text:p>397.46</text:p>
              </table:table-cell>
              <table:table-cell office:value-type="float" office:value="0.666867967453806">
                <text:p>0.666867967453806</text:p>
              </table:table-cell>
              <table:table-cell office:value-type="float" office:value="397.46">
                <text:p>397.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9">
                <text:p>0.559</text:p>
              </table:table-cell>
              <table:table-cell office:value-type="float" office:value="397.8">
                <text:p>397.8</text:p>
              </table:table-cell>
              <table:table-cell office:value-type="float" office:value="0.6348">
                <text:p>0.6348</text:p>
              </table:table-cell>
              <table:table-cell office:value-type="float" office:value="397.8">
                <text:p>397.8</text:p>
              </table:table-cell>
              <table:table-cell office:value-type="float" office:value="0.634259788950007">
                <text:p>0.634259788950007</text:p>
              </table:table-cell>
              <table:table-cell office:value-type="float" office:value="397.8">
                <text:p>39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03">
                <text:p>0.5103</text:p>
              </table:table-cell>
              <table:table-cell office:value-type="float" office:value="398.25">
                <text:p>398.25</text:p>
              </table:table-cell>
              <table:table-cell office:value-type="float" office:value="0.589">
                <text:p>0.589</text:p>
              </table:table-cell>
              <table:table-cell office:value-type="float" office:value="398.25">
                <text:p>398.25</text:p>
              </table:table-cell>
              <table:table-cell office:value-type="float" office:value="0.588970550074623">
                <text:p>0.588970550074623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04">
                <text:p>0.4404</text:p>
              </table:table-cell>
              <table:table-cell office:value-type="float" office:value="398.9">
                <text:p>398.9</text:p>
              </table:table-cell>
              <table:table-cell office:value-type="float" office:value="0.5177">
                <text:p>0.5177</text:p>
              </table:table-cell>
              <table:table-cell office:value-type="float" office:value="398.9">
                <text:p>398.9</text:p>
              </table:table-cell>
              <table:table-cell office:value-type="float" office:value="0.51722258150982">
                <text:p>0.51722258150982</text:p>
              </table:table-cell>
              <table:table-cell office:value-type="float" office:value="398.9">
                <text:p>398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5">
                <text:p>0.395</text:p>
              </table:table-cell>
              <table:table-cell office:value-type="float" office:value="399.33">
                <text:p>399.33</text:p>
              </table:table-cell>
              <table:table-cell office:value-type="float" office:value="0.47">
                <text:p>0.47</text:p>
              </table:table-cell>
              <table:table-cell office:value-type="float" office:value="399.33">
                <text:p>399.33</text:p>
              </table:table-cell>
              <table:table-cell office:value-type="float" office:value="0.469098172408516">
                <text:p>0.469098172408516</text:p>
              </table:table-cell>
              <table:table-cell office:value-type="float" office:value="399.33">
                <text:p>399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96">
                <text:p>0.3396</text:p>
              </table:table-cell>
              <table:table-cell office:value-type="float" office:value="399.9">
                <text:p>399.9</text:p>
              </table:table-cell>
              <table:table-cell office:value-type="float" office:value="0.4106">
                <text:p>0.4106</text:p>
              </table:table-cell>
              <table:table-cell office:value-type="float" office:value="399.9">
                <text:p>399.9</text:p>
              </table:table-cell>
              <table:table-cell office:value-type="float" office:value="0.408669802960969">
                <text:p>0.408669802960969</text:p>
              </table:table-cell>
              <table:table-cell office:value-type="float" office:value="399.9">
                <text:p>39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41">
                <text:p>0.3041</text:p>
              </table:table-cell>
              <table:table-cell office:value-type="float" office:value="400.22">
                <text:p>400.22</text:p>
              </table:table-cell>
              <table:table-cell office:value-type="float" office:value="0.3689">
                <text:p>0.3689</text:p>
              </table:table-cell>
              <table:table-cell office:value-type="float" office:value="400.22">
                <text:p>400.22</text:p>
              </table:table-cell>
              <table:table-cell office:value-type="float" office:value="0.366978538910216">
                <text:p>0.366978538910216</text:p>
              </table:table-cell>
              <table:table-cell office:value-type="float" office:value="400.22">
                <text:p>400.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69">
                <text:p>0.2769</text:p>
              </table:table-cell>
              <table:table-cell office:value-type="float" office:value="400.48">
                <text:p>400.48</text:p>
              </table:table-cell>
              <table:table-cell office:value-type="float" office:value="0.3358">
                <text:p>0.3358</text:p>
              </table:table-cell>
              <table:table-cell office:value-type="float" office:value="400.48">
                <text:p>400.48</text:p>
              </table:table-cell>
              <table:table-cell office:value-type="float" office:value="0.333634025474193">
                <text:p>0.333634025474193</text:p>
              </table:table-cell>
              <table:table-cell office:value-type="float" office:value="400.48">
                <text:p>400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48">
                <text:p>0.2148</text:p>
              </table:table-cell>
              <table:table-cell office:value-type="float" office:value="400.96">
                <text:p>400.96</text:p>
              </table:table-cell>
              <table:table-cell office:value-type="float" office:value="0.2621">
                <text:p>0.2621</text:p>
              </table:table-cell>
              <table:table-cell office:value-type="float" office:value="400.96">
                <text:p>400.96</text:p>
              </table:table-cell>
              <table:table-cell office:value-type="float" office:value="0.260531874327444">
                <text:p>0.260531874327444</text:p>
              </table:table-cell>
              <table:table-cell office:value-type="float" office:value="400.96">
                <text:p>400.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63">
                <text:p>0.1663</text:p>
              </table:table-cell>
              <table:table-cell office:value-type="float" office:value="401.48">
                <text:p>401.48</text:p>
              </table:table-cell>
              <table:table-cell office:value-type="float" office:value="0.1985">
                <text:p>0.1985</text:p>
              </table:table-cell>
              <table:table-cell office:value-type="float" office:value="401.48">
                <text:p>401.48</text:p>
              </table:table-cell>
              <table:table-cell office:value-type="float" office:value="0.196288084849699">
                <text:p>0.196288084849699</text:p>
              </table:table-cell>
              <table:table-cell office:value-type="float" office:value="401.48">
                <text:p>401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51">
                <text:p>0.1451</text:p>
              </table:table-cell>
              <table:table-cell office:value-type="float" office:value="401.69">
                <text:p>401.69</text:p>
              </table:table-cell>
              <table:table-cell office:value-type="float" office:value="0.1702">
                <text:p>0.1702</text:p>
              </table:table-cell>
              <table:table-cell office:value-type="float" office:value="401.69">
                <text:p>401.69</text:p>
              </table:table-cell>
              <table:table-cell office:value-type="float" office:value="0.168167531028441">
                <text:p>0.168167531028441</text:p>
              </table:table-cell>
              <table:table-cell office:value-type="float" office:value="401.69">
                <text:p>401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03">
                <text:p>0.0903</text:p>
              </table:table-cell>
              <table:table-cell office:value-type="float" office:value="402.16">
                <text:p>402.16</text:p>
              </table:table-cell>
              <table:table-cell office:value-type="float" office:value="0.101">
                <text:p>0.101</text:p>
              </table:table-cell>
              <table:table-cell office:value-type="float" office:value="402.16">
                <text:p>402.16</text:p>
              </table:table-cell>
              <table:table-cell office:value-type="float" office:value="0.0994723738405048">
                <text:p>0.0994723738405048</text:p>
              </table:table-cell>
              <table:table-cell office:value-type="float" office:value="402.16">
                <text:p>402.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